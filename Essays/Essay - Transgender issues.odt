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What the philosophical evidence actually shows</text:span></text:p>
      <text:p text:style-name="Text_20_body">Sex is biological but not simply binary. This is the part the rhetorical question most aggressively suppresses.</text:p>
      <text:p text:style-name="Text_20_body">Biological sex in humans involves chromosomes, hormones, gonads, and secondary sex characteristics — and these don't always align in the ways the simple binary assumes. Intersex conditions — where biological sex characteristics don't fit typical definitions of male or female — occur in a meaningful percentage of the population. The biology itself is more complex than the rhetorical question acknowledges.</text:p>
      <text:p text:style-name="Text_20_body">That's not a political position. It's basic biology that has been documented for decades and that the rhetorical question deliberately ignores.</text:p>
      <text:p text:style-name="Text_20_body">But conditions in which chromosomal sex is inconsistent with phenotypic sex, or in which the phenotype is not classifiable as either male or female, occur in only 0.018% of the population. The claim that 1.7% are intersex includes conditions which most clinicians do not recognize as intersex.</text:p>
      <text:p text:style-name="Text_20_body">Biological sex is strongly dimorphic. The vast majority of humans are unambiguously male or female at the biological level across chromosomes, hormones, gonads, and anatomy. The binary isn't a social construction — it's a real and dominant feature of human biology.</text:p>
      <text:p text:style-name="Text_20_body">And it isn't perfectly binary. Intersex conditions are real, documented across medical literature, and exist independent of any political context. They're rare but they're not vanishingly rare. They establish that the edges of the biological categories are not perfectly sharp even when the categories themselves are real and meaningful.</text:p>
      <text:p text:style-name="Text_20_body"><text:span text:style-name="Strong_20_Emphasis">Gender is distinct from sex</text:span></text:p>
      <text:p text:style-name="Text_20_body">This is where genuine philosophical complexity begins.</text:p>
      <text:p text:style-name="Text_20_body">Sex refers to biological characteristics. Gender refers to the social, psychological, and cultural dimensions of identity that in most people align with biological sex but in some people don't. That distinction — between sex and gender — is not a recent political invention. It has been recognized in medicine, psychology, and anthropology for decades.</text:p>
      <text:p text:style-name="Text_20_body">The philosophical question is what gender actually is. And here genuine uncertainty exists.</text:p>
      <text:p text:style-name="Text_20_body">Is gender purely biological — determined by sex characteristics and therefore fixed? The evidence doesn't support this. The existence of transgender experience across every culture and historical period — documented long before any modern political context — suggests that the phenomenon is real and not merely a product of contemporary ideology.</text:p>
      <text:p text:style-name="Text_20_body">Is gender purely social construction — entirely a matter of self-identification with no relationship to biology or any other external reality? The evidence doesn't fully support this either. The consistent and early-onset nature of gender dysphoria in many transgender people, the documented distress produced by misalignment between experienced gender and social assignment, and the cross-cultural persistence of transgender experience all suggest something more than pure social construction.</text:p>
      <text:p text:style-name="Text_20_body"><text:soft-page-break/>What the evidence points toward is something more complex than either pole acknowledges. Gender has biological dimensions — the neuroscience is suggestive though not conclusive. It has psychological dimensions — experienced identity is real and has real consequences. It has social dimensions — how gender is expressed and recognized is shaped by cultural context. And it has individual dimensions — the specific experience of gender varies significantly across persons.</text:p>
      <text:p text:style-name="Standard"/>
      <text:p text:style-name="Standard">Biological sex is real, meaningful, and predominantly binary. Intersex conditions are real, documented, and establish genuine complexity at the margins without undermining the binary as a biological reality. And transgender experience is a distinct phenomenon that requires its own philosophical engagement rather than being grounded primarily in intersex biology.</text:p>
      <text:p text:style-name="Standard"/>
      <text:p text:style-name="Standard">---------------------------------------------</text:p>
      <text:p text:style-name="Standard">Medical interventions for minors</text:p>
      <text:p text:style-name="Standard"/>
      <text:p text:style-name="Text_20_body">The debate is structured as — do you support transgender children or do you want to harm them. That's the pro-affirmation framing. The counter framing is — do you protect children from irreversible medical intervention or do you support mutilation. Both framings are designed to prevent genuine engagement with what are actually several distinct and genuinely difficult questions.</text:p>
      <text:p text:style-name="Text_20_body"><text:span text:style-name="Strong_20_Emphasis">What the framework immediately establishes</text:span></text:p>
      <text:p text:style-name="Text_20_body">Axiom II — the dignity of transgender minors is inviolable. That's not in question and the framework doesn't make it contingent on resolving any of the medical or philosophical questions.</text:p>
      <text:p text:style-name="Text_20_body">Principle 6 — decisions that are morally grave, irreducibly particular, and whose relevant facts are only accessible through genuine proximity belong to those closest to the situation. This applies here but with a crucial complication that distinguishes this from the abortion case.</text:p>
      <text:p text:style-name="Text_20_body"><text:span text:style-name="Strong_20_Emphasis">The complication that makes this genuinely harder than abortion</text:span></text:p>
      <text:p text:style-name="Text_20_body">In the abortion case Principle 6 pointed clearly to the person inside the situation — the pregnant person — as the legitimate decision maker. The capacity for self-determination was not in question.</text:p>
      <text:p text:style-name="Text_20_body">With minors it is. And that's not a dismissal of transgender children's experience. It's an acknowledgment of something the framework takes seriously — that genuine consent requires the capacity to anticipate consequences, weigh long term against short term, and make decisions that one's future self would ratify.</text:p>
      <text:p text:style-name="Text_20_body">That capacity develops over time. It isn't present in the same way at eight that it is at sixteen that it is at twenty-five. That's not unique to transgender questions — it's why we don't allow minors to sign contracts, vote, or make a range of other consequential decisions.</text:p>
      <text:p text:style-name="Text_20_body">The question is whether and how that developing capacity intersects with medical interventions that vary significantly in their reversibility and consequence.</text:p>
      <text:p text:style-name="Text_20_body"><text:span text:style-name="Strong_20_Emphasis">The interventions are not a single category</text:span></text:p>
      <text:p text:style-name="Text_20_body"><text:soft-page-break/>This is the most important thing the debate consistently fails to acknowledge. Medical interventions associated with gender transition in minors exist on a spectrum of reversibility and consequence that the debate treats as uniform.</text:p>
      <text:p text:style-name="Text_20_body">Social transition — name, pronouns, clothing, presentation. Fully reversible. No medical intervention. The evidence suggests meaningful benefit for wellbeing and no documented harm from reversibility if the child later detransitions.</text:p>
      <text:p text:style-name="Text_20_body">Puberty blockers — suppression of endogenous puberty. Presented as reversible in most clinical contexts. The evidence on full reversibility is more contested than the standard clinical framing suggests — particularly regarding bone density, neurological development, and the degree to which blocking puberty forecloses rather than delays the experience of natural puberty.</text:p>
      <text:p text:style-name="Text_20_body">Cross-sex hormones — testosterone for transgender boys, estrogen for transgender girls. Produce significant and largely irreversible changes. Fertility effects are real and long term. The person receiving them cannot fully anticipate at fourteen what it means to be potentially infertile at thirty-five.</text:p>
      <text:p text:style-name="Text_20_body">Surgical intervention — chest surgery for transgender boys is performed on minors in some contexts. Genital surgery is generally not performed on minors in responsible clinical practice. Irreversible by definition.</text:p>
      <text:p text:style-name="Text_20_body">The framework cannot treat these as equivalent. The questions of consent, reversibility, evidence, and legitimate authority look different across this spectrum.</text:p>
      <text:p text:style-name="Text_20_body"><text:span text:style-name="Strong_20_Emphasis">What the evidence actually shows</text:span></text:p>
      <text:p text:style-name="Text_20_body">This is where Principle 1 requires the most careful engagement — because the evidence is genuinely contested in ways that both sides of the debate misrepresent.</text:p>
      <text:p text:style-name="Text_20_body">The affirmation side presents the evidence as settled — gender affirming care reduces suicide risk, improves mental health outcomes, and the benefits clearly outweigh the risks. That overstates the certainty of the evidence. Many of the studies have methodological limitations — small samples, no control groups, short follow-up periods, high dropout rates. The long term evidence on outcomes for people who received puberty blockers and cross-sex hormones as minors is genuinely limited because the practice at current scale is relatively recent.</text:p>
      <text:p text:style-name="Text_20_body">The restriction side presents the evidence as showing clear harm — that most gender dysphoric children desist if not medically intervened upon, that detransition rates are significant, that the affirmation model is causing irreversible harm to children who would have grown up to be gay or lesbian adults. That also overstates certainty. The desistance studies have their own methodological problems. The relationship between childhood gender dysphoria and adult transgender identity is more complex than either side acknowledges.</text:p>
      <text:p text:style-name="Text_20_body">The honest evidence picture is that gender affirming care produces meaningful short and medium term improvements in mental health and wellbeing for many transgender youth. The long term evidence is genuinely limited. The evidence on puberty blockers specifically is more contested than standard clinical guidance suggests. And the question of which children will persist in transgender identity into adulthood versus which will desist is not reliably predictable with current clinical tools.</text:p>
      <text:p text:style-name="Text_20_body"><text:soft-page-break/>That's not a comfortable picture for either side. It's what Principle 1 requires acknowledging.</text:p>
      <text:p text:style-name="Text_20_body"><text:span text:style-name="Strong_20_Emphasis">What the framework produces</text:span></text:p>
      <text:p text:style-name="Text_20_body">Several distinct conclusions for the different intervention types.</text:p>
      <text:p text:style-name="Text_20_body">Social transition — the evidence supports it, the reversibility is complete, the dignity and wellbeing of the child are clearly served. The framework supports parental and child authority here without significant qualification.</text:p>
      <text:p text:style-name="Text_20_body">Puberty blockers — the framework requires genuine informed consent that honestly represents the uncertainty in the evidence rather than presenting the intervention as clearly safe and fully reversible. The decision belongs to parents in genuine consultation with the child and with clinicians who are honest about what is and isn't known. The framework is concerned about clinical contexts that present uncertainty as settled and that don't adequately represent the full range of long term unknowns to families making these decisions.</text:p>
      <text:p text:style-name="Text_20_body">Cross-sex hormones — the irreversibility and the magnitude of consequence require a higher threshold of certainty about persistence of transgender identity and a more demanding standard of informed consent. The framework supports access for adolescents whose gender dysphoria is severe, persistent, and well-documented — with genuine informed consent that honestly represents fertility implications and other long term consequences. It is skeptical of protocols that move quickly to hormonal intervention without adequate assessment of persistence.</text:p>
      <text:p text:style-name="Text_20_body">Surgical intervention on minors — the framework's concern about irreversibility and developing consent capacity applies most strongly here. The evidence base for surgical intervention specifically in minors is the thinnest. The framework requires the highest threshold of certainty and the most demanding standard of consent before supporting access.</text:p>
      <text:p text:style-name="Text_20_body"><text:span text:style-name="Strong_20_Emphasis">What the framework says about legislative bans</text:span></text:p>
      <text:p text:style-name="Text_20_body">Here's where it gets complicated — because the framework's concerns about specific interventions don't automatically translate into support for legislative prohibition.</text:p>
      <text:p text:style-name="Text_20_body">Principle 6 — the legitimate decision makers are those closest to the situation. Parents, children, and clinicians with genuine proximity to the specific case. Legislative bans substitute the judgment of institutions with no proximity to individual cases for the judgment of those who have it.</text:p>
      <text:p text:style-name="Text_20_body">But — and this is genuine tension — Principle 9 and the broader commitment to protecting the vulnerable create a legitimate community interest in ensuring that decisions with irreversible consequences for minors are made with adequate consent, adequate evidence, and adequate protection of the child's long term interests.</text:p>
      <text:p text:style-name="Text_20_body">The framework can support — mandatory genuinely informed consent requirements that honestly represent evidentiary uncertainty. Robust clinical assessment requirements before irreversible interventions. Protections ensuring children aren't pressured toward or away from transition. The involvement of mental health assessment alongside medical assessment.</text:p>
      <text:p text:style-name="Text_20_body"><text:soft-page-break/>The framework is skeptical of — blanket legislative bans that substitute political judgment for clinical and familial judgment in individual cases. Bans that make no distinction between social transition and surgical intervention. Bans driven by the goal of eliminating transgender identity rather than protecting children's genuine long term interests.</text:p>
      <text:p text:style-name="Text_20_body"><text:span text:style-name="Strong_20_Emphasis">The honest summary</text:span></text:p>
      <text:p text:style-name="Text_20_body">This is a genuine case where the framework's commitments produce real tension rather than clean resolution. The dignity of transgender minors is inviolable. The evidence is genuinely uncertain in ways that responsible clinical practice should acknowledge. The developing capacity for consent creates legitimate questions about irreversible interventions that can't be dismissed. And the legitimate decision-making authority belongs primarily to families and clinicians with genuine proximity to the specific child — not to legislatures making blanket determinations from a distance.</text:p>
      <text:p text:style-name="Text_20_body">The framework doesn't produce a simple pro or anti position. It produces a set of requirements — honest evidence, genuine informed consent, clinical rigor, protection of developing decision-making capacity — that current practice on both sides of the debate frequently fails to meet.</text:p>
      <text:p text:style-name="Text_20_body"><text:span text:style-name="Strong_20_Emphasis">The intervention spectrum through Principle 20's lens</text:span></text:p>
      <text:p text:style-name="Text_20_body">The principle has two conditions that trigger it. Insufficient evidence to reliably predict consequences. And consequences that may be irreversible or significantly harmful. Both conditions have to be present. Where neither is present the principle doesn't apply. Where both are present it applies with full force.</text:p>
      <text:p text:style-name="Text_20_body"><text:span text:style-name="Strong_20_Emphasis">Social transition</text:span></text:p>
      <text:p text:style-name="Text_20_body">Name, pronouns, clothing, presentation.</text:p>
      <text:p text:style-name="Text_20_body">Irreversibility — none. A child who socially transitions and later desists returns to previous presentation without permanent consequence.</text:p>
      <text:p text:style-name="Text_20_body">Evidence — the research on social transition shows meaningful wellbeing benefits and documents no harm from reversibility in children who desist.</text:p>
      <text:p text:style-name="Text_20_body">Principle 20 doesn't apply here. Neither condition is met. The framework supports parental and child authority over social transition without qualification.</text:p>
      <text:p text:style-name="Text_20_body"><text:span text:style-name="Strong_20_Emphasis">Puberty blockers</text:span></text:p>
      <text:p text:style-name="Text_20_body">This is where Principle 20 first meaningfully engages.</text:p>
      <text:p text:style-name="Text_20_body">Irreversibility — presented clinically as reversible but the evidence is more contested than standard framing acknowledges. Bone density effects are documented. Neurological development questions are incompletely answered. Perhaps most significantly — the vast majority of children who begin puberty blockers proceed to cross-sex hormones, which raises the question of whether blockers are genuinely buying time for decision-making or foreclosing the natural development that would have informed that decision.</text:p>
      <text:p text:style-name="Text_20_body">Evidence — insufficient for confident long term predictions. The studies are methodologically limited. Follow-up periods are short relative to the lifetime consequences being considered.</text:p>
      <text:p text:style-name="Text_20_body"><text:soft-page-break/>Both conditions are partially met. Principle 20 produces — not prohibition, but genuine informed consent that honestly represents the uncertainty. Current clinical practice in many contexts presents puberty blockers as clearly safe and fully reversible. The principle says that presentation is not honest given what the evidence actually shows.</text:p>
      <text:p text:style-name="Text_20_body">The default toward preserving options looks like — ensuring the child and family genuinely understand what is and isn't known, that the reversibility claim is qualified rather than absolute, and that the decision is made with clear eyes about genuine uncertainty rather than false confidence.</text:p>
      <text:p text:style-name="Text_20_body"><text:span text:style-name="Strong_20_Emphasis">Cross-sex hormones</text:span></text:p>
      <text:p text:style-name="Text_20_body">Irreversibility — significant and documented. Fertility effects are real. Voice changes in transgender boys are permanent. Breast development in transgender girls is permanent. These are consequences a fourteen year old cannot fully anticipate in the way a twenty-five year old could.</text:p>
      <text:p text:style-name="Text_20_body">Evidence — meaningful short and medium term mental health benefits are documented. Long term evidence is genuinely limited. The full consequences across a lifetime are not reliably predictable with current knowledge.</text:p>
      <text:p text:style-name="Text_20_body">Both conditions are clearly met. Principle 20 applies with real force here.</text:p>
      <text:p text:style-name="Text_20_body">The default toward preserving options produces — a higher threshold of clinical assessment before proceeding. Genuine informed consent that includes fertility counseling and honest representation of permanent changes. Requirements for persistence and consistency of gender dysphoria over time before irreversible intervention. Not prohibition — but genuine rigor that current practice in many clinical contexts doesn't consistently meet.</text:p>
      <text:p text:style-name="Text_20_body">The principle also says something specific about the consent capacity question. A minor consenting to cross-sex hormones is consenting to consequences — particularly fertility — that they cannot fully appreciate at their current developmental stage. That's not a reason for absolute prohibition. It's a reason for ensuring the consent process involves people — parents, clinicians, counselors — who can help the minor genuinely engage with long term consequences rather than just immediate relief from dysphoria.</text:p>
      <text:p text:style-name="Text_20_body"><text:span text:style-name="Strong_20_Emphasis">Surgical intervention</text:span></text:p>
      <text:p text:style-name="Text_20_body">Irreversibility — maximum. By definition.</text:p>
      <text:p text:style-name="Text_20_body">Evidence — thinnest of all the intervention types specifically for minors. The long term outcome data for surgical intervention in minors is the most limited.</text:p>
      <text:p text:style-name="Text_20_body">Both conditions are met most strongly here. Principle 20 applies with maximum force.</text:p>
      <text:p text:style-name="Text_20_body">The default toward preserving options is clearest here. The burden of proof falls on irreversibility. What cannot be undone demands the highest threshold of certainty before it is done. That threshold is not currently met by the available evidence for surgical intervention in minors.</text:p>
      <text:p text:style-name="Text_20_body">The framework's position — not because transgender identity is invalid or because the minor's suffering isn't real, but because irreversible action under conditions of insufficient evidence is precisely what Principle 20 exists to address.</text:p>
      <text:p text:style-name="Text_20_body"><text:soft-page-break/><text:span text:style-name="Strong_20_Emphasis">What this produces overall</text:span></text:p>
      <text:p text:style-name="Text_20_body">A graduated response that maps directly onto the irreversibility and evidentiary uncertainty of each intervention type. Maximum support for social transition. Qualified support for puberty blockers contingent on genuine informed consent that honestly represents uncertainty. Higher threshold requirements for cross-sex hormones with robust assessment and consent processes. Significant caution about surgical intervention pending stronger long term evidence.</text:p>
      <text:p text:style-name="Text_20_body">That's not a transphobic position. It's not an affirmation-without-qualification position. It's what an honest application of a precautionary principle produces when applied to a spectrum of interventions with varying degrees of irreversibility and evidentiary support.</text:p>
      <text:p text:style-name="Standard"/>
      <text:p text:style-name="Standard"/>
      <text:p text:style-name="Standard">----------------------------------------------</text:p>
      <text:p text:style-name="Standard">Transgender women in female sports</text:p>
      <text:p text:style-name="Standard"/>
      <text:p text:style-name="Standard"/>
      <text:p text:style-name="Text_20_body"><text:span text:style-name="Strong_20_Emphasis">The frame analysis</text:span></text:p>
      <text:p text:style-name="Text_20_body">The debate is structured as — do you support transgender inclusion or do you want to exclude and harm transgender people. That framing makes a policy question about competitive fairness into a referendum on transgender dignity. Those are different questions and bundling them prevents honest engagement with either.</text:p>
      <text:p text:style-name="Text_20_body"><text:span text:style-name="Strong_20_Emphasis">What the question actually is</text:span></text:p>
      <text:p text:style-name="Text_20_body">It's not whether transgender women are women. That's the philosophical question we already addressed and left in genuine complexity.</text:p>
      <text:p text:style-name="Text_20_body">The sports question is narrower and more specific. It's whether transgender women who have undergone male puberty retain physiological advantages in athletic competition that are significant enough to compromise competitive fairness in female categories.</text:p>
      <text:p text:style-name="Text_20_body">That's an empirical question. And the empirical answer is fairly clear.</text:p>
      <text:p text:style-name="Text_20_body"><text:span text:style-name="Strong_20_Emphasis">What the evidence shows</text:span></text:p>
      <text:p text:style-name="Text_20_body">Male puberty produces physiological changes that are performance-relevant, significant in magnitude, and not fully reversed by hormone therapy within the timeframes typically required for eligibility.</text:p>
      <text:p text:style-name="Text_20_body">Lung capacity. Heart size. Bone density and structure. Muscle fiber composition. Height and limb length. These are the product of testosterone exposure during puberty and they produce measurable performance advantages in most athletic contexts.</text:p>
      <text:p text:style-name="Text_20_body">The research on what hormone therapy reverses and over what timeframe shows that some advantages diminish — muscle mass and strength move toward female ranges over one to two years of hormone therapy. Others persist — lung capacity, heart size, skeletal structure, height — because they reflect developmental changes from puberty that hormone therapy doesn't reverse.</text:p>
      <text:p text:style-name="Text_20_body"><text:soft-page-break/>The magnitude of the advantages varies by sport. In strength and power sports the advantages are larger and more persistent. In endurance sports the picture is more complex. But across most athletic categories the evidence shows meaningful residual advantage after hormone therapy.</text:p>
      <text:p text:style-name="Text_20_body"><text:span text:style-name="Strong_20_Emphasis">What the framework says</text:span></text:p>
      <text:p text:style-name="Text_20_body">Axiom I — follow the evidence wherever it leads regardless of which interest it serves. The evidence on physiological advantage is real and shouldn't be dismissed because the conclusion is uncomfortable for a position of full transgender inclusion.</text:p>
      <text:p text:style-name="Text_20_body">Principle 5 — Equal Standing. Female athletic categories exist precisely to ensure equal standing for female athletes — to create competitive space where the physiological differences between male and female athletic development don't determine outcomes. That's the purpose of sex-segregated sports. A policy that compromises that purpose undermines the equal standing it was designed to protect.</text:p>
      <text:p text:style-name="Text_20_body">Principle 1 — Fidelity to Evidence. Presenting the science as settled in the direction of full inclusion — as some advocacy organizations have done — is a failure of this principle. The evidence doesn't support that presentation.</text:p>
      <text:p text:style-name="Text_20_body"><text:span text:style-name="Strong_20_Emphasis">The dignity question</text:span></text:p>
      <text:p text:style-name="Text_20_body">Axiom II — the dignity of transgender women is inviolable and is not contingent on resolving this question.</text:p>
      <text:p text:style-name="Text_20_body">The framework holds both simultaneously. Transgender women deserve full dignity and genuine inclusion in social, civic, and public life. And the specific question of elite athletic competition involves physiological realities that the evidence documents and that competitive fairness requires acknowledging.</text:p>
      <text:p text:style-name="Text_20_body">Those aren't in conflict unless the debate forces them to be. A transgender woman excluded from the female category in elite athletic competition has not had her dignity violated. Her dignity is inviolable. Her eligibility for a specific competitive category is a separate question governed by different considerations.</text:p>
      <text:p text:style-name="Text_20_body"><text:span text:style-name="Strong_20_Emphasis">The honest conclusion</text:span></text:p>
      <text:p text:style-name="Text_20_body">The framework supports sex-segregated athletic categories as a legitimate protection of equal standing for female athletes. It supports eligibility policies that take the physiological evidence seriously rather than treating hormone therapy as a complete solution to performance advantages from male puberty. And it supports the development of inclusive competitive frameworks — open categories, transgender categories, age and weight based categories in relevant sports — that honor transgender dignity without compromising the competitive fairness that female categories exist to protect.</text:p>
      <text:p text:style-name="Text_20_body">What it doesn't support is the framing that any eligibility restriction is an attack on transgender identity. That framing conflates dignity with eligibility in a way that prevents honest engagement with what is actually a fairly tractable empirical question.</text:p>
      <text:p text:style-name="Standard"/>
      <text:p text:style-name="Text_20_body"><text:span text:style-name="Strong_20_Emphasis">Pre-pubescent transition</text:span></text:p>
      <text:p text:style-name="Text_20_body"><text:soft-page-break/>This is the case where the framework's core concern largely dissolves. If a transgender girl transitions before male puberty the physiological advantages the evidence documents — lung capacity, heart size, skeletal structure — never develop. The competitive fairness argument that applies to post-pubescent transition doesn't apply here in the same way.</text:p>
      <text:p text:style-name="Text_20_body">The framework's honest position is that blanket policies treating all transgender women identically regardless of transition history are not following the evidence. A transgender woman who never experienced male puberty is a genuinely different case from one who did. Eligibility policies that don't make that distinction are applying a blunt instrument to a situation that requires more precision.</text:p>
      <text:p text:style-name="Text_20_body"><text:span text:style-name="Strong_20_Emphasis">Elite versus recreational distinction</text:span></text:p>
      <text:p text:style-name="Text_20_body">The competitive fairness argument applies with full force at elite levels. At the margin of human athletic performance physiological differences of a few percent determine outcomes. A transgender woman with residual physiological advantages from male puberty competing at Olympic or professional level is competing in a context where those advantages are genuinely determinative.</text:p>
      <text:p text:style-name="Text_20_body">In recreational and community sports the framework's analysis shifts significantly. The purpose of recreational sport is participation, health, belonging, and community. The marginal physiological advantages that matter at elite levels are largely irrelevant in that context. Excluding transgender women from recreational sport on competitive fairness grounds is applying an argument from elite competition to a context where it doesn't belong.</text:p>
      <text:p text:style-name="Text_20_body">The framework supports inclusive policies in recreational sport and evidence-based eligibility policies in elite sport. Those aren't contradictory positions. They reflect the genuinely different purposes of different levels of competition.</text:p>
      <text:p text:style-name="Text_20_body"><text:span text:style-name="Strong_20_Emphasis">Verification and privacy</text:span></text:p>
      <text:p text:style-name="Text_20_body">Any eligibility policy requires some mechanism for determining who falls into which category. This is where the framework's commitments create real complications that the debate rarely acknowledges honestly.</text:p>
      <text:p text:style-name="Text_20_body">Verification mechanisms have historically been degrading, invasive, and applied in ways that humiliate all female athletes who don't conform to expected appearance — not just transgender athletes. Sex verification testing in elite sport has a genuinely ugly history of targeting women who look too masculine, disproportionately affecting Black and brown athletes, and producing public humiliation of people who are not transgender at all.</text:p>
      <text:p text:style-name="Text_20_body">Principle 4 — Sovereignty of the Person. Principle 5 — Equal Standing. Any verification mechanism has to be consistent with these principles. That means it cannot be applied in ways that are degrading, discriminatory in application, or that treat female athletes as suspects requiring proof of their sex.</text:p>
      <text:p text:style-name="Text_20_body">The framework supports eligibility policies grounded in documented transition history and medical records rather than invasive physical verification. That protects competitive fairness without reproducing the historical abuses of sex verification.</text:p>
      <text:p text:style-name="Text_20_body"><text:span text:style-name="Strong_20_Emphasis">What sports are actually for</text:span></text:p>
      <text:p text:style-name="Text_20_body"><text:soft-page-break/>This is the question that reframes everything and that neither side of the debate typically asks.</text:p>
      <text:p text:style-name="Text_20_body">The framework's answer starts from Principle 13 — flourishing as the measure. And Principle 14 — genuine community requires intention, structure, and ongoing care.</text:p>
      <text:p text:style-name="Text_20_body">Sport at its best serves genuine human flourishing. Physical development, community, the experience of striving and improving, the particular form of belonging that shared athletic endeavor produces. Those purposes are served by inclusion, participation, and the experience of genuine competition at whatever level is appropriate.</text:p>
      <text:p text:style-name="Text_20_body">The elite competitive framework — where physiological differences determine outcomes and exclusion is justified on fairness grounds — is a small subset of what sport actually is and does. Building the entire policy debate around that subset while ignoring what sport is for at the community level produces policies that serve competitive fairness at elite levels while causing real harm to transgender people's access to the genuine human goods that sport provides.</text:p>
      <text:p text:style-name="Text_20_body">The framework supports policies that protect competitive fairness where it genuinely matters — elite competition — while actively ensuring that transgender people have full access to sport's genuine human goods at every other level.</text:p>
      <text:p text:style-name="Text_20_body"><text:span text:style-name="Strong_20_Emphasis">The summary</text:span></text:p>
      <text:p text:style-name="Text_20_body">Pre-pubescent transition changes the physiological argument significantly and policies should reflect that distinction. Elite and recreational sport have different purposes that justify different eligibility approaches. Verification mechanisms must be consistent with dignity and equal standing rather than reproducing historical abuses. And the debate's focus on elite competitive fairness has obscured the more fundamental question of what sport is actually for and who gets access to its genuine human goods.</text:p>
      <text:p text:style-name="Text_20_body">Does that feel complete on sports?</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5:04:09.007072777</meta:creation-date>
    <meta:generator>LibreOffice/24.2.7.2$Linux_X86_64 LibreOffice_project/420$Build-2</meta:generator>
    <dc:date>2026-06-16T15:42:19.377412124</dc:date>
    <meta:editing-duration>PT22M58S</meta:editing-duration>
    <meta:editing-cycles>6</meta:editing-cycles>
    <meta:document-statistic meta:table-count="0" meta:image-count="0" meta:object-count="0" meta:page-count="10" meta:paragraph-count="127" meta:word-count="3945" meta:character-count="28243" meta:non-whitespace-character-count="24338"/>
  </office:meta>
</office:document-meta>
</file>