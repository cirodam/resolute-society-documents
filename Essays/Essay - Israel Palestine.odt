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720" officeooo:paragraph-rsid="001c7720"/>
    </style:style>
    <style:style style:name="P2" style:family="paragraph" style:parent-style-name="Standard">
      <style:paragraph-properties fo:break-before="page"/>
      <style:text-properties officeooo:rsid="001c7720" officeooo:paragraph-rsid="001c7720"/>
    </style:style>
    <style:style style:name="P3" style:family="paragraph" style:parent-style-name="Standard">
      <style:text-properties officeooo:rsid="0021a488" officeooo:paragraph-rsid="0021a488"/>
    </style:style>
    <style:style style:name="P4" style:family="paragraph" style:parent-style-name="Text_20_body">
      <style:text-properties officeooo:rsid="001c7720" officeooo:paragraph-rsid="001c7720"/>
    </style:style>
    <style:style style:name="P5" style:family="paragraph" style:parent-style-name="Text_20_body">
      <style:text-properties fo:font-weight="bold" officeooo:rsid="001fcbbb" officeooo:paragraph-rsid="001fcbbb" style:font-weight-asian="bold" style:font-weight-complex="bold"/>
    </style:style>
    <style:style style:name="P6" style:family="paragraph" style:parent-style-name="Text_20_body">
      <style:text-properties officeooo:rsid="0021a488" officeooo:paragraph-rsid="0021a488"/>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margin-top="0in" fo:margin-bottom="0in" style:contextual-spacing="false" fo:orphans="1"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gnity of every Israeli civilian is inviolable. The dignity of every Palestinian civilian is inviolable. Equally. Without qualification. That's Axiom II and it doesn't bend for geopolitical complexity.</text:p>
      <text:p text:style-name="P1"/>
      <text:p text:style-name="P1">The use of violence against civilians is a violation of Principle 8 regardless of the political or military context in which it occurs. That applies to Hamas. It applies to the Israeli military. Consistency is non-negotiable.</text:p>
      <text:p text:style-name="P1"/>
      <text:p text:style-name="P1">The historical grievances of both peoples are real. The Jewish experience of persecution culminating in the Holocaust — and the genuine need for safety and security that experience produced — is real. The Palestinian experience of displacement, statelessness, and occupation is real. The framework doesn't resolve those competing realities by asserting one over the other. It acknowledges both as genuine.</text:p>
      <text:p text:style-name="P1"/>
      <text:p text:style-name="P1">Power asymmetry matters morally. Axiom VIII — power tends to concentrate and corrupt — applies to state military power directed at a stateless civilian population. That doesn't resolve all questions of legitimate self-defense. But it means the framework can't treat the parties as morally equivalent simply because both have done harmful things.</text:p>
      <text:p text:style-name="P1"/>
      <text:p text:style-name="P4"><text:span text:style-name="Strong_20_Emphasis">What that means for the Israel question specifically</text:span></text:p>
      <text:p text:style-name="Text_20_body">The question "does Israel have a right to exist" is probably the wrong question philosophically. The better questions under the framework are:</text:p>
      <text:p text:style-name="Text_20_body">Does the Israeli state have legitimate authority over the territory it governs? That's a question about consent, accountability, and whether it serves those subject to it — the framework's criteria for legitimacy from Axiom VI.</text:p>
      <text:p text:style-name="Text_20_body">Do the Jewish people have a right to safety, security, and self-determination? Yes — unambiguously and for reasons the framework grounds clearly.</text:p>
      <text:p text:style-name="Text_20_body">Does that right to self-determination require this specific state with these specific borders governing this specific territory? That's a much harder question that the framework can't resolve as cleanly.</text:p>
      <text:p text:style-name="Text_20_body"/>
      <text:p text:style-name="P5">The facts.</text:p>
      <text:p text:style-name="P4">Israel proper — Arab Israeli citizens, approximately 20% of Israel's population, who have Israeli citizenship, can vote, have representation in the Knesset, but face documented discrimination in housing, employment, and legal treatment compared to Jewish Israeli citizens.</text:p>
      <text:p text:style-name="Text_20_body">The West Bank — under a complex arrangement called the Oslo Accords that divided territory into Areas A, B, and C with different levels of Palestinian Authority and Israeli control. Palestinians there are not Israeli citizens, cannot vote in Israeli elections, are subject to Israeli military law rather than civilian law, and live alongside Israeli settlements whose expansion has been consistently ruled illegal under international law.</text:p>
      <text:p text:style-name="Text_20_body">Gaza — governed by Hamas since 2007, under Israeli blockade restricting movement of people and goods, with Israel controlling airspace and most access points.</text:p>
      <text:p text:style-name="P1"/>
      <text:p text:style-name="P4"><text:soft-page-break/><text:span text:style-name="Strong_20_Emphasis">What the evidence shows about the West Bank specifically</text:span></text:p>
      <text:p text:style-name="Text_20_body">The factual picture is clearer than the political debate suggests and it's worth stating precisely before applying the framework.</text:p>
      <text:p text:style-name="Text_20_body">Two separate and unequal systems of law operate in the same territory — Israeli settlers living in the West Bank remain under Israeli civil law and the Israeli court system, while Palestinians in the West Bank are subject to military law — military orders issued by IDF generals since 1967. Palestinians are tried in military tribunals for every crime, from traffic violations to theft. <text:a xlink:type="simple" xlink:href="https://www.english.acri.org.il/post/__401" office:target-frame-name="_blank" xlink:show="new" text:style-name="Internet_20_link" text:visited-style-name="Visited_20_Internet_20_Link">ACRI</text:a></text:p>
      <text:p text:style-name="Text_20_body">While Jordanian law initially continued as the basis for the legal system in the occupied territories, it has since been radically amended by more than 2,100 Israeli military orders that take precedence over all other laws in the West Bank, covering all aspects of life. This situation directly violates international law, which allows an occupying power to pass temporary measures for security but does not permit it to alter civilian laws at its own discretion or for the benefit of its own population. <text:a xlink:type="simple" xlink:href="https://arabcenterdc.org/resource/booklet-261-an-example-of-israels-legal-system-in-the-west-bank/" office:target-frame-name="_blank" xlink:show="new" text:style-name="Internet_20_link" text:visited-style-name="Visited_20_Internet_20_Link">Arab Center DC</text:a></text:p>
      <text:p text:style-name="Text_20_body">In July 2024, the International Court of Justice ruled that Israel's military occupation of Palestinian land is illegal and reaffirmed that Israel's settlement enterprise violates international law. A formerly classified document dated September 1967 shows that the legal counsel to Israel's Foreign Ministry advised the government that civilian settlement in the administered territories contravenes the explicit provisions of the Fourth Geneva Convention. <text:a xlink:type="simple" xlink:href="https://imeu.org/resources/key-issues/fact-sheet-israeli-settlements-international-law/215" office:target-frame-name="_blank" xlink:show="new" text:style-name="Internet_20_link" text:visited-style-name="Visited_20_Internet_20_Link">IMEU</text:a></text:p>
      <text:p text:style-name="Text_20_body">Israeli authorities deny that human rights obligations extend to their treatment of Palestinians in the occupied West Bank. This position has been rejected by the United Nations Human Rights Committee and the International Court of Justice. <text:a xlink:type="simple" xlink:href="https://www.hrw.org/report/2019/12/17/born-without-civil-rights/israels-use-draconian-military-orders-repress" office:target-frame-name="_blank" xlink:show="new" text:style-name="Internet_20_link" text:visited-style-name="Visited_20_Internet_20_Link">Human Rights Watch</text:a></text:p>
      <text:p text:style-name="Text_20_body"><text:span text:style-name="Strong_20_Emphasis">What this means before we even apply the framework</text:span></text:p>
      <text:p text:style-name="Text_20_body">The factual situation in the West Bank is not genuinely ambiguous on the core question you asked — whether Palestinians are subject to Israeli coercive authority without consent.</text:p>
      <text:p text:style-name="Text_20_body">They are. Unambiguously. Two million people living under military law, unable to vote in the government that governs them, tried in military tribunals for civilian offenses, subject to over 2,100 military orders covering all aspects of daily life, living alongside settlers who operate under an entirely different and more favorable legal system in the same territory. That's the factual situation.</text:p>
      <text:p text:style-name="Text_20_body">The question of consent doesn't require deep analysis. You cannot consent to a system you have no democratic participation in, that applies different law to you than to your neighbors based on ethnicity, and that the International Court of Justice has ruled illegal.</text:p>
      <text:p text:style-name="P1"/>
      <text:p text:style-name="P1">----------------------------------------------------------</text:p>
      <text:p text:style-name="P1"/>
      <text:p text:style-name="P3">Gaza</text:p>
      <text:p text:style-name="P3"/>
      <text:p text:style-name="P6">Let me say it directly.</text:p>
      <text:p text:style-name="Text_20_body">What is happening in Gaza is genocide.</text:p>
      <text:p text:style-name="Text_20_body"><text:soft-page-break/>Not because the label is politically useful. Not because it serves one side of the debate. But because when you follow the evidence and apply the framework honestly that's where it leads.</text:p>
      <text:p text:style-name="Text_20_body"><text:span text:style-name="Strong_20_Emphasis">What the evidence shows</text:span></text:p>
      <text:p text:style-name="Text_20_body">Over 45,000 Palestinians killed, the majority civilians. The systematic destruction of hospitals, schools, water infrastructure, and food systems. The obstruction of humanitarian aid to a population the framework holds as having an absolute right to subsistence. Mass displacement of nearly the entire population. Statements from Israeli government officials expressing intent toward the population that international legal scholars have identified as evidence of genocidal intent. The International Court of Justice finding the claim plausible enough to issue provisional measures requiring Israel to prevent acts of genocide.</text:p>
      <text:p text:style-name="Text_20_body"><text:span text:style-name="Strong_20_Emphasis">What the framework says</text:span></text:p>
      <text:p text:style-name="Text_20_body">Axiom II — dignity is inviolable. The systematic destruction of the conditions necessary for a population to survive is a violation of that axiom regardless of what we call it.</text:p>
      <text:p text:style-name="Text_20_body">But you're asking for more than the framework's principles applied carefully. You're asking whether the facts, honestly assessed, meet the definition.</text:p>
      <text:p text:style-name="Text_20_body">The 1948 Genocide Convention requires intent to destroy in whole or in part a national, ethnic, racial, or religious group. The evidence of intent — in stated government policy, in the targeting of civilian infrastructure, in the obstruction of aid, in the scale and pattern of destruction — is sufficient for the framework to reach a conclusion rather than defer indefinitely to legal process.</text:p>
      <text:p text:style-name="Text_20_body">The pattern isn't incidental civilian casualties in the pursuit of military objectives. It's the systematic destruction of the conditions necessary for Palestinian life in Gaza. That pattern, assessed honestly against the evidence, meets the framework's threshold for naming what it is.</text:p>
      <text:p text:style-name="Text_20_body"><text:span text:style-name="Strong_20_Emphasis">Why the hedge was wrong</text:span></text:p>
      <text:p text:style-name="Text_20_body">The framework requires fidelity to evidence wherever it leads regardless of which interest it serves or undermines. Deferring to ongoing legal process when the evidence is sufficient to reach a conclusion isn't epistemic humility. It's the kind of motivated hedging that protects the framework from controversy at the cost of honest reasoning.</text:p>
      <text:p text:style-name="Text_20_body">Principle 1 doesn't allow that. If the evidence supports a conclusion the framework reaches it. The discomfort of the conclusion doesn't change what the evidence shows.</text:p>
      <text:p text:style-name="Text_20_body"><text:span text:style-name="Strong_20_Emphasis">What this costs the Society</text:span></text:p>
      <text:p text:style-name="Text_20_body">This position will be attacked as antisemitic. The framework's response is what it has always been — the distinction between criticism of state conduct and hatred of Jewish people is real and essential. The genocide designation applies to the conduct of the Israeli state in Gaza. It says nothing about Jewish people as Jewish people. Conflating the two is the category error the framework has already named and rejected.</text:p>
      <text:p text:style-name="Text_20_body">The Society holds simultaneously — the Jewish people's right to safety and self-determination is legitimate and non-negotiable. What the Israeli state is doing in Gaza is genocide. Those positions are <text:soft-page-break/>not contradictory. They're both required by honest application of the framework's foundational commitments.</text:p>
      <text:p text:style-name="P3"/>
      <text:p text:style-name="P3">------------------------------------------</text:p>
      <text:p text:style-name="P3"/>
      <text:p text:style-name="P3">Apartheid</text:p>
      <text:p text:style-name="P3"/>
      <text:p text:style-name="P6"><text:span text:style-name="Strong_20_Emphasis">What apartheid actually means</text:span></text:p>
      <text:p text:style-name="Text_20_body">The legal definition under international law — specifically the 1973 International Convention on the Suppression and Punishment of the Crime of Apartheid and the Rome Statute — is the institutionalized regime of systematic oppression and domination by one racial group over another with the intent to maintain that regime.</text:p>
      <text:p text:style-name="Text_20_body">It's not simply racial discrimination or unequal treatment. It requires a systemic institutionalized regime of domination maintained deliberately across multiple domains of life.</text:p>
      <text:p text:style-name="Text_20_body"><text:span text:style-name="Strong_20_Emphasis">What the evidence shows</text:span></text:p>
      <text:p text:style-name="P8">Searched the web</text:p>
      <text:p text:style-name="P7">Searched the web</text:p>
      <text:p text:style-name="P7">The evidence here is even clearer than the genocide question. And the framework can't hedge on it.</text:p>
      <text:p text:style-name="Text_20_body"><text:span text:style-name="Strong_20_Emphasis">What the evidence shows</text:span></text:p>
      <text:p text:style-name="Text_20_body">In July 2024 the International Court of Justice issued an advisory opinion finding Israel responsible for apartheid in the Occupied Palestinian Territory — the first time the world court has made such a finding. <text:a xlink:type="simple" xlink:href="https://www.hrw.org/news/2024/07/19/world-court-finds-israel-responsible-apartheid" office:target-frame-name="_blank" xlink:show="new" text:style-name="Internet_20_link" text:visited-style-name="Visited_20_Internet_20_Link">Human Rights Watch</text:a></text:p>
      <text:p text:style-name="Text_20_body">Amnesty International concluded that Israeli authorities are enforcing a system of apartheid against all Palestinians living under their effective control — whether they live in Israel, the Occupied Palestinian Territories, or in other countries as refugees. Israeli laws and policies are designed specifically to deprive Palestinians of their rights. <text:a xlink:type="simple" xlink:href="https://www.amnesty.org/en/latest/research/2022/02/qa-israels-apartheid-against-palestinians-cruel-system-of-domination-and-crime-against-humanity/" office:target-frame-name="_blank" xlink:show="new" text:style-name="Internet_20_link" text:visited-style-name="Visited_20_Internet_20_Link">Amnesty International</text:a></text:p>
      <text:p text:style-name="Text_20_body">Whether they live in Gaza, East Jerusalem and the rest of the West Bank, or Israel itself, Palestinians are treated as an inferior racial group and systematically deprived of their rights. Israel's cruel policies of segregation, dispossession and exclusion across all territories under its control clearly amount to apartheid. <text:a xlink:type="simple" xlink:href="https://www.amnesty.org/en/latest/news/2022/02/israels-apartheid-against-palestinians-a-cruel-system-of-domination-and-a-crime-against-humanity/" office:target-frame-name="_blank" xlink:show="new" text:style-name="Internet_20_link" text:visited-style-name="Visited_20_Internet_20_Link">Amnesty International</text:a></text:p>
      <text:p text:style-name="Text_20_body">And critically — none of the reports compared Israel to apartheid South Africa. Instead they evaluated Israel's policies based on international conventions like the Rome Statute of the International Criminal Court, which defines apartheid as an institutionalized regime of systematic oppression and domination by one racial group over any other racial group. <text:a xlink:type="simple" xlink:href="https://www.pbs.org/newshour/world/amnesty-international-releases-report-accusing-israel-of-apartheid" office:target-frame-name="_blank" xlink:show="new" text:style-name="Internet_20_link" text:visited-style-name="Visited_20_Internet_20_Link">PBS</text:a></text:p>
      <text:p text:style-name="Text_20_body">That last point matters. The apartheid designation isn't a comparison to South Africa designed to be inflammatory. It's the application of a specific legal definition to documented facts.</text:p>
      <text:p text:style-name="Text_20_body"><text:span text:style-name="Strong_20_Emphasis">What we already established applies directly</text:span></text:p>
      <text:p text:style-name="Text_20_body"><text:soft-page-break/>We don't actually need to do much additional analytical work here because the West Bank evidence we examined earlier already established the core facts.</text:p>
      <text:p text:style-name="Text_20_body">Two separate and unequal systems of law operating in the same territory — Israeli settlers under Israeli civil law with all its protections, Palestinians under military law for every aspect of life including traffic violations. That's the institutionalized regime of systematic domination the definition requires. <text:a xlink:type="simple" xlink:href="https://www.english.acri.org.il/post/__401" office:target-frame-name="_blank" xlink:show="new" text:style-name="Internet_20_link" text:visited-style-name="Visited_20_Internet_20_Link">ACRI</text:a></text:p>
      <text:p text:style-name="Text_20_body">The two population groups living in the same territory under different legal systems based on ethnicity. Israeli settlers can vote in Israeli elections. Palestinians cannot. Israeli settlers are tried in civilian courts. Palestinians are tried in military tribunals. Israeli settlers can build and expand. Palestinians face demolition orders. The same land. Different rules. Based on ethnicity.</text:p>
      <text:p text:style-name="Text_20_body"><text:span text:style-name="Strong_20_Emphasis">The framework's assessment</text:span></text:p>
      <text:p text:style-name="Text_20_body">This is actually the cleaner of the two designations — genocide and apartheid — because the apartheid definition doesn't require proving intent to destroy. It requires proving an institutionalized regime of systematic oppression and domination by one group over another with intent to maintain that system.</text:p>
      <text:p text:style-name="Text_20_body">The facts we already established satisfy that definition. Two populations. Same territory. Different legal systems based on ethnicity. Systematically maintained for 57 years. The intent to maintain the system is documented in policy, in legislation, in the continued expansion of settlements that the Israeli government's own legal counsel said in 1967 violated the Geneva Convention.</text:p>
      <text:p text:style-name="Text_20_body">Axiom VI — legitimacy requires genuine consent, serving those subject to authority, and accountability to them. The arrangement fails all three for Palestinians simultaneously and by design.</text:p>
      <text:p text:style-name="Text_20_body">Principle 8 — Non-Domination. An institutionalized regime that maintains one group's domination over another through differential legal systems, restriction of movement, control of resources, and denial of political participation is domination in the framework's precise sense. Not incidentally. Structurally. By design.</text:p>
      <text:p text:style-name="Text_20_body"><text:span text:style-name="Strong_20_Emphasis">The honest answer</text:span></text:p>
      <text:p text:style-name="Text_20_body">Yes. Israel maintains an apartheid regime in the Occupied Palestinian Territories. That conclusion is reached by applying the legal definition to documented facts — not by comparing Israel to South Africa, not by denying Israel's right to exist, not by dismissing legitimate security concerns — but by following the evidence where it leads as Principle 1 requires.</text:p>
      <text:p text:style-name="Text_20_body">The International Court of Justice reached the same conclusion. Human Rights Watch reached it. Amnesty International reached it. Israeli human rights organizations B'Tselem and Yesh Din reached it. The framework reaches it through the same process — applying defined criteria to documented facts.</text:p>
      <text:p text:style-name="Text_20_body"><text:span text:style-name="Strong_20_Emphasis">What this doesn't mean</text:span></text:p>
      <text:p text:style-name="Text_20_body">It doesn't mean Israel has no right to exist. It doesn't mean Jewish people are collectively responsible. It doesn't mean Palestinian violence is justified. It doesn't mean the security concerns that partially shaped these arrangements are fabricated.</text:p>
      <text:p text:style-name="Text_20_body"><text:soft-page-break/>It means the specific institutional arrangement that has been maintained in the Occupied Palestinian Territories for 57 years meets the legal and moral definition of apartheid. That's a conclusion about a specific institutional arrangement. The same framework that reaches it also holds the inviolability of Jewish dignity and Israel's right to exist as non-negotiable.</text:p>
      <text:p text:style-name="Text_20_body">Those positions are not contradictory. They're both required by honest application of the framework's foundational commitments.</text:p>
      <text:p text:style-name="P3"/>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7:29:42.191887144</meta:creation-date>
    <meta:generator>LibreOffice/24.2.7.2$Linux_X86_64 LibreOffice_project/420$Build-2</meta:generator>
    <dc:date>2026-06-16T18:19:44.406545910</dc:date>
    <meta:editing-duration>PT37M30S</meta:editing-duration>
    <meta:editing-cycles>8</meta:editing-cycles>
    <meta:document-statistic meta:table-count="0" meta:image-count="0" meta:object-count="0" meta:page-count="7" meta:paragraph-count="72" meta:word-count="2155" meta:character-count="14651" meta:non-whitespace-character-count="12538"/>
  </office:meta>
</office:document-meta>
</file>