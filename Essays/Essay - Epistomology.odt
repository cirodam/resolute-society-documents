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19a54e" officeooo:paragraph-rsid="0019a54e"/>
    </style:style>
    <style:style style:name="P2" style:family="paragraph" style:parent-style-name="Standard">
      <style:text-properties officeooo:rsid="0019a54e" officeooo:paragraph-rsid="0019a54e"/>
    </style:style>
    <style:style style:name="P3" style:family="paragraph" style:parent-style-name="Text_20_body">
      <style:paragraph-properties fo:orphan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Epistemology is the branch of philosophy concerned with knowledge itself — what it is, how we get it, what its limits are, and how we can distinguish genuine k…</text:h>
      <text:p text:style-name="P3">Epistemology is the branch of philosophy concerned with knowledge itself — what it is, how we get it, what its limits are, and how we can distinguish genuine knowledge from belief, opinion, or error.</text:p>
      <text:p text:style-name="P3">The core questions are:</text:p>
      <text:p text:style-name="P3">— What does it mean to <text:span text:style-name="Emphasis">know</text:span> something, as opposed to merely believing it?<text:line-break/>— What justifies a belief — what makes it reasonable to hold?<text:line-break/>— What are the sources of knowledge — reason, experience, testimony, intuition?<text:line-break/>— What are the limits of what can be known?</text:p>
      <text:p text:style-name="P3">The classic definition of knowledge that philosophy has wrestled with since Plato is <text:span text:style-name="Emphasis">justified true belief</text:span> — you know something if it's true, you believe it, and you have good reason to believe it. That definition has problems that philosophers have been arguing about ever since, but it's a useful starting point because it separates three things that ordinary language runs together: whether something is actually true, whether you believe it, and whether you're entitled to believe it.</text:p>
      <text:p text:style-name="P3">That third piece — justification, or what entitles you to a belief — is where most of the practical work happens for your purposes. Because the epistemological crisis you're describing isn't really about people failing to believe true things. It's about people losing any shared standard for what <text:span text:style-name="Emphasis">entitles</text:span> you to a belief in the first place.</text:p>
      <text:p text:style-name="Standard"/>
      <text:p text:style-name="Standard">------------------------------------------------------</text:p>
      <text:p text:style-name="Standard"/>
      <text:p text:style-name="Text_20_body">The practical implication is important: <text:span text:style-name="Strong_20_Emphasis">the goal isn't certainty, it's calibration.</text:span> Being wrong isn't the failure. Being more confident than your evidence warrants — or less confident, when evidence is strong — that's the failure.</text:p>
      <text:p text:style-name="Text_20_body">Which leads to something that I think is foundational for what you're building. The enemy of good epistemology isn't ignorance. It's <text:span text:style-name="Strong_20_Emphasis">miscalibration</text:span> — and miscalibration almost always runs in the direction of overconfidence, especially when the belief is doing social or identity work.</text:p>
      <text:p text:style-name="Standard"/>
      <text:p text:style-name="Standard">--------------------------------------------------------</text:p>
      <text:p text:style-name="Standard"/>
      <text:p text:style-name="Text_20_body">Every claim you encounter sits somewhere on a confidence spectrum. Your job isn't to sort claims into true and false. It's to ask: <text:span text:style-name="Strong_20_Emphasis">how confident should I be in this, given what I can actually evaluate?</text:span></text:p>
      <text:p text:style-name="Text_20_body">And there are a small number of questions that do most of the work:</text:p>
      <text:p text:style-name="Text_20_body"><text:span text:style-name="Strong_20_Emphasis">What's the evidence?</text:span><text:line-break/>Not "does evidence exist" — anyone can produce something that looks like evidence. But what kind of evidence, how much of it, how independently gathered, how consistently replicated.</text:p>
      <text:p text:style-name="Text_20_body"><text:soft-page-break/><text:span text:style-name="Strong_20_Emphasis">What are the competing explanations?</text:span><text:line-break/>A single piece of evidence that fits your conclusion also fits other conclusions. The question is whether your explanation fits better than the alternatives — not just whether it fits at all.</text:p>
      <text:p text:style-name="Text_20_body"><text:span text:style-name="Strong_20_Emphasis">What would change my mind?</text:span><text:line-break/>This is the most important question and the most revealing. If you can't answer it — if there's nothing that could in principle lower your confidence — that's not a belief anymore. That's a commitment. And commitments masquerading as beliefs are where the epistemological crisis actually lives.</text:p>
      <text:p text:style-name="Text_20_body"><text:span text:style-name="Strong_20_Emphasis">Who benefits from me believing this?</text:span><text:line-break/>Not a trump card — sometimes true things are promoted by people with interests. But a consistent question about incentive structures cuts through a lot of noise very quickly.</text:p>
      <text:p text:style-name="Text_20_body"><text:span text:style-name="Strong_20_Emphasis">How did this make me feel before I evaluated it?</text:span><text:line-break/>Strong emotion before evaluation is a signal, not a conclusion. It means slow down, not that the claim is false.</text:p>
      <text:p text:style-name="Standard"/>
      <text:p text:style-name="P2">---------------------------------------------------------</text:p>
      <text:p text:style-name="P2"/>
      <text:h text:style-name="P1" text:outline-level="2">Claude responded: Agnosticism fits perfectly — it's actually what the calibrated confidence framework demands in certain conditions.</text:h>
      <text:p text:style-name="P3">Agnosticism fits perfectly — it's actually what the calibrated confidence framework demands in certain conditions.</text:p>
      <text:p text:style-name="P3">If your confidence in a claim is supposed to be proportional to your evidence, then when evidence is genuinely insufficient, the honest position isn't belief or disbelief. It's suspension of judgment. Agnosticism isn't weakness or evasion — it's the <text:span text:style-name="Emphasis">correct</text:span> epistemic response to genuine uncertainty.</text:p>
      <text:p text:style-name="P3">Most people treat agnosticism as a failure to commit. But it's actually the most rigorous position available when evidence doesn't warrant confidence in either direction. Forcing a binary when the evidence gives you a probability distribution is itself a form of miscalibration.</text:p>
      <text:p text:style-name="P3">The humility piece is where it gets deeper though.</text:p>
      <text:p text:style-name="P3">Humility in this framework isn't about being meek or deferential. It's about accurate self-assessment of your own epistemic position. Specifically:</text:p>
      <text:p text:style-name="P3"><text:span text:style-name="Strong_20_Emphasis">You are a limited perceiver.</text:span> Your senses, your attention, your memory, your reasoning — all of these have known failure modes. You are not a neutral receiver of reality. You are a particular person with a particular history, particular blindspots, particular emotional triggers that distort evaluation.</text:p>
      <text:p text:style-name="P3"><text:span text:style-name="Strong_20_Emphasis">Your confidence is not evidence.</text:span> Feeling certain about something tells you about your psychology, not about the claim. Certainty is an emotional state. It correlates with truth only loosely and unreliably.</text:p>
      <text:p text:style-name="P3"><text:span text:style-name="Strong_20_Emphasis">Your community shapes what feels obvious.</text:span> The things that seem self-evident to you are partly a <text:soft-page-break/>function of who you grew up around, what you were rewarded for believing, what your social world takes for granted. This doesn't make those beliefs false. But it means you didn't arrive at them purely through independent evaluation, and you should hold them with awareness of that.</text:p>
      <text:p text:style-name="P3"><text:span text:style-name="Strong_20_Emphasis">Past you was wrong about things present you knows better.</text:span> This is perhaps the most grounding form of epistemic humility — you have direct personal evidence that your confident beliefs can be mistaken, because you've held confident beliefs before that you've since revised. That should inform how you hold your current confident beliefs.</text:p>
      <text:p text:style-name="P3">So humility isn't a softening of the framework. It's load-bearing within it. Without humility the calibration question becomes dishonest — you'll claim to be calibrating to evidence while actually calibrating to comfort.</text:p>
      <text:p text:style-name="P2"/>
      <text:p text:style-name="P2">---------------------------------------------------------</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7T10:05:05.407512266</meta:creation-date>
    <dc:date>2026-06-17T10:31:48.876037773</dc:date>
    <meta:editing-duration>PT15M57S</meta:editing-duration>
    <meta:editing-cycles>2</meta:editing-cycles>
    <meta:generator>LibreOffice/24.2.7.2$Linux_X86_64 LibreOffice_project/420$Build-2</meta:generator>
    <meta:document-statistic meta:table-count="0" meta:image-count="0" meta:object-count="0" meta:page-count="3" meta:paragraph-count="30" meta:word-count="915" meta:character-count="6061" meta:non-whitespace-character-count="5151"/>
  </office:meta>
</office:document-meta>
</file>