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87510"/>
    </style:style>
    <style:style style:name="P2" style:family="paragraph" style:parent-style-name="Text_20_body">
      <style:text-properties officeooo:paragraph-rsid="001886a8"/>
    </style:style>
    <style:style style:name="P3" style:family="paragraph" style:parent-style-name="Text_20_body">
      <style:text-properties officeooo:paragraph-rsid="0018c86c"/>
    </style:style>
    <style:style style:name="P4" style:family="paragraph" style:parent-style-name="Text_20_body">
      <style:text-properties officeooo:paragraph-rsid="001bebcd"/>
    </style:style>
    <style:style style:name="P5" style:family="paragraph" style:parent-style-name="Text_20_body">
      <style:text-properties officeooo:paragraph-rsid="001da642"/>
    </style:style>
    <style:style style:name="P6" style:family="paragraph" style:parent-style-name="Text_20_body">
      <style:text-properties officeooo:paragraph-rsid="001e9e34"/>
    </style:style>
    <style:style style:name="P7" style:family="paragraph" style:parent-style-name="Text_20_body">
      <style:text-properties officeooo:paragraph-rsid="00224df3"/>
    </style:style>
    <style:style style:name="P8" style:family="paragraph" style:parent-style-name="Text_20_body">
      <style:text-properties officeooo:paragraph-rsid="00232a6c"/>
    </style:style>
    <style:style style:name="T1" style:family="text">
      <style:text-properties fo:font-weight="normal" style:font-weight-asian="normal" style:font-weight-complex="normal"/>
    </style:style>
    <style:style style:name="T2" style:family="text">
      <style:text-properties fo:font-weight="normal" officeooo:rsid="00187510" style:font-weight-asian="normal" style:font-weight-complex="normal"/>
    </style:style>
    <style:style style:name="T3" style:family="text">
      <style:text-properties fo:font-weight="normal" officeooo:rsid="001886a8" style:font-weight-asian="normal" style:font-weight-complex="normal"/>
    </style:style>
    <style:style style:name="T4" style:family="text">
      <style:text-properties fo:font-weight="normal" officeooo:rsid="0018c86c" style:font-weight-asian="normal" style:font-weight-complex="normal"/>
    </style:style>
    <style:style style:name="T5" style:family="text">
      <style:text-properties fo:font-weight="normal" officeooo:rsid="001bebcd" style:font-weight-asian="normal" style:font-weight-complex="normal"/>
    </style:style>
    <style:style style:name="T6" style:family="text">
      <style:text-properties fo:font-weight="normal" officeooo:rsid="001da642" style:font-weight-asian="normal" style:font-weight-complex="normal"/>
    </style:style>
    <style:style style:name="T7" style:family="text">
      <style:text-properties fo:font-weight="normal" officeooo:rsid="001e9e34" style:font-weight-asian="normal" style:font-weight-complex="normal"/>
    </style:style>
    <style:style style:name="T8" style:family="text">
      <style:text-properties fo:font-weight="normal" officeooo:rsid="00224df3" style:font-weight-asian="normal" style:font-weight-complex="normal"/>
    </style:style>
    <style:style style:name="T9" style:family="text">
      <style:text-properties fo:font-weight="normal" officeooo:rsid="00232a6c" style:font-weight-asian="normal" style:font-weight-complex="normal"/>
    </style:style>
    <style:style style:name="T10" style:family="text">
      <style:text-properties officeooo:rsid="001886a8"/>
    </style:style>
    <style:style style:name="T11" style:family="text">
      <style:text-properties officeooo:rsid="0018c8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The question of when morally significant human life begins is genuinely unresolved. It is not unresolved because people haven't thought hard enough — it is unresolved because it is genuinely difficult and because the answer depends on philosophical commitments about the nature of person hood that are themselves contested.</text:span></text:span></text:p>
      <text:p text:style-name="P1"><text:span text:style-name="Strong_20_Emphasis"><text:span text:style-name="T2">The question of when morally significant life begins, and therefore whether abortion is morally acceptable in any given circumstance, is one that genuine inquiry has not resolved and may not be resolvable through evidence alone. That is not relativism — it is honesty about the limits of what is currently knowable.</text:span></text:span></text:p>
      <text:p text:style-name="P1"><text:span text:style-name="Strong_20_Emphasis"><text:span text:style-name="T2">---------------------------------------</text:span></text:span></text:p>
      <text:p text:style-name="P1"><text:span text:style-name="Strong_20_Emphasis"><text:span text:style-name="T2">Assuming that the fetus is a person</text:span></text:span></text:p>
      <text:p text:style-name="P1"><text:span text:style-name="Strong_20_Emphasis"><text:span text:style-name="T2"/></text:span></text:p>
      <text:p text:style-name="P1"><text:span text:style-name="Strong_20_Emphasis"><text:span text:style-name="T2">The fetus's right to life is real. The mother's right to life and bodily sovereignty is real. These are both legitimate claims derived from the same foundational commitment to dignity.</text:span></text:span></text:p>
      <text:p text:style-name="P1"><text:span text:style-name="Strong_20_Emphasis"><text:span text:style-name="T2">This is a moral tragedy. The rights are in conflict and you cannot fully honor both.</text:span></text:span></text:p>
      <text:p text:style-name="P1"><text:span text:style-name="Strong_20_Emphasis"><text:span text:style-name="T2">A moral tragedy is a situation in which genuine values — both legitimate, both derived from the same foundational commitments — are in irreconcilable conflict such that no available choice fully honors all of what matters.</text:span></text:span></text:p>
      <text:p text:style-name="P1"><text:span text:style-name="Strong_20_Emphasis"><text:span text:style-name="T2">there simply is no objectively right answer here, but someone has to make the decision. Each option is both right and wrong simultaneously. what right do we have to judge the decision they made</text:span></text:span></text:p>
      <text:p text:style-name="P1"><text:span text:style-name="Strong_20_Emphasis"><text:span text:style-name="T2"/></text:span></text:p>
      <text:p text:style-name="P1"><text:span text:style-name="Strong_20_Emphasis"><text:span text:style-name="T2">----------------------------------------</text:span></text:span></text:p>
      <text:p text:style-name="P2"><text:span text:style-name="Strong_20_Emphasis"><text:span text:style-name="T3">What about the interest of the father</text:span></text:span></text:p>
      <text:p text:style-name="P2"><text:span text:style-name="Strong_20_Emphasis"><text:span text:style-name="T3"/></text:span></text:p>
      <text:p text:style-name="P2"><text:span text:style-name="Strong_20_Emphasis"><text:span text:style-name="T3">He has an interest in the outcome. He does not have a claim on the process by which the outcome is reached — because that process happens inside another person's body.</text:span></text:span></text:p>
      <text:p text:style-name="P2"><text:span text:style-name="Strong_20_Emphasis"><text:span text:style-name="T3">The father's interest is real. The mother's bodily sovereignty is also real. But only one of them is being asked to bear the physical cost of the tragedy. Only one of them carries the pregnancy, faces the medical risk, sustains the biological burden, and lives inside the particular facts of the situation in the way Principle 6 requires for legitimate judgment.</text:span></text:span></text:p>
      <text:p text:style-name="P2"><text:span text:style-name="Strong_20_Emphasis"><text:span text:style-name="T3">Both parents created the situation. Only one parent is the situation</text:span></text:span></text:p>
      <text:p text:style-name="P2"><text:span text:style-name="Strong_20_Emphasis"><text:span text:style-name="T10">What the framework says the father is owed</text:span></text:span></text:p>
      <text:p text:style-name="Text_20_body">Genuine participation in deliberation. His voice, his perspective, his stake in the outcome — these deserve to be heard and taken seriously in the decision-making process. Principle 3 applies within the relationship as much as anywhere else.</text:p>
      <text:p text:style-name="Text_20_body"><text:soft-page-break/>What he isn't owed is veto power. Because veto power would require imposing a specific physical obligation on another person's body without their consent</text:p>
      <text:p text:style-name="P2"><text:span text:style-name="Strong_20_Emphasis"><text:span text:style-name="T10">The hardest case</text:span></text:span></text:p>
      <text:p text:style-name="Text_20_body">The hardest version of this counter is the father who desperately wants the child, whose values hold that a person exists from fertilization, and who has no mechanism to prevent the termination of what he understands to be his child. That is also a moral tragedy. His loss is real. His grief is legitimate. The framework doesn't dissolve that — it names it honestly.</text:p>
      <text:p text:style-name="Text_20_body">But his tragedy doesn't generate a right to impose a decision on another person's body. It generates a claim on the community's compassion and support. Those are different things.</text:p>
      <text:p text:style-name="P2"><text:span text:style-name="Strong_20_Emphasis"><text:span text:style-name="T3"/></text:span></text:p>
      <text:p text:style-name="P2"><text:span text:style-name="Strong_20_Emphasis"><text:span text:style-name="T3">----------------------------------------------</text:span></text:span></text:p>
      <text:p text:style-name="P3"><text:span text:style-name="Strong_20_Emphasis"><text:span text:style-name="T4">If the mother’s life is possibly in danger</text:span></text:span></text:p>
      <text:p text:style-name="P3"><text:span text:style-name="Strong_20_Emphasis"><text:span text:style-name="T4"/></text:span></text:p>
      <text:p text:style-name="P3"><text:span text:style-name="Strong_20_Emphasis"><text:span text:style-name="T4">When a mother's life is in danger the moral tragedy of the earlier analysis partially resolves — not cleanly, not without grief, but with greater clarity about what dignity requires. The life already present, already a full member of the human community, facing imminent death, takes precedence. That conclusion follows from the same foundational commitments that take fetal personhood seriously in the first place.</text:span></text:span></text:p>
      <text:p text:style-name="P3"><text:span text:style-name="Strong_20_Emphasis"><text:span text:style-name="T4">This is actually a different philosophical category. The Greeks had a word adjacent to it — </text:span></text:span><text:span text:style-name="Strong_20_Emphasis"><text:span text:style-name="T11">anangke</text:span></text:span><text:span text:style-name="Strong_20_Emphasis"><text:span text:style-name="T4"> — necessity. The thing that must be done regardless of what it costs. Necessity isn't the same as tragedy because it has a resolution. But it carries its own particular weight — the weight of being required to do something genuinely terrible in order to prevent something worse.</text:span></text:span></text:p>
      <text:p text:style-name="P3"><text:span text:style-name="Strong_20_Emphasis"><text:span text:style-name="T4">When it isn't definitively clear that the mother's life is in danger we are in a situation of genuine medical and moral uncertainty. The framework's response to that uncertainty is consistent throughout — the legitimacy of external judgment diminishes precisely as the particularity and complexity of the situation increases. Here both are at their maximum.</text:span></text:span></text:p>
      <text:p text:style-name="Text_20_body">The physician and the patient, together, are the only legitimate decision-makers. Not because the question doesn't matter. Because they are the only ones who can actually see it.</text:p>
      <text:p text:style-name="P3"><text:span text:style-name="Strong_20_Emphasis"><text:span text:style-name="T4"/></text:span></text:p>
      <text:p text:style-name="P3"><text:span text:style-name="Strong_20_Emphasis"><text:span text:style-name="T4">--------------------------------------------------</text:span></text:span></text:p>
      <text:p text:style-name="P4"><text:span text:style-name="Strong_20_Emphasis"><text:span text:style-name="T5">Cases of rape</text:span></text:span></text:p>
      <text:p text:style-name="P4"><text:span text:style-name="Strong_20_Emphasis"><text:span text:style-name="T5"/></text:span></text:p>
      <text:p text:style-name="P4"><text:span text:style-name="Strong_20_Emphasis"><text:span text:style-name="T5">Requiring a rape victim to continue a pregnancy is requiring her to bear — in her own body, for nine months, with all the physical and psychological consequences that entails — the ongoing material cost of a crime committed against her. That requirement cannot be derived from any coherent account of </text:span></text:span><text:soft-page-break/><text:span text:style-name="Strong_20_Emphasis"><text:span text:style-name="T5">dignity. It compounds violation with obligation. It makes the victim responsible for the consequences of what was done to her.</text:span></text:span></text:p>
      <text:p text:style-name="P4"><text:span text:style-name="Strong_20_Emphasis"><text:span text:style-name="T5">The fetus's lack of culpability establishes that termination isn't punishment. It doesn't establish that continuation can be compelled.</text:span></text:span></text:p>
      <text:p text:style-name="P4"><text:span text:style-name="Strong_20_Emphasis"><text:span text:style-name="T5">The argument from fetal innocence doesn't dissolve the tragedy — it deepens it. Because now we have established that both parties are innocent. The fetus didn't choose to exist. The mother didn't choose the violation that created the situation. A third party — who bears all the actual culpability — is absent from the consequences entirely.</text:span></text:span></text:p>
      <text:p text:style-name="P4"><text:span text:style-name="Strong_20_Emphasis"><text:span text:style-name="T5"/></text:span></text:p>
      <text:p text:style-name="P4"><text:span text:style-name="Strong_20_Emphasis"><text:span text:style-name="T5">------------------------------------------------------</text:span></text:span></text:p>
      <text:p text:style-name="P5"><text:span text:style-name="Strong_20_Emphasis"><text:span text:style-name="T6">Incest</text:span></text:span></text:p>
      <text:p text:style-name="P5"><text:span text:style-name="Strong_20_Emphasis"><text:span text:style-name="T6"/></text:span></text:p>
      <text:p text:style-name="P5"><text:span text:style-name="Strong_20_Emphasis"><text:span text:style-name="T6">The case for incest is similar to rape but compounded. The original violation is often deeper because it involves betrayal of a protective relationship. The medical reality adds a dimension of potential suffering that doesn't exist in other cases. The tragedy is real, imposed, and falls entirely on people who bear no culpability for it.</text:span></text:span></text:p>
      <text:p text:style-name="Text_20_body">The framework's conclusion is the same. External judgment is illegitimate. The community's obligation is support, not determination.</text:p>
      <text:p text:style-name="P5"><text:span text:style-name="Strong_20_Emphasis"><text:span text:style-name="T6"/></text:span></text:p>
      <text:p text:style-name="P5"><text:span text:style-name="Strong_20_Emphasis"><text:span text:style-name="T6">---------------------------------------------------------</text:span></text:span></text:p>
      <text:p text:style-name="P5"><text:span text:style-name="Strong_20_Emphasis"><text:span text:style-name="T6">Nonviable pregnancy</text:span></text:span></text:p>
      <text:p text:style-name="P5"><text:span text:style-name="Strong_20_Emphasis"><text:span text:style-name="T6"/></text:span></text:p>
      <text:p text:style-name="P5"><text:span text:style-name="Strong_20_Emphasis"><text:span text:style-name="T6">On one side — the mother's bodily sovereignty, her physical health, her psychological wellbeing, her medical reality, her grief, her particular circumstances. All of these are real. All of these are grounded in dignity.</text:span></text:span></text:p>
      <text:p text:style-name="Text_20_body">On the other side — what exactly? The biological process continuing to its inevitable conclusion. Not a life that will be saved. Not a dignity that will be honored. The process itself.</text:p>
      <text:p text:style-name="Text_20_body">Requiring continuation in this circumstance doesn't protect a life. It can't — there is no life to protect. It requires a person to continue bearing the full physical and psychological cost of a pregnancy that will not produce a living child, for no purpose that the framework can identify as legitimate.</text:p>
      <text:p text:style-name="P5"><text:span text:style-name="Strong_20_Emphasis"><text:span text:style-name="T6"/></text:span></text:p>
      <text:p text:style-name="P5"><text:span text:style-name="Strong_20_Emphasis"><text:span text:style-name="T6">-----------------------------------------------------------</text:span></text:span></text:p>
      <text:p text:style-name="P6"><text:span text:style-name="Strong_20_Emphasis"><text:span text:style-name="T7">Legislatures</text:span></text:span></text:p>
      <text:p text:style-name="P6"><text:span text:style-name="Strong_20_Emphasis"><text:span text:style-name="T7"/></text:span></text:p>
      <text:p text:style-name="P6"><text:soft-page-break/><text:span text:style-name="Strong_20_Emphasis"><text:span text:style-name="T7">Thirteen states currently have total bans on abortion, and five have restricted abortion after six weeks of gestation. Since Dobbs, abortion policy has been set primarily at the state level, producing a patchwork system in which abortion legality depends largely on where a person lives.</text:span></text:span></text:p>
      <text:p text:style-name="P6"><text:span text:style-name="Strong_20_Emphasis"><text:span text:style-name="T7"/></text:span></text:p>
      <text:p text:style-name="P6"><text:span text:style-name="Strong_20_Emphasis"><text:span text:style-name="T7">-------------------------------------------------------------</text:span></text:span></text:p>
      <text:p text:style-name="P6"><text:span text:style-name="Strong_20_Emphasis"><text:span text:style-name="T7">Fetal Heartbeats</text:span></text:span></text:p>
      <text:p text:style-name="P6"><text:span text:style-name="Strong_20_Emphasis"><text:span text:style-name="T7"/></text:span></text:p>
      <text:p text:style-name="P6"><text:span text:style-name="Strong_20_Emphasis"><text:span text:style-name="T7">There is no heart at six weeks. There is no cardiac organ. What exists is a cluster of electrically active cells that will eventually differentiate into cardiac tissue. Those cells produce electrical impulses that, when detected by ultrasound equipment and converted to audio, produce a sound.</text:span></text:span></text:p>
      <text:p text:style-name="Text_20_body">That sound is not a heartbeat in any medically meaningful sense. It is the sonification of electrical activity in undifferentiated cells. The medical and embryological communities are clear on this. The term "fetal heartbeat" at six weeks is not a simplification or a lay translation of a complex medical concept. It is a fabrication designed to produce an emotional response that substitutes for genuine reasoning.</text:p>
      <text:p text:style-name="P6"><text:span text:style-name="Strong_20_Emphasis"><text:span text:style-name="T7">This is not merely a factual error. Under Principle 4 — Sovereignty of the Person — the manipulation of persons through false emotional framing is a violation of what persons are. The heartbeat language is specifically designed to colonize the interior life — to produce a conclusion through emotional manipulation rather than genuine reasoning. That is illegitimate regardless of whether the underlying position has any merit.</text:span></text:span></text:p>
      <text:p text:style-name="P6"><text:span text:style-name="Strong_20_Emphasis"><text:span text:style-name="T7">And this is the point where the framework can say something the political debate almost never says directly: the people deploying this language are not engaging in good faith. Fidelity to evidence is not just an individual commitment — it is a standard against which public argument can be evaluated. Argument that deliberately misrepresents biological reality to produce emotional responses that substitute for reasoning fails that standard completely.</text:span></text:span></text:p>
      <text:p text:style-name="P6"><text:span text:style-name="Strong_20_Emphasis"><text:span text:style-name="T7"/></text:span></text:p>
      <text:p text:style-name="P6"><text:span text:style-name="Strong_20_Emphasis"><text:span text:style-name="T7">------------------------------------------------------------------</text:span></text:span></text:p>
      <text:p text:style-name="P7"><text:span text:style-name="Strong_20_Emphasis"><text:span text:style-name="T8">What just laws would look like</text:span></text:span></text:p>
      <text:p text:style-name="P7"><text:span text:style-name="Strong_20_Emphasis"><text:span text:style-name="T8">Law built on the framework would not say abortion is always permissible or always impermissible. It would say the decision belongs to the person inside the situation, made with her physician, under conditions of genuine freedom, with accurate information, without economic coercion, and without criminal threat. The community's role is to ensure those conditions exist — not to make the decision.</text:span></text:span></text:p>
      <text:p text:style-name="Text_20_body">That is not Roe. Roe was a privacy right derived from constitutional structure. This is a positive obligation derived from dignity, sovereignty, and the limits of legitimate external judgment. It's a stronger and more coherent foundation — and it produces a more demanding set of community obligations alongside the protection of individual decision-making.</text:p>
      <text:p text:style-name="Text_20_body"><text:soft-page-break/>What current US law produces instead is the opposite on almost every dimension. It substitutes institutional certainty for epistemic humility. It transfers judgment from those with proximity to those without it. It produces formal equality that generates substantive inequality. It criminalizes navigation of moral tragedy. And in its most extreme forms it actively increases harm to people the community is obligated by its own stated values to protect.</text:p>
      <text:p text:style-name="P7"><text:span text:style-name="Strong_20_Emphasis"><text:span text:style-name="T8"/></text:span></text:p>
      <text:p text:style-name="P7"><text:span text:style-name="Strong_20_Emphasis"><text:span text:style-name="T8">---------------------------------------------------------------------</text:span></text:span></text:p>
      <text:p text:style-name="P8"><text:span text:style-name="Strong_20_Emphasis"><text:span text:style-name="T9">The pro life person who supports choice</text:span></text:span></text:p>
      <text:p text:style-name="P8"><text:span text:style-name="Strong_20_Emphasis"><text:span text:style-name="T9">I hold a personal moral position about when life begins and what that means. I also recognize that my certainty about that position doesn't give me the right to impose it on someone else's body and life. Those are two separate questions and I can hold both simultaneously.</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6T12:44:32.299140305</meta:creation-date>
    <meta:generator>LibreOffice/24.2.7.2$Linux_X86_64 LibreOffice_project/420$Build-2</meta:generator>
    <dc:date>2026-06-16T13:24:34.752110196</dc:date>
    <meta:editing-duration>PT39M56S</meta:editing-duration>
    <meta:editing-cycles>14</meta:editing-cycles>
    <meta:document-statistic meta:table-count="0" meta:image-count="0" meta:object-count="0" meta:page-count="5" meta:paragraph-count="56" meta:word-count="1578" meta:character-count="10467" meta:non-whitespace-character-count="8919"/>
  </office:meta>
</office:document-meta>
</file>