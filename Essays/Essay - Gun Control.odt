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3661" officeooo:paragraph-rsid="00033661"/>
    </style:style>
    <style:style style:name="P2" style:family="paragraph" style:parent-style-name="Standard">
      <style:text-properties officeooo:rsid="0004d0a5" officeooo:paragraph-rsid="0004d0a5"/>
    </style:style>
    <style:style style:name="P3" style:family="paragraph" style:parent-style-name="Standard">
      <style:text-properties officeooo:rsid="0005e4f2" officeooo:paragraph-rsid="0005e4f2"/>
    </style:style>
    <style:style style:name="P4" style:family="paragraph" style:parent-style-name="Standard">
      <style:text-properties officeooo:rsid="00064592" officeooo:paragraph-rsid="00064592"/>
    </style:style>
    <style:style style:name="P5" style:family="paragraph" style:parent-style-name="Text_20_body">
      <style:text-properties officeooo:rsid="00033661" officeooo:paragraph-rsid="00033661"/>
    </style:style>
    <style:style style:name="P6" style:family="paragraph" style:parent-style-name="Text_20_body">
      <style:text-properties officeooo:rsid="0004d0a5" officeooo:paragraph-rsid="0004d0a5"/>
    </style:style>
    <style:style style:name="P7" style:family="paragraph" style:parent-style-name="Text_20_body">
      <style:text-properties officeooo:rsid="0005e4f2" officeooo:paragraph-rsid="0005e4f2"/>
    </style:style>
    <style:style style:name="P8" style:family="paragraph" style:parent-style-name="Text_20_body">
      <style:text-properties officeooo:rsid="00064592" officeooo:paragraph-rsid="00064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individual right to possess firearms</text:p>
      <text:p text:style-name="P1"/>
      <text:p text:style-name="P6">Americans have the individual right to possess firearms.</text:p>
      <text:p text:style-name="P6">Roughly 54% of gun deaths in the United States are suicides. Around 43% are homicides. Mass shootings — defined generously — account for a fraction of a percent of total gun deaths in most years.</text:p>
      <text:p text:style-name="P1"/>
      <text:p text:style-name="P5">Suicide by firearm is primarily a despair problem with a means-availability component. The evidence that firearm access affects suicide completion rates — not attempts, completion — is strong. The mechanism is clear. Firearms are uniquely lethal relative to other common means. Impulsive suicidal episodes that would survive other methods don't survive gunshots. Waiting periods and secure storage have genuine evidentiary support here.</text:p>
      <text:p text:style-name="Text_20_body">Homicide by firearm is primarily a concentrated poverty, community collapse, and despair problem. The geographic and demographic concentration of gun homicides in the United States is striking. It isn't randomly distributed. It clusters in specific communities that share specific characteristics — disinvestment, economic abandonment, institutional failure, the absence of genuine community structure.</text:p>
      <text:p text:style-name="Text_20_body">----------------------------------</text:p>
      <text:p text:style-name="P5"><text:span text:style-name="Strong_20_Emphasis">The two issues</text:span></text:p>
      <text:p text:style-name="Text_20_body">Gun violence broadly — suicides, homicides, concentrated in specific communities defined by poverty and community collapse. Primarily an upstream conditions problem. The regulatory measures with genuine evidence address specific mechanisms within this category. The communities bearing the cost are overwhelmingly poor, disproportionately minority, and almost entirely absent from the political debate about solutions.</text:p>
      <text:p text:style-name="Text_20_body">Mass shootings — statistically rare, demographically distributed differently, targeting schools, churches, grocery stores, concerts. Public spaces that represent collective life. The harm radiates far beyond the casualties into the entire society's relationship to public space, institutional safety, and the possibility of ordinary life.</text:p>
      <text:p text:style-name="P1"/>
      <text:p text:style-name="P1"/>
      <text:p text:style-name="P1">-------------------------------</text:p>
      <text:p text:style-name="P1">Mass Shootings</text:p>
      <text:p text:style-name="P1"/>
      <text:p text:style-name="P1">Because the honest upstream answer is indicting. It requires acknowledging that American society has systematically produced the conditions for this kind of violence. Destroyed economic security. Eliminated meaningful community. Created a vast population of people who feel unseen, humiliated, discarded, and hopeless. Built a culture that offers fame as the only remaining pathway to being seen — and mass shooters have learned that lesson completely.</text:p>
      <text:p text:style-name="P1"/>
      <text:p text:style-name="P1">The grief of parents who lost children at Uvalde, Sandy Hook, Parkland — the daily grief of mothers in Chicago, Baltimore, Philadelphia who lose sons to street violence — these are not inputs to a policy calculation. They are indictments of conditions the Society is committed to changing.</text:p>
      <text:p text:style-name="P1"><text:soft-page-break/></text:p>
      <text:p text:style-name="P5">The upstream conditions analysis that explains gun violence broadly doesn't fully explain mass shootings specifically. The profile of mass shooters doesn't map neatly onto the communities bearing the greatest burden of gun violence generally. Mass shooters are frequently not from concentrated poverty. They're not primarily products of community collapse in the same geographic and economic sense.</text:p>
      <text:p text:style-name="Text_20_body">What they share is something different. Isolation. Humiliation. The perception of having been discarded or unseen. A cultural environment that offers fame and notoriety as the only remaining pathway to significance. And crucially — a specific kind of nihilism that makes catastrophic public violence feel like a legitimate or even logical response to their situation.</text:p>
      <text:p text:style-name="Text_20_body">That's an upstream problem but a different upstream problem. It's not primarily about poverty and economic abandonment. It's about meaning, belonging, masculine identity, and what happens when those things collapse without community to catch the person falling.</text:p>
      <text:p text:style-name="P5">The data on this is stark and almost never named clearly in the mainstream debate. Mass shooters are overwhelmingly male. Not predominantly — overwhelmingly. The gender asymmetry is one of the most consistent findings in the research and one of the least discussed features of the phenomenon.</text:p>
      <text:p text:style-name="Text_20_body">That asymmetry is not biological. It's social. Which means it's pointing at something the framework can actually address.</text:p>
      <text:p text:style-name="Text_20_body"><text:span text:style-name="Strong_20_Emphasis">What the male identity crisis actually is</text:span></text:p>
      <text:p text:style-name="Text_20_body">Several decades of economic and social change have systematically dismantled the traditional structures through which masculine identity was formed and maintained. Industrial work that provided dignity, purpose, and community. Stable family roles. Fraternal organizations. Military service as a shared rite of passage. Religious community. The physical experience of building and maintaining things.</text:p>
      <text:p text:style-name="Text_20_body">These weren't perfect structures. Many of them encoded genuine injustices. But they provided something that has not been adequately replaced — a legible answer to the question of what a man is for and how a man earns standing in his community.</text:p>
      <text:p text:style-name="Text_20_body">What replaced them was largely absence. The jobs disappeared without replacement. The community institutions collapsed. The cultural script that told men what they were for was dismantled — rightly in many respects — without a new one being built in its place. What remained was a void that the market has been happy to fill with consumption, pornography, social media performance, and increasingly with online communities organized around grievance and rage.</text:p>
      <text:p text:style-name="Text_20_body"><text:span text:style-name="Strong_20_Emphasis">The specific pathway to mass violence</text:span></text:p>
      <text:p text:style-name="Text_20_body">The research on mass shooters consistently finds a cluster of features that maps onto this analysis precisely.</text:p>
      <text:p text:style-name="Text_20_body">Social isolation. The absence of genuine belonging — not just loneliness but the specific experience of being unseen and unrecognized by the communities that matter to them.</text:p>
      <text:p text:style-name="Text_20_body"><text:soft-page-break/>Perceived humiliation. A specific wound to masculine status — rejection, failure, the sense of having been publicly diminished — that has no legitimate pathway to repair.</text:p>
      <text:p text:style-name="Text_20_body">Grievance narrative. The construction of an explanation for their situation that identifies external enemies responsible for their condition. This is where online radicalization does its most dangerous work — not by creating the grievance but by providing a narrative that transforms personal failure into righteous cause.</text:p>
      <text:p text:style-name="Text_20_body">The desire for significance. Mass shooters almost universally want to be seen. The shooting is frequently understood by the perpetrator as the act that will finally make them matter — that will force the world to acknowledge their existence. In a culture that offers fame as the primary pathway to significance, and notoriety as a form of fame, the calculus is legible even if the conclusion is monstrous.</text:p>
      <text:p text:style-name="P1"/>
      <text:p text:style-name="P1"/>
      <text:p text:style-name="P1">--------------------------------</text:p>
      <text:p text:style-name="P2">Gun Access</text:p>
      <text:p text:style-name="P2"/>
      <text:p text:style-name="P6">Switzerland, Canada, Finland, New Zealand, Iceland — these countries have significant rates of civilian gun ownership. They don't have anything resembling American rates of gun violence. If gun access were the primary driver the correlation would hold across comparable cases. It doesn't.</text:p>
      <text:p text:style-name="Text_20_body">What those countries have that the United States doesn't — stronger community institutions, more robust economic security, lower inequality, higher social trust, genuine safety nets, less atomization — maps precisely onto what the framework identifies as the upstream conditions.</text:p>
      <text:p text:style-name="Text_20_body">Gun access is a necessary condition for gun violence. It is not a sufficient one and in most cases not the primary explanatory one. The conditions that produce the impulse are doing more causal work than the instrument that enables it.</text:p>
      <text:p text:style-name="Text_20_body">Specific regulatory measures that address specific mechanisms — waiting periods and suicide, background checks and violent histories — are legitimate because they target the intersection of access and specific vulnerability. Categorical restrictions that ignore the upstream conditions while appearing to address the problem are a failure of honest reasoning.</text:p>
      <text:p text:style-name="Text_20_body">--------------------------------</text:p>
      <text:p text:style-name="P7">Child Gun Access</text:p>
      <text:p text:style-name="P7">Child access prevention laws have supportive evidence — the highest evidence rating — for reducing self-inflicted fatal or nonfatal firearm injuries among youth, suicides among young people, and firearm homicides among young people.</text:p>
      <text:p text:style-name="P2"/>
      <text:p text:style-name="P2">--------------------------------</text:p>
      <text:p text:style-name="P3">Subsidiarity</text:p>
      <text:p text:style-name="P3"/>
      <text:p text:style-name="P7"><text:soft-page-break/>In a rural area — Franklin County being a reasonable example — a firearm serves genuinely different functions than in a dense urban environment. The nearest law enforcement response may be twenty minutes away. Wildlife is a real presence. The cultural relationship to firearms is embedded in genuine community practice — hunting, land management, a self-reliance ethic that isn't performative but practical. The probability that your neighbor's firearm produces harm to you is low. The probability that your own firearm serves a legitimate protective or practical function is meaningful.</text:p>
      <text:p text:style-name="Text_20_body">In a dense urban environment the calculus is different. Law enforcement response is faster. The proximity of people increases the probability that a firearm discharge produces unintended harm. The practical functions that justify rural ownership — wildlife, remote self-reliance — are largely absent. The specific harms that certain regulatory measures address — impulsive violence, domestic violence, gang conflict — are more concentrated.</text:p>
      <text:p text:style-name="P3"/>
      <text:p text:style-name="P4">---------------------------------------</text:p>
      <text:p text:style-name="P4">Culture</text:p>
      <text:p text:style-name="P8"/>
      <text:p text:style-name="P8">In significant parts of America — rural communities, working class communities, communities with long traditions of hunting and land stewardship — the relationship to firearms isn't primarily about self defense statistics or mass shooting policy. It's constitutive of identity, community, and a way of life.</text:p>
      <text:p text:style-name="Text_20_body">The first deer hunt with a father or grandfather. The practical knowledge of firearms as tools passed between generations. The relationship to land and wildlife that hunting represents. The self-reliance ethic that firearm ownership embodies in communities where institutional help has historically been distant or absent.</text:p>
      <text:p text:style-name="Text_20_body">These aren't irrational attachments. Under the framework's own commitments they're something more significant.</text:p>
      <text:p text:style-name="P4"/>
      <text:p text:style-name="P4">-------------------------------------</text:p>
      <text:p text:style-name="P4">Education</text:p>
      <text:p text:style-name="P4">In communities with deep cultural relationships to firearms, firearms education is already present — hunter safety courses, responsible ownership practices, intergenerational transmission of handling and safety knowledge. The evidence consistently shows that these communities, despite high ownership rates, don't produce proportionate rates of gun violence. The cultural relationship includes a normative framework around responsible use that functions as a genuine check on misuse.</text:p>
      <text:p text:style-name="P4"/>
      <text:p text:style-name="P8"><text:span text:style-name="Strong_20_Emphasis">The Society's position in full</text:span></text:p>
      <text:p text:style-name="Text_20_body">The individual right to possess firearms is real and grounded in genuine principles — the right to resist domination and the structural check an armed population provides against concentrated power. That right is not absolute but it is serious and deserves genuine respect rather than management or condescension.</text:p>
      <text:p text:style-name="Text_20_body">Specific regulatory measures with genuine evidentiary support represent legitimate exercises of community safety obligation — background checks, waiting periods, domestic violence prohibitions, <text:soft-page-break/>child access prevention laws, secure storage requirements. The Society supports these because the evidence justifies them and they don't materially compromise the underlying right.</text:p>
      <text:p text:style-name="Text_20_body">There is emerging evidence that restrictions on assault weapons and high capacity magazines produce meaningful reduction in the specific category of mass shooting events. That evidence is real and the framework requires acknowledging it rather than dismissing it.</text:p>
      <text:p text:style-name="Text_20_body">But evidence of effect is not by itself sufficient to justify a policy. The framework requires weighing that evidence against the full costs of implementation — and those costs are real and rarely honestly acknowledged in the debate.</text:p>
      <text:p text:style-name="Text_20_body">The cross-jurisdictional supply problem is real and subsidiarity alone can't resolve it. But the solutions to that problem carry their own costs — to local autonomy and to the framework's commitments about concentrated power — that deserve honest acknowledgment rather than dismissal.</text:p>
      <text:p text:style-name="Text_20_body">The cultural relationship to firearms in many American communities represents legitimate community practice, intergenerational knowledge transmission, and place-based identity that the framework genuinely respects. Policy that ignores or dismisses that relationship will fail on the framework's own terms.</text:p>
      <text:p text:style-name="Text_20_body">Firearms education — not mere mechanical instruction but genuine formation within a normative framework of responsibility — is part of what healthy communities with deep relationships to firearms already do and what communities with high gun violence have lost along with everything else.</text:p>
      <text:p text:style-name="Text_20_body">The communities bearing the greatest cost of gun violence have the strongest claim to shape the response to it. Current policy debate gives them the least voice. The measures with the strongest community-based evidence — violence intervention programs rooted in genuine proximity to the conditions — receive a fraction of the attention and resources devoted to legislative measures that those communities didn't design and that don't address what they actually experience.</text:p>
      <text:p text:style-name="Text_20_body"><text:span text:style-name="Strong_20_Emphasis">The load-bearing conclusion</text:span></text:p>
      <text:p text:style-name="Text_20_body">The debate consuming American political life is almost entirely focused on the instrument while refusing to look at the conditions that produce the impulse. Those conditions — poverty, isolation, broken community, destroyed covenant between community and member, the absence of meaning and belonging — are doing more causal work than any specific weapon type or regulatory gap. No legislative framework currently being seriously debated addresses them.</text:p>
      <text:p text:style-name="Text_20_body">The Society is actually building the upstream solution. Genuine community, material dignity, meaningful work, belonging, intergenerational knowledge transmission. The evidence identifies these as the primary drivers of gun violence broadly. Building them is a more honest and more effective response to the actual distribution of gun harm than any measure the debate currently proposes.</text:p>
      <text:p text:style-name="Text_20_body"><text:span text:style-name="Strong_20_Emphasis">The one sentence version</text:span></text:p>
      <text:p text:style-name="Text_20_body">The Society supports the specific measures the evidence justifies, respects the legitimate cultural relationships to firearms that many Americans hold, and insists that the debate consuming American political life is an argument about the wrong question — focused on the instrument while the conditions that produce the impulse go almost entirely unaddressed.</text:p>
      <text:p text:style-name="P4"><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6T13:53:52.397576381</meta:creation-date>
    <meta:generator>LibreOffice/24.2.7.2$Linux_X86_64 LibreOffice_project/420$Build-2</meta:generator>
    <dc:date>2026-06-16T14:49:43.737216947</dc:date>
    <meta:editing-duration>PT44M1S</meta:editing-duration>
    <meta:editing-cycles>9</meta:editing-cycles>
    <meta:document-statistic meta:table-count="0" meta:image-count="0" meta:object-count="0" meta:page-count="6" meta:paragraph-count="63" meta:word-count="1988" meta:character-count="14195" meta:non-whitespace-character-count="12221"/>
  </office:meta>
</office:document-meta>
</file>