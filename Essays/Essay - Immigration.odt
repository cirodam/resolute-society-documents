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6020" officeooo:paragraph-rsid="00016020"/>
    </style:style>
    <style:style style:name="P2" style:family="paragraph" style:parent-style-name="Text_20_body">
      <style:text-properties officeooo:rsid="00016020" officeooo:paragraph-rsid="00016020"/>
    </style:style>
    <style:style style:name="P3" style:family="paragraph" style:parent-style-name="Standard">
      <style:text-properties officeooo:rsid="00016020" officeooo:paragraph-rsid="00016020"/>
    </style:style>
    <style:style style:name="P4" style:family="paragraph" style:parent-style-name="Text_20_body">
      <style:text-properties officeooo:rsid="00016020" officeooo:paragraph-rsid="000160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United States has a consistent historical pattern of hostility to the latest wave of immigrants regardless of their origin or legal status. That's a historical claim with strong evidentiary support. Irish, Italian, Chinese, Eastern European Jewish, Mexican, Central American — the pattern repeats with remarkable consistency. The group that was yesterday's threat becomes tomorrow's American success story while a new group takes their place as the object of hostility. That pattern is worth naming because it suggests the hostility is about something other than the specific characteristics of any particular immigrant group.</text:p>
      <text:p text:style-name="P1"/>
      <text:p text:style-name="P2"><text:span text:style-name="Strong_20_Emphasis">What the evidence shows</text:span></text:p>
      <text:p text:style-name="Text_20_body">The US immigration backlog has more than tripled over the last decade, reaching over 11.6 million pending cases in 2026, causing significant delays in visa approvals, green card processing, and work authorizations. <text:a xlink:type="simple" xlink:href="https://www.vasquezlawnc.com/blog/us-immigration-backlog" office:target-frame-name="_blank" xlink:show="new" text:style-name="Internet_20_link" text:visited-style-name="Visited_20_Internet_20_Link">Vasquez Law Firm</text:a></text:p>
      <text:p text:style-name="Text_20_body">More than 1.7 million immigrants are waiting for their cases to be heard in immigration courts — the highest backlog ever recorded — with average wait times nationally stretched to nearly 900 days from initial filing to final disposition. <text:a xlink:type="simple" xlink:href="https://www.vasquezlawnc.com/blog/immigration-court-backlog-2026" office:target-frame-name="_blank" xlink:show="new" text:style-name="Internet_20_link" text:visited-style-name="Visited_20_Internet_20_Link">Vasquez Law Firm</text:a></text:p>
      <text:p text:style-name="Text_20_body">And for specific countries the situation is far worse than the averages suggest. The most backlogged categories show 25-year-old family applications and 13-year-old employment applications being processed. Mexican nationals face decades-long waits in some family-based categories, with visa bulletin final action dates around November 2000 for certain family categories. <text:a xlink:type="simple" xlink:href="https://www.tryalma.com/blog/green-card-wait-time-statistics" office:target-frame-name="_blank" xlink:show="new" text:style-name="Internet_20_link" text:visited-style-name="Visited_20_Internet_20_Link">Alma Immigration</text:a></text:p>
      <text:p text:style-name="Text_20_body">Read that carefully. Someone who applied for a family-based visa from Mexico in 2000 is only now being processed. That's not a wait. That's a generational sentence.</text:p>
      <text:p text:style-name="Text_20_body">US consulates issued 21% fewer immigrant visas in September 2025 than in September 2024, and the current administration has indefinitely paused naturalization interviews and oath ceremonies for nationals from 39 designated countries. <text:a xlink:type="simple" xlink:href="https://www.niskanencenter.org/immigrationdata/" office:target-frame-name="_blank" xlink:show="new" text:style-name="Internet_20_link" text:visited-style-name="Visited_20_Internet_20_Link">Niskanen Center</text:a></text:p>
      <text:p text:style-name="P1">When lawful pathways are functionally unavailable — decades-long waits, chronic understaffing, active administrative obstruction — the moral structure shifts significantly. A person who cannot wait 25 years to be reunited with their family, who faces genuine danger in their home country, who has spent years in a system that has no realistic path to resolution — that person's decision to cross without authorization looks very different through the framework's lens than the debate's framing suggests.</text:p>
      <text:p text:style-name="P1"/>
      <text:p text:style-name="P2">What is a person supposed to do when the legal pathway takes 25 years, their family is in danger, the system is chronically understaffed and administratively hostile, and the alternative is remaining in conditions that violate their basic dignity?</text:p>
      <text:p text:style-name="Text_20_body">The debate's answer is — wait. Follow the law. Get in line.</text:p>
      <text:p text:style-name="Text_20_body">The framework's response to that answer has to engage honestly with what waiting actually means when the wait is measured in decades and the conditions being waited out include poverty, violence, and family separation.</text:p>
      <text:p text:style-name="P2"><text:span text:style-name="Strong_20_Emphasis">The honest tension</text:span></text:p>
      <text:p text:style-name="Text_20_body">On one side — Axiom II. Dignity is equal and inviolable. What you were born into tells us nothing about your worth. The accident of birth location is exactly the kind of circumstance the framework <text:soft-page-break/>holds as irrelevant to human worth. A person born in Guatemala has the same dignity as a person born in Georgia. That claim has real implications for how we treat people regardless of their legal status.</text:p>
      <text:p text:style-name="Text_20_body">On the other side — Principle 14 and Axiom V. Community is real, requires conditions, and has legitimate interests in its own integrity. The capacity to absorb and integrate new members is finite. The pace and scale of demographic change affects the conditions of genuine community in ways that matter and that the framework cannot dismiss as mere prejudice.</text:p>
      <text:p text:style-name="P2"><text:span text:style-name="Strong_20_Emphasis">What dehumanization actually is</text:span></text:p>
      <text:p text:style-name="Text_20_body">It's not a metaphor. It's a specific and documentable process with a consistent historical structure that the framework can name precisely.</text:p>
      <text:p text:style-name="Text_20_body">It begins with language. The replacement of person with category. Illegal instead of undocumented. Invasion instead of migration. Infestation. Vermin. Animals. The specific words matter because they're doing specific work — severing the cognitive connection between the person being described and the dignity the framework holds as inviolable. You cannot do to a person what you can do to an invasion. The language change is the precondition for what follows.</text:p>
      <text:p text:style-name="Text_20_body">It proceeds through abstraction. Individual human beings with specific stories, families, contributions, and circumstances are replaced by a mass — the migrant caravan, the flood, the wave. The abstraction serves the same function as the language — it makes the individual invisible and makes the category available for whatever the political project requires.</text:p>
      <text:p text:style-name="Text_20_body">It then deploys the scapegoat mechanism. The genuine grievances of the exhausted middle — economic displacement, community dissolution, institutional failure, the sense that the covenant has been broken — are redirected toward the abstracted category. Not the specific economic and political decisions that produced deindustrialization, not the institutional failures that destroyed community, not the concentrated power that extracted wealth while leaving devastation — but the people at the bottom of the economic order who had the least power to produce any of those outcomes.</text:p>
      <text:p text:style-name="Text_20_body">That's the scapegoat mechanism in its precise form. It takes real pain, real grievance, real loss — and gives it a target that serves the interests of those who produced the conditions causing the pain while protecting them from accountability.</text:p>
      <text:p text:style-name="Text_20_body"><text:span text:style-name="Strong_20_Emphasis">What the framework says about this</text:span></text:p>
      <text:p text:style-name="Text_20_body">Axiom II — dignity is equal and inviolable. The dehumanization process is a direct assault on this axiom. It is the systematic attempt to make certain persons invisible as persons — to reduce them to a category that can be acted upon without the moral weight that persons carry.</text:p>
      <text:p text:style-name="Text_20_body">Principle 1 — Fidelity to Evidence. The claims made to justify dehumanization are almost uniformly false or severely distorted. Immigrants — documented and undocumented — commit crimes at lower rates than native-born citizens. The evidence on economic displacement is more complex than the scapegoat narrative suggests. The claim that immigration is the primary driver of working class economic distress ignores decades of documented evidence about deindustrialization, financialization, and the destruction of labor power. The dehumanization project requires sustained dishonesty about what the evidence actually shows.</text:p>
      <text:p text:style-name="Text_20_body"><text:soft-page-break/>Principle 8 — Non-Domination. The use of force and coercion to subordinate people who have no legitimate recourse — who cannot vote, who fear contact with institutions, who can be detained and removed without the procedural protections citizens take for granted — is domination in the framework's precise sense. The current enforcement apparatus is designed to maximize the vulnerability of a specific population and to exploit that vulnerability as a tool of political power.</text:p>
      <text:p text:style-name="Text_20_body">Axiom VIII — Power tends to concentrate and corrupt. The scapegoating of immigrants serves specific institutional interests. It redirects legitimate grievance away from concentrated power and toward the most vulnerable and least powerful population available. That's not an accident. It's the mechanism by which concentrated power protects itself from accountability — give people something to be angry at that isn't you.</text:p>
      <text:p text:style-name="Text_20_body"><text:span text:style-name="Strong_20_Emphasis">The historical pattern the framework names</text:span></text:p>
      <text:p text:style-name="Text_20_body">Every significant episode of American nativist hostility follows the same structure. A period of economic stress and community dissolution produces genuine grievance. Political actors redirect that grievance toward the most recent wave of immigrants. The immigrants are blamed for conditions produced by structural forces they had no hand in creating. The scapegoating serves to protect the actual sources of the grievance from examination and accountability. And then — with remarkable consistency — the scapegoated group is later recognized as having been essential to the communities that rejected them.</text:p>
      <text:p text:style-name="Text_20_body">Irish. Italian. Chinese. Eastern European Jewish. Japanese. Mexican. Central American. The pattern repeats with such consistency that it should by now be recognizable as a pattern rather than a legitimate response to legitimate grievance.</text:p>
      <text:p text:style-name="Text_20_body">The framework's Axiom I applies directly. Reality exists independently of our preferences. The evidence about who is actually responsible for the conditions producing working class grievance is available and documentable. Choosing to direct that grievance toward immigrants rather than toward the actual sources is a motivated refusal to follow the evidence — which the framework names as a failure regardless of how sincere the grievance underneath it is.</text:p>
      <text:p text:style-name="Text_20_body"><text:span text:style-name="Strong_20_Emphasis">What current enforcement actually looks like</text:span></text:p>
      <text:p text:style-name="Text_20_body">This is where the framework's assessment becomes most pointed. Because current enforcement isn't primarily about community integrity or lawful governance of membership. It's about something else that the framework can name precisely.</text:p>
      <text:p text:style-name="Text_20_body">Mass deportation of people with deep community roots — people who have lived here for decades, raised American children, built businesses, contributed to communities — serves no community integrity function. These people are already members of communities in every meaningful sense the framework recognizes. Their removal doesn't protect community. It destroys it — tearing apart the actual human fabric of specific places and relationships.</text:p>
      <text:p text:style-name="Text_20_body">Detention without adequate due process. The framework's Principle 17 — Consent and Accountability — and Axiom VI — legitimacy is distinct from legality — apply directly. Detention conditions that violate basic human dignity, that separate parents from children, that hold people indefinitely without <text:soft-page-break/>meaningful legal recourse, cannot be justified by the community integrity argument. They represent the exercise of state power against people with no meaningful ability to resist or appeal — which is domination in the framework's precise sense.</text:p>
      <text:p text:style-name="Text_20_body">The targeting of specific communities for enforcement — raids in workplaces, checkpoints in immigrant neighborhoods, the weaponization of local law enforcement — serves the dehumanization project more than it serves any legitimate governance function. It creates a population living in permanent fear, unable to access institutions, unable to report crimes, unable to participate in community life. That's not the condition of potential members being evaluated for community membership. It's the condition of a subordinated population being used as a political instrument.</text:p>
      <text:p text:style-name="Text_20_body">The separation of families at the border. This requires almost no elaboration under the framework. Principle 7 — Subsistence includes safety. Principle 8 — Non-Domination. Axiom II — dignity is inviolable. Deliberately separating children from parents as a deterrence mechanism — using the suffering of children as a policy instrument — is a violation of every foundational commitment the framework establishes. It cannot be justified by community integrity arguments. It can only be justified by a prior dehumanization of the people being subjected to it — which is precisely what makes it recognizable as part of the dehumanization process rather than legitimate governance.</text:p>
      <text:p text:style-name="Text_20_body"><text:span text:style-name="Strong_20_Emphasis">The scapegoating mechanism and what it's protecting</text:span></text:p>
      <text:p text:style-name="Text_20_body">This deserves to be named directly because it's the thing the debate most systematically avoids.</text:p>
      <text:p text:style-name="Text_20_body">The working class economic distress that is being redirected toward immigrants was produced by specific decisions made by specific actors over specific decades. The offshoring of manufacturing. The destruction of union power. The financialization of the economy. The extraction of wealth from working communities. The political decisions that protected those processes and the concentrated power that benefited from them.</text:p>
      <text:p text:style-name="Text_20_body">The people who made those decisions and who benefit from them are not the targets of the current political energy around immigration. The people at the bottom of the economic order — who had no power to produce those outcomes and who are themselves frequently victims of the same concentrated power — are.</text:p>
      <text:p text:style-name="Text_20_body">That redirection is not accidental. It is the scapegoat mechanism operating exactly as it always has — protecting concentrated power from accountability by giving genuine grievance a target that cannot fight back.</text:p>
      <text:p text:style-name="Text_20_body">The framework names this as a failure of Principle 1 — motivated reasoning that works backward from a desired conclusion — and as an operation of Axiom VIII — concentrated power protecting itself through the mechanisms it controls including political narrative.</text:p>
      <text:p text:style-name="P1"/>
      <text:p text:style-name="P2"><text:span text:style-name="Strong_20_Emphasis">What the legitimate concern actually is</text:span></text:p>
      <text:p text:style-name="Text_20_body">Genuine community requires shared conditions of communication and belonging. Language is one of the primary mechanisms through which community forms — through which people become genuinely <text:soft-page-break/>known to one another, through which mutual obligation is expressed and maintained, through which the shared life of a community is conducted.</text:p>
      <text:p text:style-name="Text_20_body">The concern that immigrants aren't learning English isn't purely nativist sentiment. It contains a genuine insight from the framework's own commitments. Axiom V — community is constitutive of the person. Principle 14 — genuine community requires intention, structure, and ongoing care. A community in which significant populations cannot communicate with each other faces real challenges to the conditions of genuine belonging that the framework takes seriously.</text:p>
      <text:p text:style-name="Text_20_body">That's a legitimate concern worth acknowledging honestly.</text:p>
      <text:p text:style-name="Text_20_body"><text:span text:style-name="Strong_20_Emphasis">What the evidence actually shows</text:span></text:p>
      <text:p text:style-name="Text_20_body">The sentiment that immigrants aren't learning English or integrating is largely contradicted by what the research consistently documents.</text:p>
      <text:p text:style-name="P2"><text:span text:style-name="Strong_20_Emphasis">What the research actually shows</text:span></text:p>
      <text:p text:style-name="Text_20_body">The largest determinant of English language acquisition among immigrants is their age at entry, because there is a critical period for second language acquisition. Learning English is correlated with higher educational attainment, earnings, social assimilation, and improved mental health. <text:a xlink:type="simple" xlink:href="https://www.cato.org/publications/immigration-research-policy-brief/immigrants-learn-english-immigrants-language" office:target-frame-name="_blank" xlink:show="new" text:style-name="Internet_20_link" text:visited-style-name="Visited_20_Internet_20_Link">Cato Institute</text:a></text:p>
      <text:p text:style-name="Text_20_body">In other words immigrants learn English for the same reason anyone does anything — because it serves their interests and improves their lives. The incentive structure already exists without any policy intervention.</text:p>
      <text:p text:style-name="Text_20_body">In contemporary politics there is a concern that although earlier waves of immigrants learned English, newer cohorts are doing so at lower rates. But the research doesn't support that concern. The pattern of English acquisition across generations has been remarkably consistent — first generation immigrants maintain their native language, second generation is bilingual, third generation is predominantly English speaking. That pattern holds for current immigrants just as it held for the Italian, Polish, and German immigrants of a century ago whose descendants are now considered quintessentially American. <text:a xlink:type="simple" xlink:href="https://www.cato.org/publications/immigration-research-policy-brief/immigrants-learn-english-immigrants-language" office:target-frame-name="_blank" xlink:show="new" text:style-name="Internet_20_link" text:visited-style-name="Visited_20_Internet_20_Link">Cato Institute</text:a></text:p>
      <text:p text:style-name="Text_20_body"><text:span text:style-name="Strong_20_Emphasis">The enclave question</text:span></text:p>
      <text:p text:style-name="Text_20_body">This is where the legitimate community concern has some evidentiary grounding. Enclave size significantly impedes language acquisition. The impact of linguistic concentration is particularly strong for women, younger immigrants, and those in the middle of the ability distribution. Enclaves affect language learning via social interactions among friends and colleagues rather than through formal education. <text:a xlink:type="simple" xlink:href="https://www.sciencedirect.com/science/article/abs/pii/S0927537119300041" office:target-frame-name="_blank" xlink:show="new" text:style-name="Internet_20_link" text:visited-style-name="Visited_20_Internet_20_Link">ScienceDirect</text:a></text:p>
      <text:p text:style-name="Text_20_body">So the concern isn't entirely without basis. Dense linguistic enclaves do slow English acquisition for some populations. But the mechanism isn't resistance to integration — it's the natural human tendency to form community with people who share your language, which the framework's own commitments about community formation should recognize as entirely understandable.</text:p>
      <text:p text:style-name="Text_20_body"><text:span text:style-name="Strong_20_Emphasis">What the framework says about this</text:span></text:p>
      <text:p text:style-name="Text_20_body">Several distinct things that need to be held together.</text:p>
      <text:p text:style-name="Text_20_body"><text:soft-page-break/>English acquisition serves both the immigrant and the community. The evidence is clear that English proficiency benefits immigrants enormously — economically, socially, in terms of wellbeing. The community has a genuine interest in shared language as a condition of genuine belonging. Those interests align rather than conflict. Policies that support English acquisition — adequately funded language education, accessible ESL programs, workplace language support — serve both simultaneously.</text:p>
      <text:p text:style-name="Text_20_body">The demand that immigrants speak English immediately or prove their integration through language before being treated with dignity is a different and illegitimate claim. Principle 20 — the precautionary principle applied here is that language acquisition takes time, particularly for adults, particularly for people who arrived in contexts of stress and instability. Demanding immediate fluency as a condition of dignity or community belonging sets a standard that neither the evidence nor the framework supports.</text:p>
      <text:p text:style-name="Text_20_body">The historical hypocrisy is worth naming. The communities now most vocal about immigrants not speaking English are frequently the descendants of immigrants who maintained their native languages for generations — German speakers in Pennsylvania, Italian speakers in New York, Yiddish speakers throughout the northeast — while their descendants integrated over exactly the generational timeline the current research documents.</text:p>
      <text:p text:style-name="Text_20_body"><text:span text:style-name="Strong_20_Emphasis">What the sentiment is actually expressing</text:span></text:p>
      <text:p text:style-name="Text_20_body">Underneath the English language concern is often something the framework takes more seriously than the surface claim suggests. It's frequently an expression of the community belonging concern — the sense that the shared conditions of genuine community are eroding, that something is changing too fast, that the connective tissue is thinning.</text:p>
      <text:p text:style-name="Text_20_body">That concern deserves genuine engagement rather than dismissal. The framework's response isn't — your concern is racist, integration happens automatically, stop worrying. It's — your concern about community conditions is legitimate, the evidence shows integration is happening along historical patterns, and the policies that actually support community conditions are adequate funding for language education and genuine investment in the shared institutions that make integration possible — not enforcement, hostility, and dehumanization, which actively prevent the integration they claim to demand.</text:p>
      <text:p text:style-name="Text_20_body"><text:span text:style-name="Strong_20_Emphasis">The honest conclusion</text:span></text:p>
      <text:p text:style-name="Text_20_body">Immigrants learn English. They always have. The generational pattern is consistent and well documented. The concern that they don't is contradicted by the evidence and should be named as such under Principle 1.</text:p>
      <text:p text:style-name="Text_20_body">The legitimate community interest in shared language is real and the framework supports policies that facilitate English acquisition — through investment in language education, accessible programs, and community conditions that support integration rather than isolate immigrant populations in defensive enclaves.</text:p>
      <text:p text:style-name="Text_20_body"><text:soft-page-break/>What the framework doesn't support is using language as a proxy for human worth, demanding immediate fluency as a condition of dignity, or treating the entirely natural process of generational language shift as evidence of a failure of integration.</text:p>
      <text:p text:style-name="P1"/>
      <text:p text:style-name="P2"><text:span text:style-name="Strong_20_Emphasis">The framework's immigration position in full</text:span></text:p>
      <text:p text:style-name="Text_20_body">The United States has a legitimate interest in governing membership. That interest is not unlimited — it cannot be exercised in ways that violate dignity, separate families arbitrarily, expose people to danger, or serve ethnic and racial exclusion dressed as community integrity.</text:p>
      <text:p text:style-name="Text_20_body">The current legal immigration system has failed on its own terms. With 11.6 million pending cases, decades-long wait times for specific categories and countries, and active administrative obstruction, the system simultaneously claims authority to govern membership and destroys the mechanisms through which lawful membership can be obtained. That failure forfeits the moral high ground the community integrity argument requires.</text:p>
      <text:p text:style-name="Text_20_body">Unlawful immigration is substantially produced by that failure. A person who cannot wait 25 years, whose family is in danger, who has exhausted legal options that exist only on paper — that person's decision to cross without authorization is understandable in the framework's terms even when it isn't legally authorized. The framework distinguishes between the legal status of an act and the moral status of the person performing it.</text:p>
      <text:p text:style-name="Text_20_body">The undocumented population already here includes millions of people who have built lives, raised American children, contributed to communities, and formed genuine belonging over years and decades. They are members of communities in every meaningful sense the framework recognizes. Their removal doesn't protect community integrity — it destroys actual community in service of a legal category.</text:p>
      <text:p text:style-name="Text_20_body">The dehumanization of immigrants — through language, through abstraction, through the scapegoat mechanism — is a direct violation of Axiom II and serves the specific function of redirecting legitimate grievance away from the concentrated power that produced it toward the most vulnerable and least powerful population available. The framework names that clearly and refuses to accommodate it.</text:p>
      <text:p text:style-name="Text_20_body">The English language concern contains a legitimate community interest in shared conditions of belonging that the evidence shows is being met through the same generational pattern that has always characterized immigrant integration. Policies that support language acquisition serve both immigrant and community interests. Hostility and dehumanization actively prevent the integration they claim to demand.</text:p>
      <text:p text:style-name="Text_20_body">Asylum and refuge generate specific obligations the framework hasn't fully addressed yet — people fleeing genuine danger have a claim on the community's protection that derives from the same dignity commitments that ground everything els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6:33:15.259203206</meta:creation-date>
    <dc:date>2026-06-16T17:21:38.544283484</dc:date>
    <meta:editing-duration>PT46M39S</meta:editing-duration>
    <meta:editing-cycles>9</meta:editing-cycles>
    <meta:generator>LibreOffice/24.2.7.2$Linux_X86_64 LibreOffice_project/420$Build-2</meta:generator>
    <meta:document-statistic meta:table-count="0" meta:image-count="0" meta:object-count="0" meta:page-count="7" meta:paragraph-count="74" meta:word-count="3092" meta:character-count="21522" meta:non-whitespace-character-count="18430"/>
  </office:meta>
</office:document-meta>
</file>