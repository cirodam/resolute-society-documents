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431" officeooo:paragraph-rsid="00085431"/>
    </style:style>
    <style:style style:name="P2" style:family="paragraph" style:parent-style-name="Text_20_body">
      <style:text-properties officeooo:rsid="00085431" officeooo:paragraph-rsid="00085431"/>
    </style:style>
    <style:style style:name="P3" style:family="paragraph" style:parent-style-name="Text_20_body">
      <style:paragraph-properties fo:margin-left="0in" fo:margin-right="0in" fo:orphans="1" fo:text-indent="0in" style:auto-text-indent="false"/>
    </style:style>
    <style:style style:name="P4"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p>
      <text:p text:style-name="P2">Cultural</text:p>
      <text:p text:style-name="Text_20_body"/>
      <text:p text:style-name="Text_20_body">Male labor force participation has been declining for decades. The industries that provided not just income but dignity, community, and a legible masculine role — manufacturing, mining, construction, industrial trades — have been systematically hollowed out. What replaced them were service economy jobs that the broader culture coded as feminine, paid less, and provided none of the fraternal community that industrial work did at its best.</text:p>
      <text:p text:style-name="Text_20_body">The education gap has inverted dramatically. Women now significantly outnumber men in higher education at every level. The credential economy that replaced the industrial economy was built in a way that men have been consistently less able to navigate.</text:p>
      <text:p text:style-name="Text_20_body">The result is a significant population of men — disproportionately working class, disproportionately rural, disproportionately without college education — who cannot fulfill the economic role that masculine identity was built around, have no alternative script for what they're for, and exist in communities that have lost the institutional structures that previously provided belonging and purpose outside of work.</text:p>
      <text:p text:style-name="Text_20_body">This maps directly onto Axiom IV. The covenant between community and member has been broken. The promise that honest work would produce a life worth living has been broken specifically and disproportionately for these men. And the political and cultural response has been largely to tell them their attachment to that promise was itself the problem — that their identity was built on something that deserved to be dismantled.</text:p>
      <text:p text:style-name="Standard"/>
      <text:p text:style-name="Standard">----------------------------</text:p>
      <text:p text:style-name="P1">Economic</text:p>
      <text:p text:style-name="Standard"/>
      <text:p text:style-name="Standard"/>
      <text:p text:style-name="Text_20_body">The cultural story is real but it's been captured by bad faith actors in ways that make honest engagement difficult.</text:p>
      <text:p text:style-name="Text_20_body">Something genuine happened. The dismantling of traditional masculine identity — which encoded real injustices around hierarchy, domination, and the subordination of women — was necessary and right in significant respects. But it was largely a dismantling without replacement. What was taken apart deserved to be taken apart. What wasn't built in its place is the problem.</text:p>
      <text:p text:style-name="Text_20_body">The culture produced a coherent critique of traditional masculinity. It did not produce a coherent positive account of what masculinity is for in its absence. The message men received — explicitly and implicitly — was largely about what they shouldn't be. Dominating. Emotionally unavailable. Defined by provider role. Entitled to deference.</text:p>
      <text:p text:style-name="Text_20_body">What they should be instead was left largely undefined or was defined in terms that felt like the erasure of masculine identity rather than its reconstruction. Be more like women. Abandon the traits that felt constitutive of who you are. The problem is you.</text:p>
      <text:p text:style-name="Text_20_body"><text:soft-page-break/>For men already economically displaced, already stripped of the structures through which masculine identity was formed, already living in communities where institutional belonging had collapsed — that cultural message landed as abandonment. Not liberation. Abandonment.</text:p>
      <text:p text:style-name="Standard"/>
      <text:p text:style-name="P3">That tracks with both the evidence and the framework's analysis.</text:p>
      <text:p text:style-name="P4"><text:span text:style-name="Strong_20_Emphasis">The economic dimension</text:span></text:p>
      <text:p text:style-name="P4">This is probably the most documentable and the least contested. The numbers are stark.</text:p>
      <text:p text:style-name="P4">Male labor force participation has been declining for decades. The industries that provided not just income but dignity, community, and a legible masculine role — manufacturing, mining, construction, industrial trades — have been systematically hollowed out. What replaced them were service economy jobs that the broader culture coded as feminine, paid less, and provided none of the fraternal community that industrial work did at its best.</text:p>
      <text:p text:style-name="P4">The education gap has inverted dramatically. Women now significantly outnumber men in higher education at every level. The credential economy that replaced the industrial economy was built in a way that men have been consistently less able to navigate.</text:p>
      <text:p text:style-name="P4">The result is a significant population of men — disproportionately working class, disproportionately rural, disproportionately without college education — who cannot fulfill the economic role that masculine identity was built around, have no alternative script for what they're for, and exist in communities that have lost the institutional structures that previously provided belonging and purpose outside of work.</text:p>
      <text:p text:style-name="P4">This maps directly onto Axiom IV. The covenant between community and member has been broken. The promise that honest work would produce a life worth living has been broken specifically and disproportionately for these men. And the political and cultural response has been largely to tell them their attachment to that promise was itself the problem — that their identity was built on something that deserved to be dismantled.</text:p>
      <text:p text:style-name="P4"><text:span text:style-name="Strong_20_Emphasis">The cultural dimension</text:span></text:p>
      <text:p text:style-name="P4">This is where it gets more complex and where the framework has to be most careful.</text:p>
      <text:p text:style-name="P4">The cultural story is real but it's been captured by bad faith actors in ways that make honest engagement difficult.</text:p>
      <text:p text:style-name="P4">Something genuine happened. The dismantling of traditional masculine identity — which encoded real injustices around hierarchy, domination, and the subordination of women — was necessary and right in significant respects. But it was largely a dismantling without replacement. What was taken apart deserved to be taken apart. What wasn't built in its place is the problem.</text:p>
      <text:p text:style-name="P4">The culture produced a coherent critique of traditional masculinity. It did not produce a coherent positive account of what masculinity is for in its absence. The message men received — explicitly and implicitly — was largely about what they shouldn't be. Dominating. Emotionally unavailable. Defined by provider role. Entitled to deference.</text:p>
      <text:p text:style-name="P4"><text:soft-page-break/>What they should be instead was left largely undefined or was defined in terms that felt like the erasure of masculine identity rather than its reconstruction. Be more like women. Abandon the traits that felt constitutive of who you are. The problem is you.</text:p>
      <text:p text:style-name="P4">For men already economically displaced, already stripped of the structures through which masculine identity was formed, already living in communities where institutional belonging had collapsed — that cultural message landed as abandonment. Not liberation. Abandonment.</text:p>
      <text:p text:style-name="P4"><text:span text:style-name="Strong_20_Emphasis">Where the two dimensions interact</text:span></text:p>
      <text:p text:style-name="P4">The economic and cultural dimensions aren't parallel — they compound each other in a specific and dangerous way.</text:p>
      <text:p text:style-name="P4">Economic displacement produced a population of men without the material conditions of dignity. Cultural displacement produced a population of men without a coherent positive account of what they were for. The combination produced something the framework can name precisely — men who cannot fulfill the traditional masculine role, have no alternative account of masculine purpose and value, and exist in communities that have lost the structures through which belonging and recognition were previously possible.</text:p>
      <text:p text:style-name="P4">That's not a personality type. It's a set of conditions. And conditions are what the framework is built to address.</text:p>
      <text:p text:style-name="P4"><text:span text:style-name="Strong_20_Emphasis">What the framework says about this</text:span></text:p>
      <text:p text:style-name="P4">Axiom V — community is constitutive of the person. The structures through which masculine identity was formed — industrial work communities, fraternal organizations, religious communities, military service, craft traditions — were genuine communities in the framework's sense. Their collapse didn't just eliminate economic opportunity. It eliminated the relational context through which men became who they were.</text:p>
      <text:p text:style-name="P4">Axiom VII — experience shapes persons profoundly. The conditions of economic displacement, cultural abandonment, and community collapse are doing real causal work in the male identity crisis. That's not determinism — agency remains real. But the conditions matter enormously and pretending otherwise produces cruelty rather than clarity.</text:p>
      <text:p text:style-name="P4">Principle 14 — the Society actively resists the forces of atomization. The male identity crisis is substantially a product of atomization. Men who have lost the communities through which masculine identity and belonging were formed are not just unhappy. They are structurally vulnerable to the radicalization pipelines that offer them a substitute community organized around grievance and an explanation for their condition that identifies enemies.</text:p>
      <text:p text:style-name="P4"><text:span text:style-name="Strong_20_Emphasis">The thing the mainstream cultural conversation has consistently refused to do</text:span></text:p>
      <text:p text:style-name="P4">Take the underlying wound seriously without validating the poisonous responses to it.</text:p>
      <text:p text:style-name="P4">The mainstream response to the male identity crisis has largely been one of two things. Dismissal — men's suffering is either denied, minimized, or attributed to the loss of unjust privilege rather than <text:soft-page-break/>genuine deprivation. Or alarm about the symptoms — the radicalization, the violence, the retreat from civic life — without genuine engagement with the conditions that produced them.</text:p>
      <text:p text:style-name="P4">Neither response addresses the actual problem. Dismissal makes the wound worse. Alarm about symptoms without engagement with causes produces surveillance and punishment rather than genuine prevention.</text:p>
      <text:p text:style-name="P4">The framework's response is different. The wound is real. The conditions that produced it are real and documentable. The responses to it that radicalization pipelines offer are poisonous — they identify enemies where the framework identifies structural failures, they promise domination where the framework offers genuine belonging, they produce destruction where the framework builds community. But you cannot address the responses without addressing the conditions. And addressing the conditions requires taking the wound seriously rather than dismissing it as the complaint of people losing unjust privilege.</text:p>
      <text:p text:style-name="Standard"/>
      <text:p text:style-name="Text_20_body"><text:span text:style-name="Strong_20_Emphasis">What the framework says men need</text:span></text:p>
      <text:p text:style-name="Text_20_body">Starting from first principles rather than from the culture war.</text:p>
      <text:p text:style-name="Text_20_body"><text:span text:style-name="Strong_20_Emphasis">Dignity through genuine contribution</text:span></text:p>
      <text:p text:style-name="Text_20_body">Axiom II — dignity is equal and inviolable. But dignity isn't just a metaphysical status. It has to be lived. It has to be experienced in daily life through the recognition of genuine contribution to something that matters.</text:p>
      <text:p text:style-name="Text_20_body">Men — and this isn't exclusively male but it maps particularly strongly onto masculine identity formation — have a deep need to be useful. Not just to exist. To build, protect, provide, solve, repair. To have a problem that requires their specific capacities and to meet it. The industrial economy at its best provided this. The service economy largely doesn't. The cultural response to masculine identity largely dismissed it as the provider role being weaponized rather than as a genuine human need being expressed in a particular cultural form.</text:p>
      <text:p text:style-name="Text_20_body">The need underneath the role is real even when the specific role deserves critique. Men need to matter through what they do. That's not toxic. It's human. And the current moment has stripped it away from a significant population of men without offering anything genuine in its place.</text:p>
      <text:p text:style-name="Text_20_body"><text:span text:style-name="Strong_20_Emphasis">Genuine belonging</text:span></text:p>
      <text:p text:style-name="Text_20_body">Men's friendships have been in documented decline for decades. The specific form that masculine community took — side by side rather than face to face, organized around shared activity and purpose rather than explicit emotional intimacy — was dismissed as shallow or avoidant rather than understood as a different but genuine form of connection.</text:p>
      <text:p text:style-name="Text_20_body">The result is a generation of men who are profoundly isolated. Who have no one they could call at 2am. Who have acquaintances but not friends. Who experience belonging only through their immediate family if they have one, and nowhere else.</text:p>
      <text:p text:style-name="Text_20_body"><text:soft-page-break/>That isolation is doing real causal work in every pathology associated with the male identity crisis — suicide, radicalization, mass violence, addiction, withdrawal from civic life. Loneliness is not a feeling. It's a condition with documented physiological and psychological consequences.</text:p>
      <text:p text:style-name="Text_20_body">What men need is genuine belonging of a kind that fits how masculine community actually forms — through shared work, shared purpose, shared challenge, shared physical experience. Not therapy groups. Not vulnerability workshops. Genuine communities organized around doing things that matter together.</text:p>
      <text:p text:style-name="Text_20_body"><text:span text:style-name="Strong_20_Emphasis">Initiation and formation</text:span></text:p>
      <text:p text:style-name="Text_20_body">This is the dimension the mainstream conversation is least equipped to address because it sounds archaic. But the framework takes it seriously.</text:p>
      <text:p text:style-name="Text_20_body">Every traditional culture across human history developed rituals and structures through which boys became men — through which the transition from childhood to adult masculine identity was marked, witnessed, and integrated into community. These weren't arbitrary. They were doing real psychological and social work. They created a before and after. They connected the individual to lineage and community. They established expectations and conferred recognition.</text:p>
      <text:p text:style-name="Text_20_body">Their collapse left a vacuum. The transition from boyhood to manhood now happens without marking, without witness, without community recognition. Men arrive at adulthood without a clear sense of what they've become or what's expected of them. The radicalization pipelines have understood this vacuum better than mainstream culture has. They offer initiation — a before and after, a community of brothers, a set of expectations and a conferral of identity. The content is poisonous. The structure is meeting a genuine need that nothing legitimate is currently meeting.</text:p>
      <text:p text:style-name="Text_20_body">The Society's master-journeyman-apprentice system, the Pioneer Corps, the sortition ceremony — these are doing this work whether or not they were explicitly designed to. They create genuine structures of formation, recognition, and belonging that fit how masculine identity actually develops.</text:p>
      <text:p text:style-name="Text_20_body"><text:span text:style-name="Strong_20_Emphasis">Honest challenge</text:span></text:p>
      <text:p text:style-name="Text_20_body">Men need to be genuinely challenged rather than either coddled or condemned.</text:p>
      <text:p text:style-name="Text_20_body">The mainstream cultural response to men in crisis has largely oscillated between two failures. Condemnation — your suffering is the consequence of unjust privilege, your identity is the problem, your needs are illegitimate. Or coddling — everything is fine, your feelings are valid, lower the standards.</text:p>
      <text:p text:style-name="Text_20_body">Neither meets the genuine need. Men respond to genuine challenge — to standards that are high and real, to the experience of being trusted with something difficult, to the recognition that comes from having genuinely earned something. That's not a cultural artifact of toxic masculinity. It's a genuine feature of masculine development that traditional structures understood and that the current moment has largely abandoned in favor of either condemnation or empty affirmation.</text:p>
      <text:p text:style-name="Text_20_body"><text:span text:style-name="Strong_20_Emphasis">Purpose larger than themselves</text:span></text:p>
      <text:p text:style-name="Text_20_body"><text:soft-page-break/>Men need to belong to something that matters beyond their individual existence. This is the dimension that radicalization pipelines exploit most effectively — they offer a cause, a mission, an enemy, a sense that the individual's existence is part of something cosmically significant.</text:p>
      <text:p text:style-name="Text_20_body">The content is destructive. The need is real. Men who have genuine purpose — who are building something that will outlast them, who are protecting something worth protecting, who are transmitting something worth knowing — are not the men who shoot up schools or disappear into online grievance communities.</text:p>
      <text:p text:style-name="Text_20_body">The Society is explicitly building this. The founding declaration, the Compendium, the motto — the work shall not be lost — these are structures of meaning that connect individual men to something larger than themselves. That's not incidental to what the Society is doing. It may be one of its most important functions.</text:p>
      <text:p text:style-name="Text_20_body"><text:span text:style-name="Strong_20_Emphasis">What men don't need</text:span></text:p>
      <text:p text:style-name="Text_20_body">The framework is equally clear about this.</text:p>
      <text:p text:style-name="Text_20_body">They don't need the restoration of hierarchy and domination. The traditional masculine structures that provided genuine belonging also encoded genuine injustices. The answer to their collapse isn't restoration — it's building something new that provides what was genuinely valuable without what was genuinely harmful.</text:p>
      <text:p text:style-name="Text_20_body">They don't need enemies. The radicalization pipeline's primary move is to transform structural failures into personal enemies — feminists, immigrants, elites, whoever. The framework identifies structural failures as the cause of the male identity crisis. Enemies are a substitute for that honest account that makes the wound worse rather than better.</text:p>
      <text:p text:style-name="Text_20_body">They don't need to be told their needs are illegitimate. That response has been tried. The evidence of its failure is everywhe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4:53:20.595059500</meta:creation-date>
    <meta:generator>LibreOffice/24.2.7.2$Linux_X86_64 LibreOffice_project/420$Build-2</meta:generator>
    <dc:date>2026-06-16T14:59:12.699739054</dc:date>
    <meta:editing-duration>PT5M51S</meta:editing-duration>
    <meta:editing-cycles>2</meta:editing-cycles>
    <meta:document-statistic meta:table-count="0" meta:image-count="0" meta:object-count="0" meta:page-count="6" meta:paragraph-count="69" meta:word-count="2359" meta:character-count="16007" meta:non-whitespace-character-count="13665"/>
  </office:meta>
</office:document-meta>
</file>