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8a0" officeooo:paragraph-rsid="0004f8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bilities: Buri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6:06:55.256971572</meta:creation-date>
    <dc:date>2026-06-19T16:07:52.201598478</dc:date>
    <meta:editing-duration>PT57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2" meta:character-count="24" meta:non-whitespace-character-count="23"/>
  </office:meta>
</office:document-meta>
</file>