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e03" officeooo:paragraph-rsid="00069e03"/>
    </style:style>
    <style:style style:name="P2" style:family="paragraph" style:parent-style-name="Standard">
      <style:text-properties officeooo:rsid="0009bd9b" officeooo:paragraph-rsid="0009bd9b"/>
    </style:style>
    <style:style style:name="T1" style:family="text">
      <style:text-properties officeooo:rsid="0008d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sibilities:</text:p>
      <text:p text:style-name="P1">- Seed Libraries</text:p>
      <text:p text:style-name="P1">- Household agricultural planning</text:p>
      <text:p text:style-name="P1">- Farm support <text:span text:style-name="T1">and coordination</text:span> program</text:p>
      <text:p text:style-name="P2">- Composting program</text:p>
      <text:p text:style-name="P2">- Soil production</text:p>
      <text:p text:style-name="P2">- Agricultural assessment progra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6:10:03.012657461</meta:creation-date>
    <meta:generator>LibreOffice/24.2.7.2$Linux_X86_64 LibreOffice_project/420$Build-2</meta:generator>
    <dc:date>2026-06-19T16:12:05.468014036</dc:date>
    <meta:editing-duration>PT2M1S</meta:editing-duration>
    <meta:editing-cycles>4</meta:editing-cycles>
    <meta:document-statistic meta:table-count="0" meta:image-count="0" meta:object-count="0" meta:page-count="1" meta:paragraph-count="7" meta:word-count="24" meta:character-count="175" meta:non-whitespace-character-count="158"/>
  </office:meta>
</office:document-meta>
</file>