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4d2" officeooo:paragraph-rsid="000b44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nsibilities</text:p>
      <text:p text:style-name="P1">- Liquid Fuels</text:p>
      <text:p text:style-name="P1">- Solid Fuels</text:p>
      <text:p text:style-name="P1">- Electricity Production</text:p>
      <text:p text:style-name="P1">- Electricity Distribution</text:p>
      <text:p text:style-name="P1">- Warm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16:08:06.699576279</meta:creation-date>
    <meta:generator>LibreOffice/24.2.7.2$Linux_X86_64 LibreOffice_project/420$Build-2</meta:generator>
    <dc:date>2026-06-19T16:09:56.036887554</dc:date>
    <meta:editing-duration>PT1M49S</meta:editing-duration>
    <meta:editing-cycles>1</meta:editing-cycles>
    <meta:document-statistic meta:table-count="0" meta:image-count="0" meta:object-count="0" meta:page-count="1" meta:paragraph-count="6" meta:word-count="15" meta:character-count="102" meta:non-whitespace-character-count="93"/>
  </office:meta>
</office:document-meta>
</file>