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20a" officeooo:paragraph-rsid="000352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nsibilities: water sourcing, water treatment, water distribution</text:p>
      <text:p text:style-name="P1"/>
      <text:p text:style-name="P1">Community watershed mapping</text:p>
      <text:p text:style-name="P1">Community rainfall recording</text:p>
      <text:p text:style-name="P1">Household Water plan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15:58:59.635023180</meta:creation-date>
    <meta:generator>LibreOffice/24.2.7.2$Linux_X86_64 LibreOffice_project/420$Build-2</meta:generator>
    <dc:date>2026-06-19T16:01:11.547527867</dc:date>
    <meta:editing-duration>PT2M12S</meta:editing-duration>
    <meta:editing-cycles>1</meta:editing-cycles>
    <meta:document-statistic meta:table-count="0" meta:image-count="0" meta:object-count="0" meta:page-count="1" meta:paragraph-count="4" meta:word-count="16" meta:character-count="144" meta:non-whitespace-character-count="132"/>
  </office:meta>
</office:document-meta>
</file>