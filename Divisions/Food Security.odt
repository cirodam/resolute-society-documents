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542" officeooo:paragraph-rsid="00196ea7"/>
    </style:style>
    <style:style style:name="P2" style:family="paragraph" style:parent-style-name="Standard">
      <style:text-properties officeooo:rsid="00196ea7" officeooo:paragraph-rsid="00196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</text:p>
      <text:p text:style-name="P1">- Food storage, food preparation, food distribution</text:p>
      <text:p text:style-name="P1"/>
      <text:p text:style-name="P2">Community grain storage</text:p>
      <text:p text:style-name="P2">Community scale grain processing</text:p>
      <text:p text:style-name="P2">Community kitchens</text:p>
      <text:p text:style-name="P2">Disabled person food delivery</text:p>
      <text:p text:style-name="P2">Household food preservation</text:p>
      <text:p text:style-name="P2">Household food prepa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2:39:20.286852093</meta:creation-date>
    <meta:generator>LibreOffice/24.2.7.2$Linux_X86_64 LibreOffice_project/420$Build-2</meta:generator>
    <dc:date>2026-06-19T15:58:52.448982926</dc:date>
    <meta:editing-duration>PT1H12M26S</meta:editing-duration>
    <meta:editing-cycles>2</meta:editing-cycles>
    <meta:document-statistic meta:table-count="0" meta:image-count="0" meta:object-count="0" meta:page-count="1" meta:paragraph-count="8" meta:word-count="27" meta:character-count="224" meta:non-whitespace-character-count="204"/>
  </office:meta>
</office:document-meta>
</file>