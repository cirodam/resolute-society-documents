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IM FELL English SC" fo:font-size="10.5pt" fo:font-weight="bold" officeooo:paragraph-rsid="001f52f8" fo:background-color="transparent"/>
    </style:style>
    <style:style style:name="P3" style:family="paragraph" style:parent-style-name="First_20_Paragraph">
      <style:text-properties fo:color="#2c2c2c" loext:opacity="100%"/>
    </style:style>
    <style:style style:name="P4" style:family="paragraph" style:parent-style-name="Standard">
      <style:paragraph-properties style:line-height-at-least="0.198in"/>
      <style:text-properties fo:color="#2c2c2c" loext:opacity="100%" style:font-name="IM FELL English SC" fo:font-size="10.5pt" fo:font-weight="bold" fo:background-color="transparent"/>
    </style:style>
    <style:style style:name="P5" style:family="paragraph" style:parent-style-name="Standard">
      <style:paragraph-properties style:line-height-at-least="0.198in"/>
      <style:text-properties fo:color="#2c2c2c" loext:opacity="100%" style:font-name="IM FELL English SC" fo:background-color="transparent"/>
    </style:style>
    <style:style style:name="P6" style:family="paragraph" style:parent-style-name="Title">
      <style:text-properties fo:color="#1e3a5f" loext:opacity="100%" officeooo:rsid="0045da86" officeooo:paragraph-rsid="0045da86"/>
    </style:style>
    <style:style style:name="P7" style:family="paragraph" style:parent-style-name="Article">
      <style:paragraph-properties fo:text-indent="0in" style:auto-text-indent="false"/>
    </style:style>
    <style:style style:name="P8" style:family="paragraph" style:parent-style-name="First_20_Paragraph">
      <style:text-properties fo:color="#2c2c2c" loext:opacity="100%" officeooo:rsid="00409c18" officeooo:paragraph-rsid="00409c18"/>
    </style:style>
    <style:style style:name="P9" style:family="paragraph" style:parent-style-name="First_20_Paragraph">
      <style:text-properties fo:color="#2c2c2c" loext:opacity="100%" officeooo:rsid="00409c18" officeooo:paragraph-rsid="00471c71"/>
    </style:style>
    <style:style style:name="P10" style:family="paragraph" style:parent-style-name="First_20_Paragraph">
      <style:text-properties fo:color="#2c2c2c" loext:opacity="100%" officeooo:rsid="00471c71" officeooo:paragraph-rsid="00471c71"/>
    </style:style>
    <style:style style:name="P11" style:family="paragraph" style:parent-style-name="First_20_Paragraph">
      <style:text-properties fo:color="#2c2c2c" loext:opacity="100%" officeooo:rsid="00486989" officeooo:paragraph-rsid="00486989"/>
    </style:style>
    <style:style style:name="P12" style:family="paragraph" style:parent-style-name="First_20_Paragraph">
      <style:text-properties fo:color="#2c2c2c" loext:opacity="100%" officeooo:rsid="004c3dcd" officeooo:paragraph-rsid="004c3dcd"/>
    </style:style>
    <style:style style:name="P13" style:family="paragraph" style:parent-style-name="First_20_Paragraph">
      <style:text-properties fo:color="#2c2c2c" loext:opacity="100%" officeooo:rsid="004fb5ec" officeooo:paragraph-rsid="004fb5ec"/>
    </style:style>
    <style:style style:name="P14" style:family="paragraph" style:parent-style-name="Heading_20_1">
      <style:text-properties fo:color="#1e3a5f" loext:opacity="100%"/>
    </style:style>
    <style:style style:name="P15" style:family="paragraph" style:parent-style-name="Section">
      <style:paragraph-properties fo:text-indent="0in" style:auto-text-indent="false"/>
    </style:style>
    <style:style style:name="P16" style:family="paragraph" style:parent-style-name="Standard">
      <style:paragraph-properties style:line-height-at-least="0.198in"/>
      <style:text-properties fo:color="#2c2c2c" loext:opacity="100%" officeooo:rsid="003fbffb"/>
    </style:style>
    <style:style style:name="T1" style:family="text">
      <style:text-properties officeooo:rsid="0026ccf4"/>
    </style:style>
    <style:style style:name="T2" style:family="text">
      <style:text-properties officeooo:rsid="0045da86"/>
    </style:style>
    <style:style style:name="T3" style:family="text">
      <style:text-properties officeooo:rsid="00471c71"/>
    </style:style>
    <style:style style:name="T4" style:family="text">
      <style:text-properties officeooo:rsid="00499aca"/>
    </style:style>
    <style:style style:name="T5" style:family="text">
      <style:text-properties officeooo:rsid="004b5c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Executive Divisions</text:p>
      <text:p text:style-name="P4"/>
      <text:p text:style-name="P5"/>
      <text:h text:style-name="P14" text:outline-level="1">Preamble</text:h>
      <text:p text:style-name="P5"/>
      <text:p text:style-name="P3">There are moments in history that test the character of a nation, that demand more than ordinary times prepare <text:span text:style-name="T1">any person</text:span> for. We believe we are living in such a moment. We do not take that lightly. We resolve to meet it together.</text:p>
      <text:p text:style-name="P16"/>
      <text:h text:style-name="P7" text:outline-level="1" text:is-list-header="true">I. <text:span text:style-name="T3">Administrative </text:span><text:span text:style-name="T4">Division</text:span></text:h>
      <text:h text:style-name="P15" text:outline-level="2" text:is-list-header="true">Section <text:span text:style-name="T2">1</text:span> </text:h>
      <text:p text:style-name="First_20_Paragraph">The Parliamentarian shall be responsible for assisting the General Assembly in decision making</text:p>
      <text:h text:style-name="P15" text:outline-level="2" text:is-list-header="true">Section 2 </text:h>
      <text:p text:style-name="P8"><text:span text:style-name="T3">A Ledger keeper shall be r</text:span>esponsible for tracking mutual obligation among society membership</text:p>
      <text:h text:style-name="P15" text:outline-level="2" text:is-list-header="true">Section <text:span text:style-name="T3">3</text:span></text:h>
      <text:p text:style-name="P8"><text:span text:style-name="T3">A </text:span>Treasurer <text:span text:style-name="T3">shall be r</text:span>esponsible for tracking obligation from the society to its members.</text:p>
      <text:h text:style-name="P7" text:outline-level="1" text:is-list-header="true">II. Food Security <text:span text:style-name="T3">Division</text:span></text:h>
      <text:p text:style-name="P8"/>
      <text:p text:style-name="P8">Section <text:span text:style-name="T3">4</text:span></text:p>
      <text:p text:style-name="P10">The Food Security Division shall be responsible for assess<text:span text:style-name="T5">ing</text:span> community nutrition needs, sourcing food, storing it, preparing it, and distributing it to community members.</text:p>
      <text:p text:style-name="P8"/>
      <text:p text:style-name="P8">Section <text:span text:style-name="T3">5.</text:span></text:p>
      <text:p text:style-name="P10">This division shall fall under the responsibility of a food security officer.</text:p>
      <text:p text:style-name="P10"/>
      <text:p text:style-name="P12">Section 6.</text:p>
      <text:p text:style-name="P12"><text:soft-page-break/>This division shall establish one or more community kitchens to prepare meals for society members who are otherwise unable to do so.</text:p>
      <text:p text:style-name="P8"/>
      <text:h text:style-name="P7" text:outline-level="1" text:is-list-header="true">III. Agricultural Division.</text:h>
      <text:p text:style-name="P10"/>
      <text:p text:style-name="P10">Section 6</text:p>
      <text:p text:style-name="P10">The Agricultural division shall be responsible for assessing the societies agricultural capacity and supporting farmers and society members to that end.</text:p>
      <text:p text:style-name="P10"/>
      <text:p text:style-name="P10">Section 7</text:p>
      <text:p text:style-name="P10">This division shall fall under the responsibility of a Chief Agricultural Officer.</text:p>
      <text:p text:style-name="P9"/>
      <text:p text:style-name="P10">Section 8</text:p>
      <text:p text:style-name="P10">This division shall be responsible for the establishment and operation of a seed library.</text:p>
      <text:p text:style-name="P10"/>
      <text:p text:style-name="P10">IV. <text:s/>Housing Security Division</text:p>
      <text:p text:style-name="P10"/>
      <text:p text:style-name="P11">Section 9</text:p>
      <text:p text:style-name="P11">The Housing Security Division is responsible for identifying members who are homeless or house insecure and supporting them to the greatest degree possible.</text:p>
      <text:p text:style-name="P11"/>
      <text:p text:style-name="P11">Section 10 </text:p>
      <text:p text:style-name="P11">This division is responsible for establishing and maintaining an emergency housing program for community members in acute crisis.</text:p>
      <text:p text:style-name="P11"/>
      <text:p text:style-name="P11">Section 11</text:p>
      <text:p text:style-name="P11">This division shall fall under the responsibility of a Chief Housing Officer</text:p>
      <text:p text:style-name="P11"/>
      <text:h text:style-name="P7" text:outline-level="1" text:is-list-header="true">V. Medical Division</text:h>
      <text:p text:style-name="P11"/>
      <text:p text:style-name="P11">Section 12</text:p>
      <text:p text:style-name="P11">The Medical Division shall be responsible for assisting society members in all matters pertaining to medical need.</text:p>
      <text:p text:style-name="P11"/>
      <text:p text:style-name="P11">Section 13</text:p>
      <text:p text:style-name="P11">This division shall fall under the responsibility of a Chief Medical Officer.</text:p>
      <text:p text:style-name="P11"/>
      <text:p text:style-name="P11">Section 14</text:p>
      <text:p text:style-name="P11">This division shall be responsible for establishing and maintaining a community health worker program.</text:p>
      <text:p text:style-name="P11"><text:soft-page-break/></text:p>
      <text:h text:style-name="P7" text:outline-level="1" text:is-list-header="true">VI. Metalworking Division</text:h>
      <text:p text:style-name="P11"/>
      <text:p text:style-name="P11">Section 15</text:p>
      <text:p text:style-name="P11">This division shall be responsible for the manufacturing of essential metal tools and items.</text:p>
      <text:p text:style-name="P11"/>
      <text:p text:style-name="P11">Section 16. </text:p>
      <text:p text:style-name="P11">This division shall fall under the responsibility of a Chief Machinist.</text:p>
      <text:p text:style-name="P11"/>
      <text:p text:style-name="P11">Section 17. </text:p>
      <text:p text:style-name="P11">This division shall support machining and metalworking wherever these capacities already exist.</text:p>
      <text:p text:style-name="P11"/>
      <text:h text:style-name="Heading_20_1" text:outline-level="1">VII. Education Division</text:h>
      <text:p text:style-name="P13"/>
      <text:p text:style-name="P13">Section 18</text:p>
      <text:p text:style-name="P13">The Education Division shall be responsible for facilitating knowledge transmission</text:p>
      <text:p text:style-name="P13"/>
      <text:p text:style-name="P13">Section 19</text:p>
      <text:p text:style-name="P13">This division shall fall under the authority of a Head Teach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indent="0.2in" style:auto-text-indent="false"/>
      <style:text-properties style:font-name="Libre Baskerville" fo:font-family="'Libre Baskerville'" style:font-style-name="Regular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IM FELL English SC1" fo:font-family="'IM FELL English SC'" style:font-style-name="Bold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IM FELL English SC1" fo:font-family="'IM FELL English SC'" style:font-style-name="Bold" style:font-pitch="variable" fo:font-size="11pt" fo:font-weight="normal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1701in" fo:margin-bottom="0.1799in" style:contextual-spacing="false" fo:text-align="center" style:justify-single-word="false"/>
      <style:text-properties style:font-name="IM FELL English SC2" fo:font-family="'IM FELL English SC'" style:font-style-name="Regular" style:font-pitch="variable" fo:font-size="2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IM FELL English SC2" fo:font-family="'IM FELL English SC'" style:font-style-name="Regular" style:font-pitch="variable" fo:font-size="13pt" style:font-size-asian="18pt" style:font-size-complex="18pt"/>
    </style:style>
    <style:style style:name="First_20_Paragraph" style:display-name="First Paragraph" style:family="paragraph" style:parent-style-name="Standard" style:master-page-name="">
      <style:paragraph-properties fo:text-indent="0in" style:auto-text-indent="false" style:page-number="auto"/>
    </style:style>
    <style:style style:name="Article" style:family="paragraph" style:parent-style-name="Heading_20_1" style:master-page-name="">
      <style:paragraph-properties fo:margin-top="0.1701in" fo:margin-bottom="0in" style:contextual-spacing="false" style:page-number="auto"/>
    </style:style>
    <style:style style:name="Section" style:family="paragraph" style:parent-style-name="Heading_20_2" style:master-page-name="">
      <style:paragraph-properties fo:margin-top="0.1402in" fo:margin-bottom="0.1in" style:contextual-spacing="false" style:page-number="auto"/>
      <style:text-properties fo:font-size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style style:name="MT1" style:family="text">
      <style:text-properties officeooo:rsid="0045da86"/>
    </style:style>
    <style:page-layout style:name="Mpm1">
      <style:page-layout-properties fo:page-width="8.5in" fo:page-height="11in" style:num-format="1" style:print-orientation="portrait" fo:margin-top="1.25in" fo:margin-bottom="1.2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Resolute Societ<text:span text:style-name="MT1">y of Athens, Georgi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3:48:24.763225727</meta:creation-date>
    <dc:date>2026-06-08T19:19:11.280904416</dc:date>
    <meta:editing-duration>PT3H22M43S</meta:editing-duration>
    <meta:editing-cycles>36</meta:editing-cycles>
    <meta:generator>LibreOffice/24.2.7.2$Linux_X86_64 LibreOffice_project/420$Build-2</meta:generator>
    <meta:document-statistic meta:table-count="0" meta:image-count="0" meta:object-count="0" meta:page-count="3" meta:paragraph-count="51" meta:word-count="414" meta:character-count="2707" meta:non-whitespace-character-count="2338"/>
  </office:meta>
</office:document-meta>
</file>