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M Fell English SC" svg:font-family="'IM Fell English SC'" style:font-family-generic="roman" style:font-pitch="variable"/>
    <style:font-face style:name="IM Fell English SC1" svg:font-family="'IM Fell English SC'" style:font-family-generic="system" style:font-pitch="variable"/>
    <style:font-face style:name="Liberation Sans" svg:font-family="'Liberation Sans'" style:font-family-generic="swiss" style:font-pitch="variable"/>
    <style:font-face style:name="Libre Baskerville" svg:font-family="'Libre Baskerville'" style:font-family-generic="roman" style:font-pitch="variable"/>
    <style:font-face style:name="Libre Baskerville1" svg:font-family="'Libre Baskerville'"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5in" fo:margin-bottom="0in" style:contextual-spacing="false"/>
    </style:style>
    <style:style style:name="P2" style:family="paragraph" style:parent-style-name="Standard">
      <style:paragraph-properties fo:margin-top="0in" fo:margin-bottom="0.0835in" style:contextual-spacing="false" fo:text-align="center" style:justify-single-word="false"/>
    </style:style>
    <style:style style:name="P3" style:family="paragraph" style:parent-style-name="Standard">
      <style:paragraph-properties fo:margin-top="0in" fo:margin-bottom="0.3335in" style:contextual-spacing="false" fo:text-align="center" style:justify-single-word="false"/>
    </style:style>
    <style:style style:name="P4" style:family="paragraph" style:parent-style-name="Standard">
      <style:paragraph-properties fo:margin-top="0.3335in" fo:margin-bottom="0.0555in" style:contextual-spacing="false" fo:text-align="center" style:justify-single-word="false"/>
    </style:style>
    <style:style style:name="P5" style:family="paragraph" style:parent-style-name="Standard">
      <style:paragraph-properties fo:margin-top="0.3335in" fo:margin-bottom="0.111in" style:contextual-spacing="false" fo:text-align="center" style:justify-single-word="false"/>
    </style:style>
    <style:style style:name="P6" style:family="paragraph" style:parent-style-name="Standard">
      <style:paragraph-properties fo:margin-top="0in" fo:margin-bottom="0.111in" style:contextual-spacing="false" fo:text-align="center" style:justify-single-word="false"/>
    </style:style>
    <style:style style:name="P7" style:family="paragraph" style:parent-style-name="Standard">
      <style:paragraph-properties fo:margin-top="0in" fo:margin-bottom="0in" style:contextual-spacing="false" fo:text-align="center" style:justify-single-word="false"/>
    </style:style>
    <style:style style:name="P8" style:family="paragraph" style:parent-style-name="Standard">
      <style:paragraph-properties fo:margin-top="0in" fo:margin-bottom="0.1665in" style:contextual-spacing="false" fo:padding-left="0in" fo:padding-right="0in" fo:padding-top="0in" fo:padding-bottom="0.0138in" fo:border-left="none" fo:border-right="none" fo:border-top="none" fo:border-bottom="0.74pt solid #2c3e35"/>
    </style:style>
    <style:style style:name="P9" style:family="paragraph" style:parent-style-name="Standard">
      <style:paragraph-properties fo:margin-top="0in" fo:margin-bottom="0.111in" style:contextual-spacing="false" fo:text-indent="0.25in" style:auto-text-indent="false"/>
    </style:style>
    <style:style style:name="P10" style:family="paragraph" style:parent-style-name="Standard">
      <style:paragraph-properties fo:margin-top="0.1665in" fo:margin-bottom="0.0555in" style:contextual-spacing="false"/>
    </style:style>
    <style:style style:name="P11" style:family="paragraph" style:parent-style-name="Standard">
      <style:paragraph-properties fo:margin-top="0in" fo:margin-bottom="0.111in" style:contextual-spacing="false"/>
    </style:style>
    <style:style style:name="P12" style:family="paragraph" style:parent-style-name="Standard">
      <style:paragraph-properties fo:margin-top="0.3335in" fo:margin-bottom="0in" style:contextual-spacing="false"/>
    </style:style>
    <style:style style:name="T1" style:family="text">
      <style:text-properties fo:font-variant="small-caps" fo:color="#2c3e35" loext:opacity="100%" style:font-name="IM Fell English SC" fo:font-size="18pt" style:font-name-asian="IM Fell English SC1" style:font-size-asian="18pt" style:font-name-complex="IM Fell English SC1" style:font-size-complex="18pt"/>
    </style:style>
    <style:style style:name="T2" style:family="text">
      <style:text-properties fo:font-variant="small-caps" fo:color="#2c3e35" loext:opacity="100%" style:font-name="IM Fell English SC" fo:font-size="12pt" style:font-name-asian="IM Fell English SC1" style:font-size-asian="12pt" style:font-name-complex="IM Fell English SC1" style:font-size-complex="12pt"/>
    </style:style>
    <style:style style:name="T3" style:family="text">
      <style:text-properties fo:font-variant="small-caps" fo:color="#2c3e35" loext:opacity="100%" style:font-name="IM Fell English SC" fo:font-size="10pt" style:font-name-asian="IM Fell English SC1" style:font-size-asian="10pt" style:font-name-complex="IM Fell English SC1" style:font-size-complex="10pt"/>
    </style:style>
    <style:style style:name="T4" style:family="text">
      <style:text-properties fo:color="#2c2c2c" loext:opacity="100%" style:font-name="Libre Baskerville" fo:font-size="11pt" fo:font-style="italic" style:font-name-asian="Libre Baskerville1" style:font-size-asian="11pt" style:font-style-asian="italic" style:font-name-complex="Libre Baskerville1" style:font-size-complex="11pt" style:font-style-complex="italic"/>
    </style:style>
    <style:style style:name="T5" style:family="text">
      <style:text-properties fo:color="#2c2c2c" loext:opacity="100%" style:font-name="Libre Baskerville" fo:font-size="10pt" fo:font-style="italic" style:font-name-asian="Libre Baskerville1" style:font-size-asian="10pt" style:font-style-asian="italic" style:font-name-complex="Libre Baskerville1" style:font-size-complex="10pt" style:font-style-complex="italic"/>
    </style:style>
    <style:style style:name="T6" style:family="text">
      <style:text-properties fo:color="#2c2c2c" loext:opacity="100%" style:font-name="Libre Baskerville" fo:font-size="9.5pt" style:font-name-asian="Libre Baskerville1" style:font-size-asian="9.5pt" style:font-name-complex="Libre Baskerville1" style:font-size-complex="9.5pt"/>
    </style:style>
    <style:style style:name="T7" style:family="text">
      <style:text-properties fo:color="#2c2c2c" loext:opacity="100%" style:font-name="Libre Baskerville" fo:font-size="10.5pt" style:font-name-asian="Libre Baskerville1" style:font-size-asian="10.5pt" style:font-name-complex="Libre Baskerville1" style:font-size-complex="10.5pt"/>
    </style:style>
    <style:style style:name="T8" style:family="text">
      <style:text-properties fo:color="#2c3e35" loext:opacity="100%" style:font-name="Libre Baskerville" fo:font-size="10.5pt" fo:font-style="italic" style:font-name-asian="Libre Baskerville1" style:font-size-asian="10.5pt" style:font-style-asian="italic" style:font-name-complex="Libre Baskerville1" style:font-size-complex="10.5pt" style:font-style-complex="italic"/>
    </style:style>
    <style:style style:name="T9" style:family="text">
      <style:text-properties fo:color="#2c3e35" loext:opacity="100%" style:font-name="IM Fell English SC" fo:font-size="10pt" fo:font-style="italic" style:font-name-asian="IM Fell English SC1" style:font-size-asian="10pt" style:font-style-asian="italic" style:font-name-complex="IM Fell English SC1" style:font-size-complex="10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The Definition</text:span></text:p>
      <text:p text:style-name="P3"><text:span text:style-name="T4">Of a Resolute Society</text:span></text:p>
      <text:p text:style-name="P8"/>
      <text:p text:style-name="P4"><text:span text:style-name="T5">The work shall not be lost.</text:span></text:p>
      <text:p text:style-name="P3"><text:span text:style-name="T6">— Benjamin Franklin</text:span></text:p>
      <text:p text:style-name="P5"><text:span text:style-name="T2">Article I</text:span><text:span text:style-name="T3"><text:line-break/> Preamble</text:span></text:p>
      <text:p text:style-name="P9"><text:span text:style-name="T7">We, the members of a Resolute Society, establish this Definition as the foundational compact of our common life together. This document is not a set of rules imposed from above. It is an expression of what we hold to be true about persons, communities, and the obligations we bear to one another and to those who will come after us.</text:span></text:p>
      <text:p text:style-name="P9"><text:span text:style-name="T7">A Resolute Society exists to build the conditions in which persons can flourish — not as isolated individuals, but as members of a genuine community bound by mutual obligation, honest inquiry, and shared work. We do not take institutions for granted. We build them with care, maintain them with vigilance, and hold them accountable to those they serve.</text:span></text:p>
      <text:p text:style-name="P9"><text:span text:style-name="T7">This Definition binds all Resolute Societies. No Society may adopt a constitution or practice inconsistent with its provisions. Where a Society's constitution is silent, this Definition governs.</text:span></text:p>
      <text:p text:style-name="P8"/>
      <text:p text:style-name="P5"><text:span text:style-name="T2">Article II</text:span><text:span text:style-name="T3"><text:line-break/> The Society</text:span></text:p>
      <text:p text:style-name="P10"><text:span text:style-name="T8">§ 2.1. Nature</text:span></text:p>
      <text:p text:style-name="P9"><text:span text:style-name="T7">A Resolute Society is a voluntary association of persons committed to mutual aid, self-governance, and the preservation and transmission of the knowledge and skills on which a good community life depends. It is not a political party, a commercial enterprise, or an instrument of any ideology. It is a community — prior to politics, prior to markets — organized around the obligations persons bear to one another.</text:span></text:p>
      <text:p text:style-name="P10"><text:span text:style-name="T8">§ 2.2. Scale and Direct Democracy</text:span></text:p>
      <text:p text:style-name="P9"><text:span text:style-name="T7">A Society small enough to govern itself through the direct participation of all its members shall do so. When a Society's membership can be assembled in a common </text:span><text:soft-page-break/><text:span text:style-name="T7">space, it shall govern by referendum — the direct expression of the community's will — rather than through representative bodies. The threshold for constituting a General Assembly is thirty members. Below that threshold, all governing authority is exercised by referendum of the full membership.</text:span></text:p>
      <text:p text:style-name="P10"><text:span text:style-name="T8">§ 2.3. Federation</text:span></text:p>
      <text:p text:style-name="P9"><text:span text:style-name="T7">Resolute Societies are federated. Each Society is autonomous in its internal governance, provided it remains faithful to this Definition. No Society may claim authority over another. The federation exists to support what individual Societies cannot accomplish alone — not to direct, absorb, or subordinate them.</text:span></text:p>
      <text:p text:style-name="P8"/>
      <text:p text:style-name="P5"><text:span text:style-name="T2">Article III</text:span><text:span text:style-name="T3"><text:line-break/> Membership</text:span></text:p>
      <text:p text:style-name="P10"><text:span text:style-name="T8">§ 3.1. Provisional Membership</text:span></text:p>
      <text:p text:style-name="P9"><text:span text:style-name="T7">Any person may become a provisional member of a Society upon the vouching of a current member in good standing. The vouching member affirms that they know the candidate and believe their participation to be consistent with the purposes of the Society. Provisional members participate in the common life and work of the Society and may vote in referenda. They are not eligible for sortition selection to any governing body.</text:span></text:p>
      <text:p text:style-name="P10"><text:span text:style-name="T8">§ 3.2. Full Membership</text:span></text:p>
      <text:p text:style-name="P9"><text:span text:style-name="T7">A provisional member becomes a full member upon taking the membership oath before witnesses drawn from the membership. The oath is a public commitment to the obligations of membership and to the purposes of the Society. Full members are eligible for all forms of participation, including sortition selection to governing bodies.</text:span></text:p>
      <text:p text:style-name="P10"><text:span text:style-name="T8">§ 3.3. Obligations of Membership</text:span></text:p>
      <text:p text:style-name="P9"><text:span text:style-name="T7">Membership is not merely a status — it is an ongoing commitment. Members bear genuine obligation to the common life: to participate in the work of the Society, to attend to its governance, to act with honesty and care toward fellow members, and to transmit what they know to those who come after them. The Society, in turn, bears obligation to each member — to build the conditions in which they can genuinely flourish.</text:span></text:p>
      <text:p text:style-name="P10"><text:span text:style-name="T8">§ 3.4. Membership and Institutional Compatibility</text:span></text:p>
      <text:p text:style-name="P9"><text:span text:style-name="T7">Membership is open to any person whose primary institutional relationships are compatible with genuine accountability to this community and its members. The Society recognizes that persons are shaped by the institutions they inhabit, and that certain institutional formations are structurally incompatible with the purposes and obligations of membership — not as a moral judgment on the person, but as a recognition of the real effects of institutional life on instinct, judgment, and loyalty.</text:span></text:p>
      <text:p text:style-name="P9"><text:span text:style-name="T7">This Definition establishes two tiers of restriction. Tier One imposes categorical exclusion: persons currently occupying a listed role are ineligible for membership in </text:span><text:soft-page-break/><text:span text:style-name="T7">any form while that role is held. Upon genuinely leaving the role, a person becomes subject to Tier Two. Tier Two imposes a waiting period before provisional membership may be sought, followed by an extended provisional period before the oath may be taken. Both periods are defined by role and stated below. These restrictions exist not as punishment but as recognition that institutional formation takes time to decompress, and that the community's integrity requires that decompression to occur before full participation begins.</text:span></text:p>
      <text:p text:style-name="P10"><text:span text:style-name="T8">§ 3.5. Tier One: Categorical Exclusion</text:span></text:p>
      <text:p text:style-name="P9"><text:span text:style-name="T7">The following roles constitute categorical exclusion under Tier One. Persons currently occupying any of these roles are ineligible for membership in any form. This prohibition holds for the duration of the role and is lifted only upon its genuine conclusion:</text:span></text:p>
      <text:p text:style-name="P11"><text:span text:style-name="T7">The President of the United States.</text:span></text:p>
      <text:p text:style-name="P11"><text:span text:style-name="T7">Members of the United States Cabinet.</text:span></text:p>
      <text:p text:style-name="P11"><text:span text:style-name="T7">Members of the United States Senate.</text:span></text:p>
      <text:p text:style-name="P11"><text:span text:style-name="T7">Members of the United States House of Representatives.</text:span></text:p>
      <text:p text:style-name="P11"><text:span text:style-name="T7">Elected officials of any state government.</text:span></text:p>
      <text:p text:style-name="P11"><text:span text:style-name="T7">Ambassadors of the United States.</text:span></text:p>
      <text:p text:style-name="P11"><text:span text:style-name="T7">Federal judges, including Justices of the Supreme Court of the United States.</text:span></text:p>
      <text:p text:style-name="P11"><text:span text:style-name="T7">Chairs and senior national officials of major political parties.</text:span></text:p>
      <text:p text:style-name="P11"><text:span text:style-name="T7">Flag officers of the United States Armed Forces.</text:span></text:p>
      <text:p text:style-name="P11"><text:span text:style-name="T7">Senior officials of the United States intelligence community.</text:span></text:p>
      <text:p text:style-name="P11"><text:span text:style-name="T7">Chief Executive Officers of publicly listed companies.</text:span></text:p>
      <text:p text:style-name="P11"><text:span text:style-name="T7">Partners of private equity and venture capital firms.</text:span></text:p>
      <text:p text:style-name="P11"><text:span text:style-name="T7">Managers of hedge funds.</text:span></text:p>
      <text:p text:style-name="P11"><text:span text:style-name="T7">Persons with a net worth of one billion dollars or more.</text:span></text:p>
      <text:p text:style-name="P11"><text:span text:style-name="T7">Registered lobbyists.</text:span></text:p>
      <text:p text:style-name="P11"><text:span text:style-name="T7">Persons holding a national platform in partisan media.</text:span></text:p>
      <text:p text:style-name="P11"><text:span text:style-name="T7">Pastors of congregations with a national platform or membership exceeding a scale at which genuine pastoral relationship is possible.</text:span></text:p>
      <text:p text:style-name="P11"><text:span text:style-name="T7">Recipients of major entertainment industry awards, including the Grammy, Emmy, Academy Award, and Tony.</text:span></text:p>
      <text:p text:style-name="P11"><text:span text:style-name="T7">Presidents of universities and colleges.</text:span></text:p>
      <text:p text:style-name="P10"><text:span text:style-name="T8">§ 3.6. Tier Two: Waiting Period and Extended Provisional Period</text:span></text:p>
      <text:p text:style-name="P9"><text:soft-page-break/><text:span text:style-name="T7">Persons who have formerly held a Tier One role are subject to the waiting periods and extended provisional periods specified below. The waiting period begins on the date the role was genuinely relinquished. A person may not seek provisional membership until the waiting period is complete. Upon admission to provisional membership, the person must complete the extended provisional period before becoming eligible to take the oath of full membership. Both periods are measured in years.</text:span></text:p>
      <text:p text:style-name="P9"><text:span text:style-name="T7">President of the United States: ten years waiting, ten years provisional.</text:span></text:p>
      <text:p text:style-name="P9"><text:span text:style-name="T7">Members of the United States Senate: six years waiting, six years provisional.</text:span></text:p>
      <text:p text:style-name="P9"><text:span text:style-name="T7">Members of the United States Cabinet: five years waiting, five years provisional.</text:span></text:p>
      <text:p text:style-name="P9"><text:span text:style-name="T7">Federal judges, including Justices of the Supreme Court: six years waiting, six years provisional.</text:span></text:p>
      <text:p text:style-name="P9"><text:span text:style-name="T7">Chief Executive Officers of publicly listed companies: six years waiting, six years provisional.</text:span></text:p>
      <text:p text:style-name="P9"><text:span text:style-name="T7">Partners of private equity and venture capital firms: six years waiting, six years provisional.</text:span></text:p>
      <text:p text:style-name="P9"><text:span text:style-name="T7">Persons with a net worth of one billion dollars or more: six years waiting, six years provisional.</text:span></text:p>
      <text:p text:style-name="P9"><text:span text:style-name="T7">Members of the United States House of Representatives: three years waiting, three years provisional.</text:span></text:p>
      <text:p text:style-name="P9"><text:span text:style-name="T7">Ambassadors of the United States: four years waiting, four years provisional.</text:span></text:p>
      <text:p text:style-name="P9"><text:span text:style-name="T7">Flag officers of the United States Armed Forces: four years waiting, four years provisional.</text:span></text:p>
      <text:p text:style-name="P9"><text:span text:style-name="T7">Senior officials of the United States intelligence community: four years waiting, four years provisional.</text:span></text:p>
      <text:p text:style-name="P9"><text:span text:style-name="T7">Chairs and senior national officials of major political parties: three years waiting, three years provisional.</text:span></text:p>
      <text:p text:style-name="P9"><text:span text:style-name="T7">Managers of hedge funds: four years waiting, four years provisional.</text:span></text:p>
      <text:p text:style-name="P9"><text:span text:style-name="T7">Presidents of universities and colleges: four years waiting, four years provisional.</text:span></text:p>
      <text:p text:style-name="P9"><text:span text:style-name="T7">Registered lobbyists: three years waiting, three years provisional.</text:span></text:p>
      <text:p text:style-name="P9"><text:span text:style-name="T7">Persons holding a national platform in partisan media: three years waiting, three years provisional.</text:span></text:p>
      <text:p text:style-name="P9"><text:span text:style-name="T7">Elected officials of any state government: two years waiting, two years provisional.</text:span></text:p>
      <text:p text:style-name="P9"><text:span text:style-name="T7">Recipients of major entertainment industry awards: one year waiting, one year provisional.</text:span></text:p>
      <text:p text:style-name="P9"><text:span text:style-name="T7">Pastors of congregations meeting the threshold described in Section 3.5: one year waiting, one year provisional.</text:span></text:p>
      <text:p text:style-name="P8"><text:soft-page-break/></text:p>
      <text:p text:style-name="P5"><text:span text:style-name="T2">Article IV</text:span><text:span text:style-name="T3"><text:line-break/> Governing Bodies</text:span></text:p>
      <text:p text:style-name="P10"><text:span text:style-name="T8">§ 4.1. Types of Governing Bodies</text:span></text:p>
      <text:p text:style-name="P9"><text:span text:style-name="T7">A Resolute Society shall organize its governing life through four types of bodies, each created by and ultimately accountable to the General Assembly: the General Assembly itself, which is the sovereign body; Committees, which exercise delegated authority for specific purposes; Executive Divisions, which deliver services in a single domain; and Colleges, which organize members by shared knowledge and practice. Each body is distinct in its purpose, its selection, and the scope of its authority.</text:span></text:p>
      <text:p text:style-name="P10"><text:span text:style-name="T8">§ 4.2. Source of Authority</text:span></text:p>
      <text:p text:style-name="P9"><text:span text:style-name="T7">All governing authority within a Resolute Society flows from the General Assembly. No body, officer, or member exercises authority except as delegated by or derived from the Assembly. The Assembly may reclaim any delegated authority at any time, subject to the protections established in this Definition.</text:span></text:p>
      <text:p text:style-name="P8"/>
      <text:p text:style-name="P5"><text:span text:style-name="T2">Article V</text:span><text:span text:style-name="T3"><text:line-break/> The General Assembly</text:span></text:p>
      <text:p text:style-name="P10"><text:span text:style-name="T8">§ 5.1. Sovereignty</text:span></text:p>
      <text:p text:style-name="P9"><text:span text:style-name="T7">The General Assembly is the sovereign body of the Society. It is the primary expression of the community's self-governance and the source of all delegated authority. Its decisions bind the Society unless they are inconsistent with this Definition.</text:span></text:p>
      <text:p text:style-name="P10"><text:span text:style-name="T8">§ 5.2. Composition and Selection</text:span></text:p>
      <text:p text:style-name="P9"><text:span text:style-name="T7">The General Assembly shall consist of nine members, selected by sortition from the pool of eligible full members. The sortition draw shall take place each November, immediately following the Society referendum, and shall be conducted publicly before the membership. The incoming Assembly takes office on the first day of January and serves through the thirty-first day of December. No member shall serve consecutive terms on the General Assembly.</text:span></text:p>
      <text:p text:style-name="P10"><text:span text:style-name="T8">§ 5.3. Presiding Member</text:span></text:p>
      <text:p text:style-name="P9"><text:span text:style-name="T7">Each session of the General Assembly shall be presided over by a member of the Assembly according to a rotation established at the beginning of each term. The rotation proceeds through all Assembly members in sequence. The presiding member holds the floor, manages deliberation, and calls votes. The presiding member votes as a full member of the Assembly.</text:span></text:p>
      <text:p text:style-name="P10"><text:span text:style-name="T8">§ 5.4. Sessions</text:span></text:p>
      <text:p text:style-name="P9"><text:soft-page-break/><text:span text:style-name="T7">The General Assembly shall meet on a regular cadence established in the Society's constitution. Any member of the Assembly may call a special session. Notice of all sessions shall be provided to the full membership in sufficient time to permit attendance.</text:span></text:p>
      <text:p text:style-name="P10"><text:span text:style-name="T8">§ 5.5. Petitions</text:span></text:p>
      <text:p text:style-name="P9"><text:span text:style-name="T7">The primary channel through which the Society communicates with the General Assembly is the petition. Any member or group of members may submit a petition to the Assembly. The Assembly shall acknowledge every petition received. The Assembly's obligation is not to adopt every petition but to take seriously the concerns it expresses and to translate them into coherent policy through deliberation and judgment.</text:span></text:p>
      <text:p text:style-name="P9"><text:span text:style-name="T7">A petition may also instruct the General Assembly to place a specific question on the annual referendum. The Assembly shall place such a question on the referendum when a petition meets the signature threshold established in the Society's constitution.</text:span></text:p>
      <text:p text:style-name="P10"><text:span text:style-name="T8">§ 5.6. Authority over Executive Divisions</text:span></text:p>
      <text:p text:style-name="P9"><text:span text:style-name="T7">The General Assembly may exercise authority over Executive Divisions directly or may delegate that oversight to a Committee constituted for that purpose. Delegation does not diminish the Assembly's ultimate authority. The Assembly may reclaim direct oversight at any time.</text:span></text:p>
      <text:p text:style-name="P8"/>
      <text:p text:style-name="P5"><text:span text:style-name="T2">Article VI</text:span><text:span text:style-name="T3"><text:line-break/> The Annual Referendum</text:span></text:p>
      <text:p text:style-name="P10"><text:span text:style-name="T8">§ 6.1. The Referendum</text:span></text:p>
      <text:p text:style-name="P9"><text:span text:style-name="T7">Each November, the Society shall hold an annual referendum. All members — provisional and full — are eligible to participate. The referendum is the direct expression of the Society's sovereign will and shall be treated as such by the General Assembly.</text:span></text:p>
      <text:p text:style-name="P10"><text:span text:style-name="T8">§ 6.2. Agenda</text:span></text:p>
      <text:p text:style-name="P9"><text:span text:style-name="T7">The General Assembly sets the agenda of the referendum, subject to the petition provisions of Section 5.5. Questions placed on the referendum by petition carry the same standing as questions placed by the Assembly.</text:span></text:p>
      <text:p text:style-name="P10"><text:span text:style-name="T8">§ 6.3. Sequence</text:span></text:p>
      <text:p text:style-name="P9"><text:span text:style-name="T7">The referendum shall be held before the sortition draw for the incoming General Assembly. The results of the referendum shall be among the first matters considered by the incoming Assembly.</text:span></text:p>
      <text:p text:style-name="P8"/>
      <text:p text:style-name="P5"><text:soft-page-break/><text:span text:style-name="T2">Article VII</text:span><text:span text:style-name="T3"><text:line-break/> Committees</text:span></text:p>
      <text:p text:style-name="P10"><text:span text:style-name="T8">§ 7.1. Nature and Creation</text:span></text:p>
      <text:p text:style-name="P9"><text:span text:style-name="T7">A Committee is a body created by the General Assembly to exercise delegated authority for a specific purpose. Committees are not standing features of the Society's governance but instruments of the Assembly's will, constituted when needed and dissolved when their purpose is fulfilled or the Assembly determines otherwise.</text:span></text:p>
      <text:p text:style-name="P10"><text:span text:style-name="T8">§ 7.2. Selection by Sortition</text:span></text:p>
      <text:p text:style-name="P9"><text:span text:style-name="T7">Committee members are selected by sortition. The General Assembly determines from which pool each Committee is drawn: the full membership of the Society, or the membership of a designated College. Sortition ensures that Committee authority does not accumulate in self-selected persons and that the experience of governance is distributed broadly through the membership over time.</text:span></text:p>
      <text:p text:style-name="P10"><text:span text:style-name="T8">§ 7.3. Scope and Accountability</text:span></text:p>
      <text:p text:style-name="P9"><text:span text:style-name="T7">Each Committee operates within the scope defined by the General Assembly at its creation. Committees report to the Assembly and may not exceed the authority delegated to them. The Assembly may modify, expand, or dissolve any Committee at any time.</text:span></text:p>
      <text:p text:style-name="P8"/>
      <text:p text:style-name="P5"><text:span text:style-name="T2">Article VIII</text:span><text:span text:style-name="T3"><text:line-break/> Executive Divisions</text:span></text:p>
      <text:p text:style-name="P10"><text:span text:style-name="T8">§ 8.1. Nature and Purpose</text:span></text:p>
      <text:p text:style-name="P9"><text:span text:style-name="T7">An Executive Division is a body responsible for the delivery of services in a single domain of community life — food, housing, health, and similar — and for the operational capacity to fulfill that responsibility. Divisions are the Society's executive arm: they do not deliberate policy but implement it, and do not make decisions reserved to the General Assembly but exercise genuine autonomy within their domain.</text:span></text:p>
      <text:p text:style-name="P10"><text:span text:style-name="T8">§ 8.2. Creation</text:span></text:p>
      <text:p text:style-name="P9"><text:span text:style-name="T7">Executive Divisions are created by the General Assembly. The Assembly defines the domain of each Division at its creation. The Society's constitution shall identify the Divisions constituted at founding.</text:span></text:p>
      <text:p text:style-name="P10"><text:span text:style-name="T8">§ 8.3. Division Officers and the Officer Corps</text:span></text:p>
      <text:p text:style-name="P9"><text:span text:style-name="T7">Each Executive Division is led by a Division Officer elected by the members of the Division. Division Officers are collectively known as the Officer Corps. The Officer Corps may meet collectively or in part as they deem appropriate to coordinate the Society's operational life. The Officer Corps holds no governing authority as a body — authority remains with the General Assembly and the individual Divisions.</text:span></text:p>
      <text:p text:style-name="P10"><text:span text:style-name="T8">§ 8.4. Autonomy and Emergency Authority</text:span></text:p>
      <text:p text:style-name="P9"><text:soft-page-break/><text:span text:style-name="T7">Executive Divisions exercise genuine autonomy in their day-to-day operations within the scope established by the General Assembly. In emergencies, Divisions are expected to act independently and decisively in their domain without waiting for Assembly direction. The capacity to function without instruction is a design requirement, not an exception.</text:span></text:p>
      <text:p text:style-name="P10"><text:span text:style-name="T8">§ 8.5. Accountability</text:span></text:p>
      <text:p text:style-name="P9"><text:span text:style-name="T7">Executive Divisions are accountable to the General Assembly. The Assembly may direct, modify, or dissolve any Division except as provided in Section 8.6.</text:span></text:p>
      <text:p text:style-name="P10"><text:span text:style-name="T8">§ 8.6. The Division of Conciliation</text:span></text:p>
      <text:p text:style-name="P9"><text:span text:style-name="T7">There shall be a Division of Conciliation responsible for the resolution of injuries and contract disputes between members and between members and associations of the Society. The Division of Conciliation is constitutionally permanent and may not be dissolved by the General Assembly. Its permanence is essential to its independence, and its independence is essential to its function.</text:span></text:p>
      <text:p text:style-name="P9"><text:span text:style-name="T7">The Division of Conciliation shall be governed by a Committee drawn by sortition from the full membership. A Division Officer, selected by or accountable to that Committee, shall manage its day-to-day operations. The Committee governing the Division of Conciliation has the authority to review and set aside decisions of the Division Officer where the integrity of a proceeding requires it.</text:span></text:p>
      <text:p text:style-name="P8"/>
      <text:p text:style-name="P5"><text:span text:style-name="T2">Article IX</text:span><text:span text:style-name="T3"><text:line-break/> Colleges</text:span></text:p>
      <text:p text:style-name="P10"><text:span text:style-name="T8">§ 9.1. Nature and Purpose</text:span></text:p>
      <text:p text:style-name="P9"><text:span text:style-name="T7">A College is a body of peers organized around a shared domain of knowledge and practice. Colleges exist to preserve and transmit knowledge, to establish standards of practice within their domain, and to organize the Society's knowledge-holders into a community of mutual accountability and ongoing formation.</text:span></text:p>
      <text:p text:style-name="P10"><text:span text:style-name="T8">§ 9.2. Creation and Dissolution</text:span></text:p>
      <text:p text:style-name="P9"><text:span text:style-name="T7">Colleges are created and dissolved by the General Assembly. The Assembly defines the domain of each College at its creation.</text:span></text:p>
      <text:p text:style-name="P10"><text:span text:style-name="T8">§ 9.3. Self-Governance</text:span></text:p>
      <text:p text:style-name="P9"><text:span text:style-name="T7">Each College establishes its own rules, standards, and entrance criteria within its domain. Colleges govern their internal life without Assembly direction in ordinary circumstances. They are accountable to the General Assembly, which retains the authority to dissolve a College or to direct it where the Society's interests require.</text:span></text:p>
      <text:p text:style-name="P10"><text:span text:style-name="T8">§ 9.4. Colleges and Committees</text:span></text:p>
      <text:p text:style-name="P9"><text:span text:style-name="T7">The General Assembly may direct that a Committee be drawn by sortition from the membership of a College when the subject matter of the Committee's work falls within </text:span><text:soft-page-break/><text:span text:style-name="T7">that College's domain. A Committee so drawn exercises the General Assembly's authority, not the College's, and reports to the Assembly accordingly.</text:span></text:p>
      <text:p text:style-name="P8"/>
      <text:p text:style-name="P5"><text:span text:style-name="T2">Article X</text:span><text:span text:style-name="T3"><text:line-break/> Conciliation and the Resolution of Harm</text:span></text:p>
      <text:p text:style-name="P10"><text:span text:style-name="T8">§ 10.1. Orientation</text:span></text:p>
      <text:p text:style-name="P9"><text:span text:style-name="T7">When harm is done within this community, the Society asks not what punishment is deserved but what repair is possible. The needs of those who have been harmed are the primary concern of any proceeding. The Division of Conciliation builds its processes around this commitment.</text:span></text:p>
      <text:p text:style-name="P10"><text:span text:style-name="T8">§ 10.2. Jurisdiction</text:span></text:p>
      <text:p text:style-name="P9"><text:span text:style-name="T7">The Division of Conciliation has jurisdiction over injuries caused by the actions of a member or association, and over disputes arising from agreements and obligations between members or between members and associations of the Society.</text:span></text:p>
      <text:p text:style-name="P10"><text:span text:style-name="T8">§ 10.3. Mediators</text:span></text:p>
      <text:p text:style-name="P9"><text:span text:style-name="T7">A Mediator is assigned to each matter brought before the Division of Conciliation. The Mediator is the primary responsible party for the matter, takes ownership of its resolution, and has the authority to resolve straightforward cases without further escalation. The Mediator exercises genuine practical judgment — not merely procedural management — in the pursuit of resolution.</text:span></text:p>
      <text:p text:style-name="P10"><text:span text:style-name="T8">§ 10.4. Juries</text:span></text:p>
      <text:p text:style-name="P9"><text:span text:style-name="T7">In cases of sufficient gravity, a Jury shall be convened. Juries are selected by sortition from the full membership of the Society. The Mediator remains involved in Jury proceedings but does not hold decision authority over the questions committed to the Jury.</text:span></text:p>
      <text:p text:style-name="P9"><text:span text:style-name="T7">The Jury's function is not to render a simple verdict but to exercise full practical judgment in response to a structured set of questions specific to the type of matter before them. These questions shall be developed and maintained by the Division of Conciliation and shall vary by the type of harm or dispute. Jurors are expected to deliberate genuinely, to bring their full wisdom to each question, and to reach conclusions that can guide meaningful repair.</text:span></text:p>
      <text:p text:style-name="P8"/>
      <text:p text:style-name="P5"><text:span text:style-name="T2">Article XI</text:span><text:span text:style-name="T3"><text:line-break/> Sortition</text:span></text:p>
      <text:p text:style-name="P10"><text:span text:style-name="T8">§ 11.1. Principle</text:span></text:p>
      <text:p text:style-name="P9"><text:span text:style-name="T7">Sortition — selection by lot — is the primary mechanism by which members are chosen for governing bodies in a Resolute Society. It distributes the experience of </text:span><text:soft-page-break/><text:span text:style-name="T7">governance broadly, prevents the accumulation of power in self-selected individuals, and embodies the commitment to equal standing that is at the heart of this Society's purpose.</text:span></text:p>
      <text:p text:style-name="P10"><text:span text:style-name="T8">§ 11.2. Eligibility</text:span></text:p>
      <text:p text:style-name="P9"><text:span text:style-name="T7">Only full members are eligible for sortition selection to governing bodies. Full membership is the only eligibility requirement except as provided in Section 11.3.</text:span></text:p>
      <text:p text:style-name="P10"><text:span text:style-name="T8">§ 11.3. No Consecutive Terms</text:span></text:p>
      <text:p text:style-name="P9"><text:span text:style-name="T7">No member shall serve consecutive terms on the same governing body. A member selected by sortition who has served on a body is ineligible for selection to that same body in the immediately following term. If a sortition draw produces a result that would violate this provision, the draw for that position shall be repeated.</text:span></text:p>
      <text:p text:style-name="P10"><text:span text:style-name="T8">§ 11.4. Public Draw</text:span></text:p>
      <text:p text:style-name="P9"><text:span text:style-name="T7">Sortition draws shall be conducted publicly before the membership. The mechanism of selection shall be physical and transparent, permitting all members present to witness the process and verify its integrity.</text:span></text:p>
      <text:p text:style-name="P8"/>
      <text:p text:style-name="P5"><text:span text:style-name="T2">Article XII</text:span><text:span text:style-name="T3"><text:line-break/> The Pre-Political Character of the Society</text:span></text:p>
      <text:p text:style-name="P10"><text:span text:style-name="T8">§ 12.1. Foundation</text:span></text:p>
      <text:p text:style-name="P9"><text:span text:style-name="T7">A Resolute Society is a pre-political institution. It exists at a level of human life more fundamental than partisan politics — the level of community, mutual obligation, shared work, and the transmission of knowledge from one generation to the next. These things preceded the current political order and will outlast it. The Society does not avoid politics out of timidity or indifference. It refuses politics because its work belongs to a different and more durable register of human life.</text:span></text:p>
      <text:p text:style-name="P10"><text:span text:style-name="T8">§ 12.2. Institutional Prohibitions</text:span></text:p>
      <text:p text:style-name="P9"><text:span text:style-name="T7">The Society as an institution shall take no position on partisan political questions, endorse no candidate or political party, and organize its membership toward no electoral or legislative outcome. No Society resource — its treasury, its platform, its physical spaces, its membership, or the relationships formed within it — may be used for partisan political activity. No officer, division, or college may speak on behalf of the Society on partisan political matters. Violation of this provision by any officer is grounds for removal. Violation by any body is grounds for dissolution by the General Assembly.</text:span></text:p>
      <text:p text:style-name="P10"><text:span text:style-name="T8">§ 12.3. Member Conduct</text:span></text:p>
      <text:p text:style-name="P9"><text:span text:style-name="T7">Members' political lives outside the Society are entirely their own. The Society makes no claim on how members vote, what candidates they support, or what political positions they hold as individuals. At the same time, no member may use Society relationships, standing, spaces, or resources to advance partisan political goals within </text:span><text:soft-page-break/><text:span text:style-name="T7">or through the Society. The Society is not a vehicle for political organizing of any kind, from any direction. Attempts to make it one are a violation of membership obligations and subject to review by the Division of Conciliation.</text:span></text:p>
      <text:p text:style-name="P10"><text:span text:style-name="T8">§ 12.4. Engagement with Captured Questions</text:span></text:p>
      <text:p text:style-name="P9"><text:span text:style-name="T7">The Society's pre-political character does not require silence on questions that partisan politics has claimed. Many of the most important questions facing communities — how to sustain a livable economy, how to care for the sick, how to build housing, how to govern ourselves honestly — have been captured by partisan framing without being resolved by it. The Society engages with these questions from its own philosophical foundation, applying its axioms and principles honestly wherever they lead. What the Society refuses is not engagement but the terms of engagement that partisan politics imposes — the demand to choose a side within a frame it did not build and does not accept. The Society examines the frame. It does not argue within it.</text:span></text:p>
      <text:p text:style-name="P10"><text:span text:style-name="T8">§ 12.5. Institutional Self-Defense</text:span></text:p>
      <text:p text:style-name="P9"><text:span text:style-name="T7">The Society may speak and act in defense of its own existence, the basic rights of its members, and the conditions necessary for genuine community life. This is not political activity — it is the irreducible minimum of self-governance that any community must retain. Such action shall be grounded explicitly in the Society's principles and shall not be used as a vehicle for broader political positioning.</text:span></text:p>
      <text:p text:style-name="P8"/>
      <text:p text:style-name="P5"><text:span text:style-name="T2">Article XIII</text:span><text:span text:style-name="T3"><text:line-break/> The Society and Commercial Life</text:span></text:p>
      <text:p text:style-name="P10"><text:span text:style-name="T8">§ 13.1. The Threat of Commercial Colonization</text:span></text:p>
      <text:p text:style-name="P9"><text:span text:style-name="T7">Corporate institutions and market logic will, if permitted, colonize the space of genuine community. This is not a matter of individual bad faith — it is the structural tendency of market logic to convert every human relationship into a commercial one, every common good into a commodity, and every institution into a vehicle for accumulation. The Society recognizes this tendency as one of the defining forces it was built to resist. Vigilance against commercial colonization is not optional — it is a permanent structural obligation of every Society and every member.</text:span></text:p>
      <text:p text:style-name="P10"><text:span text:style-name="T8">§ 13.2. Use and Governance</text:span></text:p>
      <text:p text:style-name="P9"><text:span text:style-name="T7">The Society may transact with the commercial economy where necessary. It may purchase goods and services, maintain accounts with financial institutions, and use commercial infrastructure in the conduct of its work. What it may not do is organize itself according to commercial logic or permit commercial relationships to enter its governance. The boundary is between use and governance: the Society uses markets where it must; it is never governed by them. No commercial relationship — however beneficial in appearance — confers any influence over the Society's decisions, its membership, its spaces, or its purpose.</text:span></text:p>
      <text:p text:style-name="P10"><text:span text:style-name="T8">§ 13.3. Prohibited Dependencies</text:span></text:p>
      <text:p text:style-name="P9"><text:soft-page-break/><text:span text:style-name="T7">The following are prohibited in every Resolute Society:</text:span></text:p>
      <text:p text:style-name="P9"><text:span text:style-name="T7">Corporate donations, grants, or sponsorships of any kind. The Society accepts no money from corporations, corporate foundations, or entities whose primary purpose is the generation of profit. This prohibition applies regardless of the apparent alignment of the donor's interests with the Society's purposes.</text:span></text:p>
      <text:p text:style-name="P9"><text:span text:style-name="T7">Naming rights, branding arrangements, or any agreement that associates the Society's name, spaces, programs, or events with a commercial entity.</text:span></text:p>
      <text:p text:style-name="P9"><text:span text:style-name="T7">Commercial partnerships that create ongoing obligation — exclusive supply relationships, preferred vendor arrangements, or any agreement that gives a commercial entity preferential access to or standing within the Society.</text:span></text:p>
      <text:p text:style-name="P9"><text:span text:style-name="T7">Any arrangement by which a commercial entity acquires influence over the Society's governance, membership decisions, programs, or physical spaces, whether through contract, debt, or the terms of a service relationship.</text:span></text:p>
      <text:p text:style-name="P10"><text:span text:style-name="T8">§ 13.4. Infrastructure Independence</text:span></text:p>
      <text:p text:style-name="P9"><text:span text:style-name="T7">Dependence on corporate infrastructure — communication platforms, payment processors, cloud services, supply chains — is a structural vulnerability that commercial actors can exploit through terms-of-service changes, deplatforming, or the withdrawal of services. The Society treats such dependency as a risk to be actively managed and reduced over time. Every Society shall work toward operational independence from corporate infrastructure in proportion to its capacity, prioritizing the functions most critical to its survival and governance. Dependency that cannot yet be eliminated shall be acknowledged, documented, and subject to ongoing effort toward reduction.</text:span></text:p>
      <text:p text:style-name="P10"><text:span text:style-name="T8">§ 13.5. Internal Economy as Defense</text:span></text:p>
      <text:p text:style-name="P9"><text:span text:style-name="T7">The Society's internal economy — its mutual credit system, its commons, its working groups and divisions — is not merely a practical arrangement. It is the primary structural defense against commercial colonization. Every capacity the Society builds internally is leverage that external commercial relationships cannot exercise. Every need met within the community is a need that cannot be used to create dependency. The Society builds internal economic capacity not only because it is useful but because it is protective — the most durable shield against the logic it was built to resist.</text:span></text:p>
      <text:p text:style-name="P10"><text:span text:style-name="T8">§ 13.6. Member Conduct</text:span></text:p>
      <text:p text:style-name="P9"><text:span text:style-name="T7">No member may use their standing within the Society to advance the commercial interests of an outside entity. No member acting in a commercial capacity may represent that the Society endorses, recommends, or is affiliated with their commercial activity. Members who hold significant commercial interests that create conflicts with the Society's purposes are expected to disclose those interests and to recuse themselves from decisions in which those interests are implicated.</text:span></text:p>
      <text:p text:style-name="P8"/>
      <text:p text:style-name="P5"><text:soft-page-break/><text:span text:style-name="T2">Article XIV</text:span><text:span text:style-name="T3"><text:line-break/> Religion and the Common Life</text:span></text:p>
      <text:p text:style-name="P10"><text:span text:style-name="T8">§ 14.1. The Pre-Religious Character of the Society</text:span></text:p>
      <text:p text:style-name="P9"><text:span text:style-name="T7">A Resolute Society holds no religious position and endorses no religious tradition. The work of building genuine community — mutual obligation, shared labor, the transmission of knowledge, the care of persons — precedes every religious tradition and is accessible to people of all faiths and none. The Society's common life is grounded in its own principles, conducted in its own language, and organized around its own ceremonies. It does not borrow the forms of any religious tradition as its own, nor does it require any religious commitment as a condition of membership or belonging.</text:span></text:p>
      <text:p text:style-name="P10"><text:span text:style-name="T8">§ 14.2. Members and Faith</text:span></text:p>
      <text:p text:style-name="P9"><text:span text:style-name="T7">Members bring their whole selves to the Society, and for many people faith is inseparable from who they are. Members may express their faith freely within the community. The Society welcomes this — not as a concession but as a recognition that genuine community includes the full person. What members may not do is represent the Society as holding any religious position, conduct Society business in explicitly religious terms that exclude members of other traditions, or use Society spaces and occasions as vehicles for religious expression that makes members of minority faiths or no faith feel unwelcome.</text:span></text:p>
      <text:p text:style-name="P10"><text:span text:style-name="T8">§ 14.3. The Test of Full Participation</text:span></text:p>
      <text:p text:style-name="P9"><text:span text:style-name="T7">The practical standard for any Society action, ceremony, or common occasion is this: could a person of any faith tradition — or no faith tradition — participate fully and with dignity? Where the answer is yes, the Society proceeds. Where the answer is no, the Society reconsiders. This is not a demand for the erasure of religious life from community space. It is a demand that the Society's own ground remain genuinely common — held in trust for every member, not claimed by the majority.</text:span></text:p>
      <text:p text:style-name="P10"><text:span text:style-name="T8">§ 14.4. Shared Inheritance</text:span></text:p>
      <text:p text:style-name="P9"><text:span text:style-name="T7">The Society recognizes that its deepest commitments — the equal dignity of persons, the obligation we bear to one another, the sacred worth of every human life, the responsibility to those who come after us — find expression across many religious and philosophical traditions. It honors that resonance without claiming any tradition as its own. The Society did not invent these commitments. It inherits them from a long human conversation that runs through many faiths, many cultures, and many centuries. It carries them forward on its own terms.</text:span></text:p>
      <text:p text:style-name="P8"/>
      <text:p text:style-name="P5"><text:span text:style-name="T2">Article XVI</text:span><text:span text:style-name="T3"><text:line-break/> The Oath</text:span></text:p>
      <text:p text:style-name="P10"><text:span text:style-name="T8">§ 16.1. The Threshold of Full Membership</text:span></text:p>
      <text:p text:style-name="P9"><text:soft-page-break/><text:span text:style-name="T7">The oath of membership is the threshold between provisional and full membership. It is a public act, taken before witnesses drawn from the membership, in which the candidate affirms their commitment to the obligations of membership and to the purposes of the Society. It is not a formality — it is the moment at which the community receives a new member as fully its own, and the member receives the community as fully theirs.</text:span></text:p>
      <text:p text:style-name="P10"><text:span text:style-name="T8">§ 16.2. Form and Witness</text:span></text:p>
      <text:p text:style-name="P9"><text:span text:style-name="T7">The oath shall be taken aloud, in the presence of assembled members. The act of public witness is essential — the community receives the commitment together, and the commitment is made to the community as a whole, not to any officer or body. No oath taken in private is valid for the purposes of full membership.</text:span></text:p>
      <text:p text:style-name="P10"><text:span text:style-name="T8">§ 16.3. Text</text:span></text:p>
      <text:p text:style-name="P9"><text:span text:style-name="T7">The full text of the membership oath shall be established by the founding membership and recorded in the Society's founding documents. It shall be consistent with this Definition and shall not be altered without the same supermajority required to amend the Society constitution.</text:span></text:p>
      <text:p text:style-name="P8"/>
      <text:p text:style-name="P5"><text:span text:style-name="T2">Article XVII</text:span><text:span text:style-name="T3"><text:line-break/> Founding and Constitution</text:span></text:p>
      <text:p text:style-name="P10"><text:span text:style-name="T8">§ 17.1. The Founding Threshold</text:span></text:p>
      <text:p text:style-name="P9"><text:span text:style-name="T7">A gathering of persons who share the purposes of this Definition may operate as a pre-constitutional Society — holding common work, building relationships, and growing its membership — without formal governance structures. During this period all decisions are made by direct referendum of all participants.</text:span></text:p>
      <text:p text:style-name="P10"><text:span text:style-name="T8">§ 17.2. The Founding Vote</text:span></text:p>
      <text:p text:style-name="P9"><text:span text:style-name="T7">When a Society's membership reaches or exceeds thirty full members, it becomes eligible to constitute itself as a governed Society under this Definition. Formal constitution requires a supermajority vote of the full membership. That vote accomplishes two things simultaneously: it adopts the Society's constitution, and it authorizes the first sortition draw for the General Assembly. These two acts are inseparable — the Society constitutes its governance and draws its first Assembly in a single founding moment.</text:span></text:p>
      <text:p text:style-name="P10"><text:span text:style-name="T8">§ 17.3. Continuity</text:span></text:p>
      <text:p text:style-name="P9"><text:span text:style-name="T7">The founding vote does not interrupt the Society's common life. Work continues, obligations persist, and relationships formed before formal constitution carry forward. The founding moment is a threshold, not a beginning.</text:span></text:p>
      <text:p text:style-name="P8"/>
      <text:p text:style-name="P5"><text:soft-page-break/><text:span text:style-name="T2">Article XVIII</text:span><text:span text:style-name="T3"><text:line-break/> Emergency Governance</text:span></text:p>
      <text:p text:style-name="P10"><text:span text:style-name="T8">§ 18.1. Direct Democracy as Substrate</text:span></text:p>
      <text:p text:style-name="P9"><text:span text:style-name="T7">The General Assembly governs the Society in ordinary times because direct democracy becomes impractical beyond a certain scale. It does not govern because it is more legitimate than direct democracy — it governs as a practical expression of it. The sovereignty of the membership is never transferred to the Assembly. It is exercised through the Assembly when that is practical, and directly when it is not.</text:span></text:p>
      <text:p text:style-name="P10"><text:span text:style-name="T8">§ 18.2. Reversion to Direct Democracy</text:span></text:p>
      <text:p text:style-name="P9"><text:span text:style-name="T7">Whenever the General Assembly is unable to function — through disaster, incapacity, deadlock, or any other cause — any part of the membership may make decisions by direct referendum without waiting for Assembly authorization. No declaration of emergency is required. No special authority need be invoked. The membership's sovereign capacity to govern itself directly is always present and always available.</text:span></text:p>
      <text:p text:style-name="P10"><text:span text:style-name="T8">§ 18.3. Provisional Decisions</text:span></text:p>
      <text:p text:style-name="P9"><text:span text:style-name="T7">Decisions made by direct referendum during a period of Assembly incapacity are provisional. They are binding for the circumstances that required them and hold until the General Assembly is restored and able to address the matter through its ordinary deliberative function. Provisional decisions do not establish general precedent beyond the circumstances that demanded them. When the Assembly is restored, it shall review provisional decisions made in its absence and ratify, modify, or supersede them as the Society's interests require.</text:span></text:p>
      <text:p text:style-name="P8"/>
      <text:p text:style-name="P5"><text:span text:style-name="T2">Article XIX</text:span><text:span text:style-name="T3"><text:line-break/> Dissolution</text:span></text:p>
      <text:p text:style-name="P10"><text:span text:style-name="T8">§ 19.1. Membership Authority</text:span></text:p>
      <text:p text:style-name="P9"><text:span text:style-name="T7">Dissolution of a Resolute Society is always an act of its membership. No external body — including the federation — may dissolve a Society that retains living membership. The decision to dissolve shall be made by supermajority vote of the full membership and shall be preceded by a deliberative period sufficient for members to fully consider the decision and its consequences.</text:span></text:p>
      <text:p text:style-name="P10"><text:span text:style-name="T8">§ 19.2. Distribution of Assets</text:span></text:p>
      <text:p text:style-name="P9"><text:span text:style-name="T7">Upon dissolution, the membership shall determine by vote how the Society's assets — its commons, its physical property, its financial holdings, and any other resources held in common — are to be distributed. Members may distribute assets among themselves, transfer them to sister Societies or the federation, dedicate them to purposes consistent with this Definition, or any combination of these. Where the membership cannot reach agreement, assets pass to the federation to be held in trust and applied to purposes consistent with this Definition.</text:span></text:p>
      <text:p text:style-name="P10"><text:soft-page-break/><text:span text:style-name="T8">§ 19.3. The Kin Currency</text:span></text:p>
      <text:p text:style-name="P9"><text:span text:style-name="T7">The kin currency exists as a social tool for facilitating exchange within the Society. It has no value outside the community that sustains it. Upon dissolution, kin balances dissolve with the Society. The federation shall maintain a record of members' kin balances at dissolution as an acknowledgment of their contribution to the Society's common life, but is under no obligation to redeem or convert those balances.</text:span></text:p>
      <text:p text:style-name="P10"><text:span text:style-name="T8">§ 19.4. Federation Administration</text:span></text:p>
      <text:p text:style-name="P9"><text:span text:style-name="T7">Where a Society has lost the entirety of its membership and no member remains to initiate dissolution, the federation may formally dissolve the Society and administer its remaining assets in accordance with Section 19.2. This is an administrative function, not a disciplinary one. The federation acts only to close what has already ended.</text:span></text:p>
      <text:p text:style-name="P8"/>
      <text:p text:style-name="P5"><text:span text:style-name="T2">Article XX</text:span><text:span text:style-name="T3"><text:line-break/> Obligations Between Societies</text:span></text:p>
      <text:p text:style-name="P10"><text:span text:style-name="T8">§ 20.1. The Covenant Extends</text:span></text:p>
      <text:p text:style-name="P9"><text:span text:style-name="T7">The mutual obligation that binds members within a Society extends to bind Societies within the federation. A Society in genuine need has a claim on sister Societies the same way a member in need has a claim on their community. The covenant does not stop at the boundary of a single Society — it scales with the federation.</text:span></text:p>
      <text:p text:style-name="P10"><text:span text:style-name="T8">§ 20.2. Subsistence Between Societies</text:span></text:p>
      <text:p text:style-name="P9"><text:span text:style-name="T7">No Resolute Society shall stand by while a sister Society faces the failure of its members' basic needs — food, shelter, healthcare, safety. The obligation to ensure subsistence that every Society bears toward its own members is owed in equal measure by the federation of Societies toward each Society in crisis. This is not charity — it is the same mutual obligation, extended to the scale of communities.</text:span></text:p>
      <text:p text:style-name="P10"><text:span text:style-name="T8">§ 20.3. Reciprocity</text:span></text:p>
      <text:p text:style-name="P9"><text:span text:style-name="T7">The obligation runs in both directions. A Society that consistently draws on the resources and support of sister Societies without contributing in return is in violation of the same covenant principles that govern individual members. Persistent imbalance shall be addressed through the federation's coordination function, with the goal of restoration rather than punishment.</text:span></text:p>
      <text:p text:style-name="P10"><text:span text:style-name="T8">§ 20.4. The Federation as Coordination</text:span></text:p>
      <text:p text:style-name="P9"><text:span text:style-name="T7">The federation does not create the obligations between Societies — those obligations exist directly, between communities, by virtue of this Definition and the covenant it embodies. The federation exists to make those obligations easier to fulfill: to coordinate mutual aid, to facilitate the sharing of knowledge and resources, to provide infrastructure that individual Societies cannot build alone. It is a tool of the Societies, not their governing authority.</text:span></text:p>
      <text:p text:style-name="P8"><text:soft-page-break/></text:p>
      <text:p text:style-name="P5"><text:span text:style-name="T2">Article XXI</text:span><text:span text:style-name="T3"><text:line-break/> Privacy</text:span></text:p>
      <text:p text:style-name="P10"><text:span text:style-name="T8">§ 21.1. Security of Person and Home</text:span></text:p>
      <text:p text:style-name="P9"><text:span text:style-name="T7">Every member is secure in their person, their home, and their possessions against intrusion by the Society or any of its bodies. The Society has no claim on a member's private space or property. No officer, division, college, or committee may enter a member's home, search their possessions, or compel disclosure of their personal circumstances except through the Division of Conciliation in the course of a properly constituted proceeding, and only to the extent strictly necessary for that proceeding.</text:span></text:p>
      <text:p text:style-name="P10"><text:span text:style-name="T8">§ 21.2. Freedom of Thought and Conscience</text:span></text:p>
      <text:p text:style-name="P9"><text:span text:style-name="T7">The inner life of a member — their thoughts, beliefs, convictions, and conscience — belongs entirely to them. The Society may require conduct consistent with its principles. It may never require conformity of mind. No member shall be questioned, evaluated, or judged on the basis of their private beliefs, and no body of the Society shall attempt to surveil, influence, or shape the interior life of its members.</text:span></text:p>
      <text:p text:style-name="P10"><text:span text:style-name="T8">§ 21.3. Community Knowledge Held in Trust</text:span></text:p>
      <text:p text:style-name="P9"><text:span text:style-name="T7">Genuine community requires genuine knowledge of one another. Members will, over time, come to know things about each other — circumstances, struggles, histories, needs — that would not be shared in less trusting contexts. This knowledge is held in trust. It serves the relationship and the community. It may not be used as leverage, shared without consent beyond what the relationship warrants, weaponized in disputes, or treated as institutional data. The Society is not a surveillance apparatus. What members know of one another they hold as neighbors, not as agents of an institution.</text:span></text:p>
      <text:p text:style-name="P10"><text:span text:style-name="T8">§ 21.4. Records and Information</text:span></text:p>
      <text:p text:style-name="P9"><text:span text:style-name="T7">Records generated in the course of Society life — participation records, kin transaction histories, health information shared in community care contexts, proceedings of the Division of Conciliation — are held by the Society in trust for the purposes for which they were generated. They may not be used for purposes beyond those for which they were collected, shared with external parties without member consent, or retained beyond the period necessary for their purpose. Members have the right to know what records the Society holds about them.</text:span></text:p>
      <text:p text:style-name="P8"/>
      <text:p text:style-name="P5"><text:span text:style-name="T2">Article XXII</text:span><text:span text:style-name="T3"><text:line-break/> Amendment</text:span></text:p>
      <text:p text:style-name="P10"><text:span text:style-name="T8">§ 22.1. Amendment of This Definition</text:span></text:p>
      <text:p text:style-name="P9"><text:soft-page-break/><text:span text:style-name="T7">This Definition may be amended only by the affirmative vote of two consecutive General Assemblies, separated by not less than one full year, followed by ratification by two-thirds of all active members of all Resolute Societies in the federation. No amendment may be made to the provisions establishing the permanence of the Division of Conciliation, the sovereignty of the General Assembly, the pre-political character of the Society, the prohibition on commercial colonization, the pre-religious character of the Society, or the privacy of members.</text:span></text:p>
      <text:p text:style-name="P10"><text:span text:style-name="T8">§ 22.2. Society Constitutions</text:span></text:p>
      <text:p text:style-name="P9"><text:span text:style-name="T7">Each Resolute Society shall adopt a constitution governing its local life. The Society constitution must be consistent with this Definition in all respects. Where the Society constitution is silent, this Definition governs. The Society constitution may provide for its own amendment by a process no less rigorous than a two-thirds supermajority of the full membership.</text:span></text:p>
      <text:p text:style-name="P12"/>
      <text:p text:style-name="P6"><text:span text:style-name="T3">Established this fourth day of July, MMXXVI</text:span></text:p>
      <text:p text:style-name="P7"><text:span text:style-name="T9">The Work Shall Not Be Los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M Fell English SC" svg:font-family="'IM Fell English SC'" style:font-family-generic="roman" style:font-pitch="variable"/>
    <style:font-face style:name="IM Fell English SC1" svg:font-family="'IM Fell English SC'" style:font-family-generic="system" style:font-pitch="variable"/>
    <style:font-face style:name="Liberation Sans" svg:font-family="'Liberation Sans'" style:font-family-generic="swiss" style:font-pitch="variable"/>
    <style:font-face style:name="Libre Baskerville" svg:font-family="'Libre Baskerville'" style:font-family-generic="roman" style:font-pitch="variable"/>
    <style:font-face style:name="Libre Baskerville1" svg:font-family="'Libre Baskerville'"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fo:color="#2c2c2c" loext:opacity="100%" style:font-name="Libre Baskerville" fo:font-size="10.5pt" fo:language="en" fo:country="US" style:letter-kerning="false" style:font-name-asian="Libre Baskerville1" style:font-size-asian="10.5pt" style:language-asian="zh" style:country-asian="CN" style:font-name-complex="Libre Baskerville1"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2c2c2c" loext:opacity="100%" style:font-name="Libre Baskerville" fo:font-size="10.5pt" fo:language="en" fo:country="US" style:letter-kerning="false" style:font-name-asian="Libre Baskerville1" style:font-size-asian="10.5pt" style:language-asian="zh" style:country-asian="CN" style:font-name-complex="Libre Baskerville1" style:font-size-complex="10.5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class="text">
      <style:text-properties fo:color="#2e74b5" loext:opacity="100%" fo:font-size="16pt" style:font-size-asian="16pt" style:font-size-complex="16pt"/>
    </style:style>
    <style:style style:name="Heading_20_2" style:display-name="Heading 2" style:family="paragraph" style:parent-style-name="Heading" style:class="text">
      <style:text-properties fo:color="#2e74b5" loext:opacity="100%" fo:font-size="13pt" style:font-size-asian="13pt" style:font-size-complex="13pt"/>
    </style:style>
    <style:style style:name="Heading_20_3" style:display-name="Heading 3" style:family="paragraph" style:parent-style-name="Heading" style:class="text">
      <style:text-properties fo:color="#1f4d78" loext:opacity="100%" fo:font-size="12pt" style:font-size-asian="12pt" style:font-size-complex="12pt"/>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dc:creator>Un-named</dc:creator>
    <meta:editing-cycles>1</meta:editing-cycles>
    <meta:creation-date>2026-06-17T00:35:03.713000000</meta:creation-date>
    <dc:date>2026-06-17T00:35:03.726000000</dc:date>
    <meta:document-statistic meta:table-count="0" meta:image-count="0" meta:object-count="0" meta:page-count="18" meta:paragraph-count="234" meta:word-count="6174" meta:character-count="40136" meta:non-whitespace-character-count="34109"/>
    <meta:generator>LibreOffice/24.2.7.2$Linux_X86_64 LibreOffice_project/420$Build-2</meta:generator>
  </office:meta>
</office:document-meta>
</file>