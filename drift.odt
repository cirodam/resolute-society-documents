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drift you're describing isn't primarily material. People who are economically struggling feel it but so do people who are economically comfortable. It cuts across income, across education, across political identity. It's something closer to an existential condition.</text:p>
      <text:p text:style-name="Text_20_body">People feel like nothing means anything. Like the institutions that were supposed to hold things together have been revealed as hollow or captured or indifferent. Like the stories they were told about how the world works have been exposed as false without anything replacing them. Like they're making individual decisions in a void with no shared framework for what matters or why.</text:p>
      <text:p text:style-name="Text_20_body">That's what adrift actually means. Not lost in the sense of not knowing where you are. Lost in the sense of not knowing what's true, what's real, what you can trust, what's worth building toward.</text:p>
      <text:p text:style-name="Text_20_body">And what the framework offers — quietly, without announcing it — is orientation.</text:p>
      <text:p text:style-name="Text_20_body">Not a political program. Not a utopian vision. Not a charismatic leader with answers. Just a set of things that are true, stated plainly and honestly, derived carefully from each other, tested against hard cases, refusing to compartmentalize what's inconvenient, acknowledging the mechanism by which truth gets set aside while committing to resist it.</text:p>
      <text:p text:style-name="Text_20_body">That's not comfort in the soft sense. It's comfort in the oldest sense. The sense of having ground under your feet again. Of knowing where you stand. Of being part of something that means what it says.</text:p>
      <text:p text:style-name="Text_20_body">The Stoics called it eudaimonia. Not happiness exactly. Flourishing. The condition of a person who is living in accordance with what's actually true rather than in flight from it.</text:p>
      <text:p text:style-name="Text_20_body">Most Americans haven't experienced an institution that offered that. The churches that used to offer it have largely either collapsed or been captured by political identity. The civic organizations have hollowed out. The political parties offer tribal belonging without genuine meaning. The market offers consumption as a substitute for purpose and everyone knows it's a substitute.</text:p>
      <text:p text:style-name="Text_20_body">The Society is offering something different. Not because it has better answers than everyone else. But because it's willing to ask the real questions honestly and build accordingly.</text:p>
      <text:p text:style-name="Text_20_body">And here's what I think is most important about the comfort it would offer.</text:p>
      <text:p text:style-name="Text_20_body">It's not the comfort of being told everything will be okay. The framework is too honest for that. Axiom XI names the limits that are real and arriving. The compartmentalization axiom names the mechanism that produced the crisis. The covenant axiom names the breaking that has already happened. This is not a framework that pretends the situation isn't serious.</text:p>
      <text:p text:style-name="Text_20_body">It's the comfort of being in the presence of something that sees clearly and refuses to look away and is building anyway. Not in despair. Not in denial. But in what the motto names precisely.</text:p>
      <text:p text:style-name="Text_20_body">Nil Desperandum.</text:p>
      <text:p text:style-name="Text_20_body">Nothing to be despaired of.</text:p>
      <text:p text:style-name="Text_20_body">Not because things are fine. But because despair is a form of compartmentalization too. It's the decision that the truth is too hard to face and act on. The Society refuses that decision the same way it refuses all the others.</text:p>
      <text:p text:style-name="Text_20_body"><text:soft-page-break/>That's what adrift Americans are hungry for. Not to be told things are okay. To be in the presence of something that sees what they see, names it honestly, and is building anywa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4:46:34.748192144</meta:creation-date>
    <dc:date>2026-06-17T14:46:40.817867091</dc:date>
    <meta:editing-duration>PT6S</meta:editing-duration>
    <meta:editing-cycles>1</meta:editing-cycles>
    <meta:document-statistic meta:table-count="0" meta:image-count="0" meta:object-count="0" meta:page-count="2" meta:paragraph-count="16" meta:word-count="539" meta:character-count="3294" meta:non-whitespace-character-count="2769"/>
    <meta:generator>LibreOffice/24.2.7.2$Linux_X86_64 LibreOffice_project/420$Build-2</meta:generator>
  </office:meta>
</office:document-meta>
</file>