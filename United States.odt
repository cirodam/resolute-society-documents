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From Axiom I — Reality exists independently of our perceptions and preferences.</text:span></text:p>
      <text:p text:style-name="Text_20_body">The United States has developed an epistemic crisis in which large portions of the population have lost the shared factual ground necessary for self-governance. This isn't simply ignorance — it's the result of systems specifically designed to manufacture doubt, weaponize complexity, and make motivated reasoning profitable. The country is making civilizational decisions — about ecology, about economy, about institutional design — on the basis of systematically distorted perception of reality. The consequences of those decisions will arrive regardless of what anyone believes about them.</text:p>
      <text:p text:style-name="Text_20_body"><text:span text:style-name="Strong_20_Emphasis">From Axiom II — Moral blindness.</text:span></text:p>
      <text:p text:style-name="Text_20_body">The United States has engineered distance between decision and consequence at every scale. The distance between the consumer and the factory farm. Between the investor and the working conditions their returns depend on. Between the politician and the community their policy destroys. Between the soldier and the civilian casualty. Between the mortgage banker and the family losing their home. The mechanisms are not accidental — they are the designed features of systems that depend on moral blindness to function. The country is producing harm at civilizational scale through the entirely ordinary decisions of people who will never encounter what those decisions cost.</text:p>
      <text:p text:style-name="Text_20_body"><text:span text:style-name="Strong_20_Emphasis">From Axiom III — Human dignity is equal, sacred, and inviolable.</text:span></text:p>
      <text:p text:style-name="Text_20_body">The United States systematically violates this axiom along lines of race, class, immigration status, incarceration, and poverty. The violations are not anomalies — they are structural features of institutions specifically designed to produce them. Mass incarceration, the two-tier healthcare system, the school-to-prison pipeline, the treatment of undocumented people, the conditions of factory workers and agricultural laborers — none of these are accidents. They are the outcomes of political choices made by people who have decided, functionally if not explicitly, that some persons' dignity is more inviolable than others'. The country declares the axiom while systematically refusing its implications.</text:p>
      <text:p text:style-name="Text_20_body"><text:span text:style-name="Strong_20_Emphasis">From Axiom IV — No generation creates what it receives.</text:span></text:p>
      <text:p text:style-name="Text_20_body">The United States is engaged in the largest intergenerational theft in human history across multiple domains simultaneously. The ecological debt — carbon, soil degradation, aquifer depletion, species extinction — being passed to future generations without their consent. The financial debt accumulated to fund present consumption. The infrastructure deficit deferred rather than addressed. The institutional degradation that future generations will inherit. None of this is being done with malice — it's being done by people making rational short-term decisions within systems that have no mechanism for counting future costs as present obligations. The axiom says this is not misfortune. It is theft. The country is consuming an inheritance it does not own.</text:p>
      <text:p text:style-name="Text_20_body"><text:span text:style-name="Strong_20_Emphasis">From Axiom V — Living systems have integrity independent of human valuation.</text:span></text:p>
      <text:p text:style-name="Text_20_body">The United States is one of the primary drivers of the sixth mass extinction. It has systematically treated living systems as resources to be managed for human benefit — soil as a medium for chemical inputs, waterways as waste disposal, forests as timber inventory, fisheries as protein extraction operations. The pretense that these systems can be indefinitely managed from outside — that human ingenuity will always find a substitute for what is destroyed — is the pretense that has made the crisis <text:soft-page-break/>possible. The country is liquidating biological inheritance accumulated over millions of years to fund a few more decades of a specific economic arrangement.</text:p>
      <text:p text:style-name="Text_20_body"><text:span text:style-name="Strong_20_Emphasis">From Axiom VI — Community is constitutive of the person.</text:span></text:p>
      <text:p text:style-name="Text_20_body">The United States has systematically destroyed the conditions of genuine community through market logic, urban design, the attention economy, and the elimination of third places. It is the loneliest developed nation by most measures. The social fabric that once provided mutual aid, belonging, and the transmission of knowledge and practice has been almost entirely replaced by commercial substitutes that deliver the appearance of connection while producing its opposite. The country is producing persons who are increasingly unable to be fully themselves because the community conditions that make personhood possible have been deliberately dismantled in the service of markets that profit from atomization.</text:p>
      <text:p text:style-name="Text_20_body"><text:span text:style-name="Strong_20_Emphasis">From Axiom VII — Suffering and moral standing.</text:span></text:p>
      <text:p text:style-name="Text_20_body">The United States is one of the world's largest producers of factory farmed animals — tens of billions of sentient beings processed annually through systems specifically engineered to make their suffering invisible. It is simultaneously one of the primary drivers of the mass extinction that is eliminating entire evolutionary lineages permanently. The country has made a foundational decision — that non-human suffering does not have standing sufficient to constrain human economic activity — and is producing moral catastrophe at intimate daily scale as a direct result. The habits of moral perception developed through this systematic ignoring of suffering do not stay confined to animals.</text:p>
      <text:p text:style-name="Text_20_body"><text:span text:style-name="Strong_20_Emphasis">From Axiom VIII — Legitimacy is distinct from legality.</text:span></text:p>
      <text:p text:style-name="Text_20_body">The United States has a significant and growing legitimacy deficit that its legal correctness cannot repair. The Supreme Court issues legally correct decisions that a substantial majority of the population experiences as illegitimate. Congress passes legislation through procedurally correct processes that serve interests entirely disconnected from the people subject to them. Elections are conducted according to legal rules that systematically suppress participation and distort representation. The country's institutions are increasingly legally correct and substantively illegitimate — and the gap between those two things is the definition of a legitimacy crisis. Compliance can be compelled. It cannot be owed. The country is increasingly depending on compulsion.</text:p>
      <text:p text:style-name="Text_20_body"><text:span text:style-name="Strong_20_Emphasis">From Axiom IX — Power corrupts and concentrates.</text:span></text:p>
      <text:p text:style-name="Text_20_body">The United States has experienced the most dramatic concentration of wealth and power in its history over the last fifty years. The mechanisms of democratic accountability have been systematically captured by concentrated wealth — through campaign finance, regulatory capture, the revolving door between industry and government, the concentration of media ownership, and the conversion of the legal system into a tool that serves those who can afford to use it. This has happened not through conspiracy but through the entirely predictable operation of Axiom IX — power used its position to accumulate more power, and the structures designed to prevent that accumulation were themselves captured by it. The country's founding generation understood this axiom. The structures they built to resist it have been defeated.</text:p>
      <text:p text:style-name="Text_20_body"><text:soft-page-break/><text:span text:style-name="Strong_20_Emphasis">From Axiom X — Persons are not their worst moments.</text:span></text:p>
      <text:p text:style-name="Text_20_body">The United States has built one of the most punitive and least restorative justice systems in the developed world. It incarcerates a higher percentage of its population than any other nation. It permanently marks people through criminal records that follow them for life, eliminating access to housing, employment, education, and civic participation. It has decided, structurally and at massive scale, that persons are identical to their worst moments — that the appropriate response to harm is permanent definition rather than genuine accountability and the possibility of restoration. The human and social cost of this decision is incalculable. The country is destroying people it could be rebuilding and calling it justice.</text:p>
      <text:p text:style-name="Text_20_body"><text:span text:style-name="Strong_20_Emphasis">From Axiom XI — Capacities exist only in practice.</text:span></text:p>
      <text:p text:style-name="Text_20_body">The United States has experienced the most comprehensive destruction of human practical capacity in its history over the last century. The knowledge of how to grow food, how to heal, how to build shelter, how to govern locally, how to resolve conflict, how to care for the dying — all of it has been systematically absorbed by institutions that have made themselves indispensable by destroying the alternatives. The country is almost entirely dependent on systems it cannot replace and increasingly cannot afford, for functions that humans performed for themselves and each other for millennia. When those systems fail — and the Tainter axiom says they will — the capacity to do without them will be gone.</text:p>
      <text:p text:style-name="Text_20_body"><text:span text:style-name="Strong_20_Emphasis">From Axiom XII — Solutions become costs.</text:span></text:p>
      <text:p text:style-name="Text_20_body">The United States is the most complex society in human history and is visibly past the point of diminishing returns on that complexity. The healthcare system — the most expensive in the world — produces worse outcomes than simpler systems in peer nations. The legal system — the most elaborate in the world — produces less justice than simpler systems elsewhere. The financial system — the most sophisticated in the world — produces instability and extraction rather than the allocation of capital to productive use. The political system — the most procedurally elaborate democracy in the world — produces less responsive government than simpler systems elsewhere. In each case the complexity that was accumulated to solve problems has become the primary obstacle to solving them. The country cannot simplify because every layer of complexity has constituencies that defend it. It is becoming brittle.</text:p>
      <text:p text:style-name="Text_20_body"><text:span text:style-name="Strong_20_Emphasis">From Axiom XIII — Markets are not natural.</text:span></text:p>
      <text:p text:style-name="Text_20_body">The United States has constructed its markets to serve the interests of concentrated capital while maintaining the fiction that the outcomes are natural and therefore unchallengeable. The rules that determine who gets what — tax law, labor law, intellectual property, corporate governance, financial regulation — have been systematically rewritten over fifty years to redirect wealth upward while presenting the results as the neutral outcome of supply and demand. The country has naturalized a specific set of political choices that serve specific interests and placed them beyond democratic accountability by calling them economics. The people most harmed by those choices have been told that their condition is the result of natural forces rather than political decisions that could be made differently.</text:p>
      <text:p text:style-name="Standard"><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8T09:07:54.553062888</meta:creation-date>
    <dc:date>2026-06-18T09:08:04.227235887</dc:date>
    <meta:editing-duration>PT10S</meta:editing-duration>
    <meta:editing-cycles>1</meta:editing-cycles>
    <meta:document-statistic meta:table-count="0" meta:image-count="0" meta:object-count="0" meta:page-count="4" meta:paragraph-count="26" meta:word-count="1499" meta:character-count="10204" meta:non-whitespace-character-count="8686"/>
    <meta:generator>LibreOffice/24.2.7.2$Linux_X86_64 LibreOffice_project/420$Build-2</meta:generator>
  </office:meta>
</office:document-meta>
</file>