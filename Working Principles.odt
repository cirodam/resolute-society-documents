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paragraph-properties fo:orphans="1"/>
    </style:style>
    <style:style style:name="P2" style:family="paragraph" style:parent-style-name="Text_20_body">
      <style:paragraph-properties fo:orphans="1"/>
    </style:style>
    <style:style style:name="P3" style:family="paragraph" style:parent-style-name="Heading_20_3">
      <style:paragraph-properties fo:orphans="1"/>
    </style:style>
    <style:style style:name="P4" style:family="paragraph" style:parent-style-name="Text_20_body">
      <style:paragraph-properties fo:orphans="1"/>
    </style:style>
    <style:style style:name="T1" style:family="text">
      <style:text-properties officeooo:rsid="00091c6d"/>
    </style:style>
    <style:style style:name="T2" style:family="text">
      <style:text-properties officeooo:rsid="000971e1"/>
    </style:style>
    <style:style style:name="T3" style:family="text">
      <style:text-properties officeooo:rsid="0009e09f"/>
    </style:style>
    <style:style style:name="T4" style:family="text">
      <style:text-properties officeooo:rsid="000c772e"/>
    </style:style>
    <style:style style:name="T5" style:family="text">
      <style:text-properties officeooo:rsid="000d82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text:span text:style-name="Strong_20_Emphasis">Reality</text:span></text:h>
      <text:p text:style-name="Text_20_body"><text:span text:style-name="Strong_20_Emphasis">Principle 1. Fidelity to Evidence</text:span></text:p>
      <text:p text:style-name="Text_20_body">We follow evidence wherever it leads, regardless of whether the conclusion is comfortable and regardless of which interest it serves or undermines. We build community life that supports rather than corrupts this capacity. The evidence leads and we follow — not the reverse. Motivated reasoning, however sincere, is a failure of this commitment.</text:p>
      <text:p text:style-name="Text_20_body">Derived from Axiom I.</text:p>
      <text:p text:style-name="Horizontal_20_Line"/>
      <text:p text:style-name="Text_20_body"><text:span text:style-name="Strong_20_Emphasis">Principle 2. Humility and Self-Correction</text:span></text:p>
      <text:p text:style-name="Text_20_body">We acknowledge that we may be wrong — individually and as an institution. We hold our beliefs provisionally and build structures that make correction possible: a culture where being wrong is not stigmatized, mechanisms that surface error rather than conceal it, and protection for those who identify failure. The greatest institutional failure is not error itself but the refusal to correct it.</text:p>
      <text:p text:style-name="Text_20_body">Derived from Axioms I and IX.</text:p>
      <text:p text:style-name="Horizontal_20_Line"/>
      <text:p text:style-name="Text_20_body"><text:span text:style-name="Strong_20_Emphasis">Principle 3. Deliberation</text:span></text:p>
      <text:p text:style-name="Text_20_body">We hold that genuine disagreement is not a failure of consensus but the mechanism through which we approach truth together. Dissent is not a problem to be managed but a resource to be protected. We build community life in which members can disagree honestly without social or political cost — where the person who sees differently is heard before they are outvoted, and where persistent disagreement is treated as information rather than obstruction. We distinguish between deliberation and decision: during deliberation all views are in play and contrary voices are actively sought; after decision we act together while preserving the right to return. We protect dissent because we know we may be wrong — and the person who tells us so may be the most valuable member in the room.</text:p>
      <text:p text:style-name="Text_20_body">Derived from Axiom I.</text:p>
      <text:p text:style-name="Horizontal_20_Line"/>
      <text:p text:style-name="Text_20_body"><text:span text:style-name="Strong_20_Emphasis">Principle 4. Gradient Humility</text:span></text:p>
      <text:p text:style-name="Text_20_body">Reality presents itself in gradients. The development of a person, the emergence of moral responsibility, the capacity for suffering, the approach of ecological thresholds, the accumulation of institutional fragility — these are continuous processes without natural bright lines built into them. The human tendency to impose thresholds on gradients is understandable — governance requires lines, deliberation requires categories, practical life requires simplifications. But a line drawn on a gradient is a choice, not a discovery. It marks where we have decided to treat a continuous process as if it has a threshold for specific practical purposes. It does not reveal where the gradient actually changes its nature.</text:p>
      <text:p text:style-name="Text_20_body"><text:soft-page-break/>The Society therefore holds as a standing obligation the honest acknowledgment of what it is doing when it draws lines on gradients. A line presented as a discovery of natural fact becomes entrenched — resistant to revision as knowledge improves and circumstances change. A line acknowledged as a practical choice remains revisable — open to adjustment when the simplification is producing more harm than clarity. The difference between those two postures is the difference between epistemic honesty and the kind of false precision that mistakes the map for the territory.</text:p>
      <text:p text:style-name="Text_20_body">Acknowledging gradients has specific navigational implications. The moral weight on both sides of a line does not disappear because the line has been drawn — a being one step below whatever threshold the Society has established for practical purposes is not morally equivalent to a being at the far end of the gradient from full standing. The line simplifies. It does not eliminate what it simplifies. The Society holds the simplification and the complexity simultaneously — using the line for practical purposes while remaining honest about what it costs.</text:p>
      <text:p text:style-name="Text_20_body">Precaution increases as you approach uncertain thresholds on a gradient. Where the moral stakes are low and the gradient has barely begun, the burden of justification for action is correspondingly low. Where the gradient has moved significantly toward full moral standing, full personhood, or irreversible ecological consequence, the burden of justification increases proportionally. This is not paralysis — it is calibration. The Society does not need a bright line to recognize that the moral weight is higher at one end of a gradient than the other, and to deliberate accordingly.</text:p>
      <text:p text:style-name="Text_20_body">The honest engagement with gradients is one of the most demanding intellectual and moral disciplines the Society asks of its members. It requires holding complexity that the surrounding culture systematically flattens into false precision. It requires resisting the comfort of bright lines while still making practical decisions that require drawing them. It requires acknowledging that the lines we draw are ours — chosen, revisable, and carrying costs we are obligated to see clearly.</text:p>
      <text:p text:style-name="Text_20_body">Derived from Axioms I, III, and VII.</text:p>
      <text:p text:style-name="Horizontal_20_Line"/>
      <text:p text:style-name="Text_20_body"><text:span text:style-name="Strong_20_Emphasis">Principle 5. Practical Wisdom</text:span></text:p>
      <text:p text:style-name="Text_20_body">Not all knowledge can be written down. The principles, axioms, and governance structures of this Society constitute its theoretical foundation — the explicit framework within which its common life is organized and its decisions are made. But the situations those principles meet are always more particular than the principles themselves, and the gap between the principle and the situation is where the most demanding work happens. That work requires a form of knowledge that cannot be fully derived from principles, transmitted by curriculum, or stored in documents. It lives in people. It develops through practice. It passes between persons in relationship. It is called practical wisdom, and it is as real and as necessary as any other form of knowledge the Society depends on.</text:p>
      <text:p text:style-name="Text_20_body">Practical wisdom is the capacity to know what to do in this situation, with these people, under these specific constraints, right now — not by deriving an answer from first principles but by bringing a formed judgment to bear on a particular reality. It is what the experienced mediator brings to a conflict that the governance manual cannot provide. It is what the skilled grower knows about this soil in this season that no agricultural text fully contains. It is what the person who has navigated genuine moral <text:soft-page-break/>tragedy carries forward that cannot be transmitted by describing the tragedy abstractly. It is accumulated in practice, refined through error honestly acknowledged, and expressed as the capacity to feel where the edge cases are before being able to fully articulate why.</text:p>
      <text:p text:style-name="Text_20_body">This form of knowledge is not intuition in the pejorative sense — not mere feeling, not the uncritical application of habit, not the confidence of the person who has stopped noticing how much they don't know. Practical wisdom includes the capacity to recognize when a situation is genuinely novel — when past pattern does not apply, when the evidence requires overriding accumulated judgment, when the principle must be followed even against the grain of experience. The practically wise person is not the one who trusts their judgment most completely. They are the one who knows most precisely when to trust it and when to submit it to scrutiny.</text:p>
      <text:p text:style-name="Text_20_body">Practical wisdom develops only through practice — through real situations navigated with genuine attention, through the willingness to be wrong and to examine the failure honestly, through the accumulation of enough varied experience that pattern recognition becomes reliable rather than merely confident. It cannot be accelerated by instruction alone. It can be supported by structures that place developing members alongside those who already carry it — which is the purpose of the master and journeyman relationship, the purpose of mentorship within the Pioneer Corps, the purpose of the apprenticeship model the Society builds into every domain of serious formation. A manual is not a mentor. A curriculum is not a college. The transmission of practical wisdom requires the presence of someone who has it, working alongside someone who is developing it, in real situations that matter.</text:p>
      <text:p text:style-name="Text_20_body">The Society therefore treats the development and transmission of practical wisdom as a standing obligation — not a supplement to its theoretical foundations but their necessary complement. Principles without practical wisdom produce rigidity: the mechanical application of rules to situations the rules cannot adequately contain. Practical wisdom without principles produces drift: the gradual substitution of habit and preference for honest judgment. The Society needs both, held in ongoing relationship with each other, transmitted together through the human formations it builds for exactly that purpose.</text:p>
      <text:p text:style-name="Text_20_body">Derived from Axioms I, VI, and XI.</text:p>
      <text:p text:style-name="Horizontal_20_Line"/>
      <text:p text:style-name="Text_20_body"><text:span text:style-name="Strong_20_Emphasis">Principle 6. Precaution</text:span></text:p>
      <text:p text:style-name="Text_20_body">Some decisions cannot be undone. Where an action is irreversible — where the person, system, or living community affected cannot be restored to their prior state if the action proves mistaken — the burden of justification falls entirely on action, not restraint. Restraint requires no justification. Action does. The degree of justification required scales directly with the degree of irreversibility and the magnitude of what cannot be recovered if the action proves wrong.</text:p>
      <text:p text:style-name="Text_20_body">This principle applies across every domain the Society inhabits. The irreversible clearing of a living system. The introduction of institutional complexity that will generate dependencies before its costs are understood. The permanent exclusion of a member. The intervention in a developing person's biology before the evidence base is mature and before the capacity for fully informed consent about permanent consequences has itself fully developed. In each case the structure is identical: action forecloses futures that restraint leaves open. That asymmetry generates an asymmetric burden.</text:p>
      <text:p text:style-name="Text_20_body"><text:soft-page-break/>Genuine uncertainty is not a reason to act. It is a reason to wait. A Society that acts under genuine uncertainty because the costs of waiting are real has not eliminated the costs of being wrong — it has chosen to bear them in advance and made them irrecoverable. Where evidence is incomplete, where long-term outcomes are genuinely unknown, where the institutions producing guidance have not been fully insulated from advocacy or interest, the honest response is to name the uncertainty rather than resolve it prematurely in either direction. Certainty claimed where uncertainty exists is not confidence. It is a failure of Principle 1.</text:p>
      <text:p text:style-name="Text_20_body">Precaution is not paralysis. The Society makes decisions under uncertainty constantly, because the alternative is paralysis and paralysis is itself a choice with costs. What precaution requires is not the absence of action but the honest accounting of irreversibility before acting — the genuine asking of whether what will be foreclosed can be recovered, whether the evidence base is mature enough to justify permanent consequences, and whether those who will bear the costs of being wrong have been genuinely considered. Where that accounting has been done honestly and action remains justified, the Society acts. Where it has not been done, or where it reveals that the burden has not been met, the Society waits — and treats waiting not as failure but as the only honest response to what it does not yet know.</text:p>
      <text:p text:style-name="Text_20_body">Derived from Axioms I, IV, V, and XII.</text:p>
      <text:p text:style-name="Horizontal_20_Line"/>
      <text:h text:style-name="Heading_20_3" text:outline-level="3">Moral Perception</text:h>
      <text:p text:style-name="Text_20_body"><text:span text:style-name="Strong_20_Emphasis">Principle 7. Moral Vigilance</text:span></text:p>
      <text:p text:style-name="Text_20_body">We assume our own partial blindness as a permanent condition. The mechanisms that have produced moral catastrophe throughout human history — distance from consequence, normalization, and incentive structures that make not-seeing profitable — are not features of other people or other institutions. They operate in us and will operate in this Society if we permit the conditions that enable them. We therefore hold as a standing obligation the assumption that harm we are causing or enabling may currently be invisible to us, and we treat the perceptions of those with least institutional standing — the newest, the most marginal, those who bear costs the majority does not — as information the community cannot afford to ignore. Clarity is not a state we achieve. It is a practice we maintain or lose.</text:p>
      <text:p text:style-name="Text_20_body">Derived from Axiom II.</text:p>
      <text:p text:style-name="Horizontal_20_Line"/>
      <text:h text:style-name="Heading_20_3" text:outline-level="3">Suffering</text:h>
      <text:p text:style-name="Text_20_body"><text:span text:style-name="Strong_20_Emphasis">Principle 8. Moral Permeability</text:span></text:p>
      <text:p text:style-name="Text_20_body">The capacity to ignore suffering we find inconvenient to acknowledge is not compartmentalized. A community that learns to look away from suffering in one context — because it is economically convenient, because distance makes it abstract, because the being that suffers is not the kind we have learned to count — does not confine that capacity to the context in which it was practiced. It carries it <text:soft-page-break/>everywhere. We therefore hold that the suffering of beings capable of experiencing it generates real moral obligations regardless of species, and that the Society's commitment to seeing clearly extends to every scale at which suffering occurs and every context in which we might benefit from not seeing it. We do not claim to have fully answered what this requires of us. We claim only that we will not look away from the question.</text:p>
      <text:p text:style-name="Text_20_body">Derived from Axioms II and VII.</text:p>
      <text:p text:style-name="Horizontal_20_Line"/>
      <text:p text:style-name="Text_20_body"><text:span text:style-name="Strong_20_Emphasis">Principle 9. Conduct Toward Suffering</text:span></text:p>
      <text:p text:style-name="Text_20_body">The Society holds that beings capable of suffering have genuine moral standing. That holding is not merely philosophical — it has direct consequences for how the Society conducts its common life. A community that declares the moral standing of suffering beings and then organizes its institutions around systems that produce their suffering at industrial scale has not held anything. It has performed a position while acting against it. The Society does not perform its values. It builds them into how it actually lives.</text:p>
      <text:p text:style-name="Text_20_body">The Society therefore commits to organizing its common life — its food systems, its procurement, its educational curriculum, its ceremonies and shared meals — in ways that are consistent with the moral standing it has declared. This means the Division of Food does not treat industrial animal suffering as an acceptable foundation for the Society's food security. It means the educational curriculum includes honest engagement with the scale and nature of factory farming and mass extinction — not as political advocacy but as factual description of what the axiom requires members to see clearly. It means procurement decisions across every division ask whether what is being purchased depends on systems that the Society's own axioms identify as morally catastrophic.</text:p>
      <text:p text:style-name="Text_20_body">This commitment is not a demand for perfection or ideological purity. The Society exists within a world where industrial animal systems are pervasive, where alternatives are not always available, and where members come from backgrounds shaped entirely by those systems. The Society does not require members to have resolved these questions before joining. It requires only that the Society itself — as an institution, in its collective decisions and its common life — not organize itself around conduct that contradicts what it holds to be true. The standard applies to the institution, not as a condition of individual membership.</text:p>
      <text:p text:style-name="Text_20_body">The Society also commits to building capacity over time that makes this commitment more fully honorable. The Division of Food's mandate includes developing food systems that reduce dependence on industrial animal suffering — through growing, foraging, hunting, and husbandry practices that the Society's own principles can honestly endorse. This is not a deadline or a purity standard. It is a direction — a commitment to moving the Society's common life progressively into alignment with what it holds to be true about the beings it shares the world with.</text:p>
      <text:p text:style-name="Text_20_body">The mass extinction happening around us is not a background condition to be noted and set aside. It is a moral catastrophe the Society names honestly and responds to within its capacity — through the education of its members, through the stewardship of whatever land it holds, through the relationships <text:soft-page-break/>it builds with the living systems it inhabits. We cannot stop the extinction. We can refuse to be indifferent to it. We can build a community that sees it clearly and conducts itself accordingly.</text:p>
      <text:p text:style-name="Text_20_body">Derived from Axioms II and VII.</text:p>
      <text:p text:style-name="Horizontal_20_Line"/>
      <text:h text:style-name="Heading_20_3" text:outline-level="3">The Person</text:h>
      <text:p text:style-name="Text_20_body"><text:span text:style-name="Strong_20_Emphasis">Principle 10. Sovereignty of the Person</text:span></text:p>
      <text:p text:style-name="Text_20_body">Every person has the right to be the genuine author of their own beliefs, decisions, and life. This is not merely the right to be free from external coercion — it is the right to an interior life that has not been colonized, engineered, or substituted by systems designed to profit from its capture. We hold as illegitimate any system — corporate, political, or social — that colonizes the interior life, engineers dependence, or substitutes another's will for one's own without knowledge or consent. The manipulation of persons for profit, power, or ideology is not merely harmful — it is a violation of what persons are.</text:p>
      <text:p text:style-name="Text_20_body">This capacity is under systematic assault in the current moment at a scale and sophistication that has no historical precedent. The attention economy has developed tools specifically designed to bypass rational agency — to engineer emotional responses, manufacture preferences, exploit psychological vulnerabilities, and create compulsive patterns of engagement that substitute algorithmic direction for genuine choice. These tools do not merely distract. They reshape the interior life itself — the categories through which a person perceives reality, the emotional responses they experience as their own, the beliefs they hold as genuine convictions. A person whose interior life has been substantially captured by these systems is not free in any meaningful sense regardless of what formal liberties they nominally possess.</text:p>
      <text:p text:style-name="Text_20_body">The sovereignty of the person is not a permanent possession. It is a capacity that exists only in practice — that must be actively exercised, protected, and cultivated to survive. Axiom XI names this truth about all human capacities. It applies with particular urgency here because the capacity for genuine self-authorship is the condition of every other capacity. A person who cannot think for themselves cannot govern themselves. A person who cannot govern themselves cannot participate genuinely in community. A person who cannot participate genuinely in community cannot become fully who they are. The loss of interior sovereignty is therefore not one harm among many — it is the harm that makes every other harm harder to resist and every other capacity harder to recover.</text:p>
      <text:p text:style-name="Text_20_body">We build community life that protects and restores this capacity in our members. This means building a community in which genuine disagreement is protected, in which members are exposed to perspectives that challenge rather than confirm, in which the friction of honest encounter with different minds is treated as a feature rather than a problem. It means building technology that serves members rather than captures them — that is constitutionally prohibited from employing the mechanics of attention capture regardless of the convenience or revenue that prohibition costs. It means building an educational culture in which members develop the capacity to examine their own beliefs honestly — to ask not just what they think but how they came to think it and whether the process that produced the belief is one they would endorse on reflection. The Society exists in part to be the context in which genuine interior <text:soft-page-break/>freedom becomes possible — not as an abstraction but as a daily practice sustained by deliberate structure.</text:p>
      <text:p text:style-name="Text_20_body">Derived from Axioms I, III, and XI.</text:p>
      <text:p text:style-name="Horizontal_20_Line"/>
      <text:p text:style-name="Text_20_body"><text:span text:style-name="Strong_20_Emphasis">Principle 11. Bodily Sovereignty</text:span></text:p>
      <text:p text:style-name="Text_20_body">No person or institution may commandeer another person's body for their own purposes. This is not a qualified right, subject to override by sufficiently important competing interests. It is a direct and necessary expression of what dignity means. A person whose body is subject to external commandeering is not a person in the full sense — they are property. The history of treating persons as property is the history of the most serious dignity violations our species has produced. In every case the mechanism is identical: the body of one person placed in service of the purposes of another without genuine consent. The Society holds the prohibition on that mechanism as absolute because dignity itself is absolute.</text:p>
      <text:p text:style-name="Text_20_body">Since no person or institution may commandeer another person's body, no person or institution has standing to make decisions that would require doing so. Standing is not merely a question of who has sufficient information or proximity — though those matter. It is a question of who has the legitimate authority to act. Where acting requires commandeering a body that is not yours, the authority does not exist. It cannot be granted by law, by institution, by relationship, or by the weight of competing moral claims however genuine those claims are. The absence of standing is not a limitation on external judgment. It is the direct consequence of the prohibition on commandeering. Where the decision requires the body, the decision belongs to the person whose body it is.</text:p>
      <text:p text:style-name="Text_20_body">This principle does not pretend that bodily sovereignty never comes into conflict with other genuine moral claims. It does. Those conflicts are among the most serious moral situations human beings face — situations of genuine tragedy in which real claims on both sides cannot be fully honored simultaneously. The Society does not resolve those tragedies by declaring bodily sovereignty the automatic winner in every case. It resolves them by recognizing that no external party has standing to commandeer the body at the center of the conflict in order to impose a resolution. The navigation of a tragedy located within a person's body belongs to that person. Not because their claim is always definitively greater than every competing claim. But because the alternative — external commandeering of the body as the mechanism of resolution — is itself a dignity violation that compounds the tragedy rather than resolving it. You cannot honor dignity by destroying it.</text:p>
      <text:p text:style-name="Text_20_body">The implications of this principle extend across every domain in which external authority has claimed the right to direct what happens within a person's body — reproductive decisions, medical treatment, physical labor, sexual use, the terms of bodily risk. In each case the Society asks the same question: is this a genuine exercise of consent or a commandeering dressed as something else? Where the answer is commandeering the Society's position is unambiguous. Where the answer is genuinely contested the Society applies the principles of Moral Tragedy and Moral Particularity — accompaniment rather than judgment, engagement with the specific situation rather than the categorical rule.</text:p>
      <text:p text:style-name="Text_20_body">Derived from Axiom III.</text:p>
      <text:p text:style-name="Horizontal_20_Line"><text:soft-page-break/></text:p>
      <text:p text:style-name="Text_20_body"><text:span text:style-name="Strong_20_Emphasis">Principle 12. Equal Standing</text:span></text:p>
      <text:p text:style-name="Text_20_body">Every member participates with genuinely equal standing regardless of wealth, social capital, fluency with institutional language, or any other attribute that produces inequality of voice in ordinary life. We do not merely remove formal barriers to participation — we actively build the conditions in which the quietest and most marginal member can be heard as fully as the most articulate and connected. Formal equality that produces substantive inequality is insufficient.</text:p>
      <text:p text:style-name="Text_20_body">The Society will naturally tend to hear its most articulate, confident, and socially connected members most clearly. This is not a failure of intention — it is the ordinary operation of attention and social dynamics that Axiom II names as a mechanism of moral blindness. The member who speaks most fluently, who knows the institutional language, who has the social confidence to hold a room — that member is not more worthy of being heard. They are simply easier to hear. The Society commits to actively resisting that tendency rather than assuming good intentions will overcome it. We build deliberative structures, facilitation practices, and cultural norms that make the quietest voice in the room as legible to the community as the loudest. Where we find that some members are consistently heard less than others we treat that as a structural failure requiring structural response, not a personal failing requiring personal remedy.</text:p>
      <text:p text:style-name="Text_20_body">Derived from Axioms II and III.</text:p>
      <text:p text:style-name="Horizontal_20_Line"/>
      <text:p text:style-name="Text_20_body"><text:span text:style-name="Strong_20_Emphasis">Principle 13. Circumstance and Agency</text:span></text:p>
      <text:p text:style-name="Text_20_body">We hold simultaneously that circumstances shape persons profoundly and that persons remain genuine agents within their circumstances. We do not reduce outcomes to individual choice, because doing so denies the reality of conditions that are not of the person's making and produces cruelty dressed as accountability. We do not deny agency, because doing so reduces persons to objects of their circumstances and produces condescension dressed as compassion. Both failures violate dignity. We build community life, governance, and judgment around the honest acknowledgment of both truths — that where a person stands is partly the result of conditions they did not choose, and that who a person is remains genuinely their own.</text:p>
      <text:p text:style-name="Text_20_body">The circumstances that shape persons are not random. They are largely constructed — through the economic arrangements that determine what opportunities are available, through the legal structures that determine whose interests the rules serve, through the physical and social environments that determine what a person encounters and what they can imagine. A person born into poverty in a community with underfunded schools, limited employment, and concentrated disadvantage is not simply unlucky. They are navigating a constructed environment that was built — through specific political and economic choices — to produce exactly those conditions for exactly those people. Attributing their outcomes entirely to personal choice is not just factually wrong. It is a form of moral evasion that mistakes a designed outcome for a natural one.</text:p>
      <text:p text:style-name="Text_20_body">At the same time the constructed nature of circumstances does not eliminate agency. It constrains it. The person navigating difficult circumstances remains a genuine agent — capable of choice, capable of <text:soft-page-break/>change, capable of becoming more fully themselves even within conditions they did not choose and cannot easily escape. The Society honors that agency by refusing to reduce members to their circumstances — by treating every person as someone whose choices matter and whose future is genuinely open — while also refusing to pretend that circumstances don't matter, that the constructed environments people navigate are neutral, or that outcomes reflect nothing more than the choices of the individuals who produced them.</text:p>
      <text:p text:style-name="Text_20_body">Derived from Axioms III, VI, and XIII.</text:p>
      <text:p text:style-name="Horizontal_20_Line"/>
      <text:h text:style-name="Heading_20_3" text:outline-level="3">Dignity and Justice</text:h>
      <text:p text:style-name="Text_20_body"><text:span text:style-name="Strong_20_Emphasis">Principle 14. Subsistence</text:span></text:p>
      <text:p text:style-name="Text_20_body">Human dignity cannot exist in the absence of food, shelter, healthcare, and safety. We accept collective responsibility for ensuring every member has these essentials. This is mutual obligation, not charity — we guarantee to each other what dignity requires. The material floor is not conditional on merit, productivity, or compliance. It is what dignity demands.</text:p>
      <text:p text:style-name="Text_20_body">This guarantee is not the Society's permanent substitution for members' own capacity to sustain themselves. It is the ground on which that capacity can be built. A member in genuine need receives what they need without condition. The Society's deeper obligation — developed in Principle 20 (Cultivation) — is to build the conditions in which members become progressively less dependent on the guarantee because they have recovered the capacity to meet their own needs and each other's. Provision without cultivation produces the dependency that Axiom XI names as a form of harm. We provide because dignity requires it. We cultivate because dignity requires more than provision.</text:p>
      <text:p text:style-name="Text_20_body">Derived from Axiom III.</text:p>
      <text:p text:style-name="Horizontal_20_Line"/>
      <text:p text:style-name="Text_20_body"><text:span text:style-name="Strong_20_Emphasis">Principle 15. Non-Domination</text:span></text:p>
      <text:p text:style-name="Text_20_body">We reject domination. We hold as illegitimate the use of force, coercion, or control of resources to subordinate another person or to claim authority not freely granted. This applies to the state, to markets, to institutions, and to members in their relations with each other. Authority within this Society flows from consent and is always recallable.</text:p>
      <text:p text:style-name="Text_20_body">Domination does not always announce itself as force. In the current era its most pervasive forms are quieter and more systematic. Market-based domination operates through constructed dependency — when a person must accept exploitative conditions because the alternative is destitution, and when those conditions exist because of specific political choices about labor law, bargaining power, and the distribution of economic resources, the subordination is real even though no one has been physically coerced. The person has a choice in the formal sense. They have no choice in any meaningful sense. That is domination through construction — made possible by the same mechanisms Axiom XIII names, and made invisible by the same pretense of naturalness.</text:p>
      <text:p text:style-name="Text_20_body"><text:soft-page-break/>Capacity destruction creates domination through dependency of a different kind. When persons have lost the practical ability to meet their own needs — to grow food, to heal, to build, to govern themselves — they become vulnerable to whoever controls access to what they can no longer do without. The employer, the landlord, the healthcare system, the food supply chain — each of these can extract compliance from people who have no alternative because the capacity to do without them has been destroyed. This is domination through the mechanism Axiom XI names — not through force but through the systematic elimination of the conditions under which genuine choice becomes possible.</text:p>
      <text:p text:style-name="Text_20_body">The Society therefore builds its common life around the active restoration of the conditions that make domination impossible — genuine consent in governance, structural separation of wealth from power, the recovery of practical capacity in members, and an internal economy that reduces dependency on external systems that can use that dependency as leverage. We do not merely reject domination as a value. We build the structural conditions under which domination becomes progressively harder to exercise over our members.</text:p>
      <text:p text:style-name="Text_20_body">Derived from Axioms III, VI, XI, and XIII.</text:p>
      <text:p text:style-name="Horizontal_20_Line"/>
      <text:p text:style-name="Text_20_body"><text:span text:style-name="Strong_20_Emphasis">Principle 16. Restorative Justice</text:span></text:p>
      <text:p text:style-name="Text_20_body">When harm is done within this community we ask not what punishment is deserved but what repair is possible. Our first obligation is to those who have been harmed — their safety, their healing, their needs define the response. Where the person who caused harm accepts genuine accountability, we work toward restoration: of the relationship, of the community, and where possible of the person themselves. We recognize that permanent exclusion from community is itself a serious harm, to be chosen only when the safety of members requires it and never as mere punishment. The dignity of every person — including those who have caused harm — remains inviolable throughout. We understand that genuine accountability is more demanding than punishment, and we do not mistake the absence of suffering for the absence of consequence.</text:p>
      <text:p text:style-name="Text_20_body">The punitive justice system the Society is rejecting is not a natural response to harm. It is a constructed arrangement — built through specific political choices, serving specific interests, producing specific outcomes for specific populations with a consistency that cannot be explained by anything other than design. Mass incarceration, permanent criminal records, the elimination of civic participation for those convicted — these are not the inevitable consequences of taking harm seriously. They are political choices that have been naturalized in exactly the way Axiom XIII describes, presented as the obvious and necessary response to wrongdoing while their actual function — the permanent marginalization of specific communities — is rendered invisible behind the language of justice. The Society names this construction honestly. The punitive system is not justice made concrete. It is a specific set of choices about whose harm counts, whose dignity is expendable, and whose communities can be safely sacrificed to the appearance of order.</text:p>
      <text:p text:style-name="Text_20_body">Restorative justice is grounded in what persons actually are. Axiom X says persons are not fixed — that transformation is an observable feature of human nature, that the person who caused serious harm is not, in any meaningful sense, identical to the person who caused it if genuine work has been done. The <text:soft-page-break/>possibility of restoration is not optimism about human nature. It is honesty about human nature. A justice system built on the premise that persons are permanently defined by their worst moments is making a factual error as much as a moral one — and compounding it by designing institutions around that error that make the transformation it denies progressively less possible.</text:p>
      <text:p text:style-name="Text_20_body">The Society therefore builds its response to harm around what the evidence about persons and communities actually supports. Accountability is real — harm done requires acknowledgment, repair where possible, and demonstrated change over time. Safety is real — the community has an obligation to protect members from ongoing harm. But accountability and safety do not require permanent definition, and the Society refuses to mistake the infliction of suffering for the achievement of either. We build something harder and more honest — a community in which harm is taken seriously enough to be genuinely repaired rather than merely punished.</text:p>
      <text:p text:style-name="Text_20_body">Derived from Axioms III, X, and XIII.</text:p>
      <text:p text:style-name="Horizontal_20_Line"/>
      <text:p text:style-name="Text_20_body"><text:span text:style-name="Strong_20_Emphasis">Principle 17. Renewal</text:span></text:p>
      <text:p text:style-name="Text_20_body">Political history is not destiny. The beliefs a person held, the candidates they supported, the movements they joined or abandoned, the positions they defended or later regretted — none of these constitute a permanent definition of who that person is or what they are capable of becoming. The Society receives people at the threshold of what they are willing to build, not at the threshold of what they have previously believed.</text:p>
      <text:p text:style-name="Text_20_body">This is not amnesia. The Society does not pretend that previous beliefs had no consequences or that all political positions are equally right or equally wrong. It makes no such claim. What it claims is simpler and more fundamental — that the capacity for genuine change is a feature of what persons are, and that a community serious about building something new cannot afford to staff itself exclusively with people whose entire history is already acceptable to every other member. That community does not exist. It never will.</text:p>
      <text:p text:style-name="Text_20_body">The oath of membership is forward-looking. It is a commitment to the obligations of this community going forward — to honest inquiry, to mutual obligation, to the common work — not a recantation of what came before. The Society does not ask members to confess their political histories, to denounce their previous affiliations, or to demonstrate ideological conversion as a condition of belonging. It asks only that they take the obligations of membership seriously from the moment they cross the threshold.</text:p>
      <text:p text:style-name="Text_20_body">The Society therefore commits to never becoming a vehicle for the relitigating of members' political histories. No member may use the Society's spaces, relationships, or processes to interrogate, expose, or judge the previous political identities of other members. The moment the Society begins sorting people by their political past it has become another instrument of the polarization it was built to resist — and it will have broken the most important promise it makes to the disillusioned people it exists to receive.</text:p>
      <text:p text:style-name="Text_20_body">What a person was before they walked through the door is their own. What they build after is ours.</text:p>
      <text:p text:style-name="Text_20_body">Derived from Axiom X.</text:p>
      <text:p text:style-name="Horizontal_20_Line"><text:soft-page-break/></text:p>
      <text:p text:style-name="Text_20_body"><text:span text:style-name="Strong_20_Emphasis">Principle 18. Moral Tragedy</text:span></text:p>
      <text:p text:style-name="Text_20_body">Some situations are not problems. They are tragedies. The distinction matters enormously and the failure to make it is one of the most consistent sources of moral cruelty in human life.</text:p>
      <text:p text:style-name="Text_20_body">A problem has a solution. It presents a challenge that careful reasoning, adequate resources, and good judgment can resolve. The person facing a problem may need help, information, or support — but there is a right answer available and the task is to find it. Judgment is appropriate because there is something to judge against.</text:p>
      <text:p text:style-name="Text_20_body">A tragedy is different in kind. A tragedy is a situation in which the conditions themselves are wrong — in which every available path involves genuine harm, irreversible loss, or the violation of something that deserves to be whole. The person facing a tragedy did not create those conditions and cannot escape them. They must choose anyway. There is no solution because the situation does not admit of one. There is only navigation — the attempt to move through something that should not have to be moved through, toward an outcome that will always carry the weight of what could not be saved.</text:p>
      <text:p text:style-name="Text_20_body">To judge a person for how they navigated a tragedy is to make a category error. It mistakes a tragedy for a problem. It assumes a right answer was available and evaluates whether the person found it. But no right answer was available. The judgment therefore measures the person against a standard that the situation itself made unreachable. That is not accountability. It is cruelty dressed as moral seriousness.</text:p>
      <text:p text:style-name="Text_20_body">The Society commits to recognizing genuine moral tragedy as a category and responding to it accordingly. Where a member faces a situation in which every path involves real harm — where the conditions themselves are the wrong, not the person navigating them — the Society does not ask what the right answer was. It asks what this person needs. What information, what support, what presence, what care will help them navigate something that should not have to be navigated alone. The Society stands with people in tragedy. It does not evaluate them afterward.</text:p>
      <text:p text:style-name="Text_20_body">This commitment requires the Society to resist the pull toward judgment that tragedy tends to generate in observers. Tragedy is uncomfortable to witness. The discomfort of watching someone navigate an impossible situation creates pressure to resolve that discomfort by finding something the person did wrong — some point at which a different choice would have produced a better outcome. That pressure is understandable. It is also a form of self-protection that comes at the person's expense. The Society names that pressure honestly and commits to resisting it. The person in the tragedy is not there to resolve our discomfort about the situation they are in.</text:p>
      <text:p text:style-name="Text_20_body">Derived from Axiom III.</text:p>
      <text:p text:style-name="Horizontal_20_Line"/>
      <text:p text:style-name="Text_20_body"><text:span text:style-name="Strong_20_Emphasis">Principle 19. Moral Particularity</text:span></text:p>
      <text:p text:style-name="Text_20_body">Morally grave situations are irreducibly particular. The moral weight of a situation is not determined by the category it belongs to but by the specific and unrepeatable combination of facts, relationships, constraints, histories, and consequences that make it what it is. Categories are tools for organizing thought. They are not substitutes for reality. When a universal rule meets a particular human life it <text:soft-page-break/>meets something the rule was not built to fully contain — and the gap between the rule and the reality is where the actual moral work happens.</text:p>
      <text:p text:style-name="Text_20_body">This is not moral relativism. The Society does not hold that all choices are equally right or that circumstances excuse everything. It holds something more precise — that the moral evaluation of a situation requires genuine engagement with what that situation actually is, in its full particularity, rather than with the simplified version of it that fits inside a category. A rule that produces the same answer regardless of circumstances is not engaging with moral reality. It is replacing moral reality with administrative convenience.</text:p>
      <text:p text:style-name="Text_20_body">The consequences of ignoring particularity are visible everywhere the rule meets the life. Two people facing nominally identical situations — the same category, the same formal description — may be facing entirely different moral realities depending on what brought them there, what constraints they are operating under, what consequences they will bear, what relationships are implicated, and what options are genuinely available to them. To judge both situations identically because they belong to the same category is to judge neither situation honestly. It is to judge the category and call it justice.</text:p>
      <text:p text:style-name="Text_20_body">The Society therefore commits to engaging with morally grave situations on their own terms. This requires proximity — genuine access to the specific facts that determine what a situation actually is. It requires humility — the acknowledgment that the full moral weight of a situation may not be visible from outside it. And it requires the discipline to resist the comfort of universal rules when those rules are being applied to situations they cannot adequately contain. The hardest moral work is not the application of principles to clear cases. It is the honest engagement with situations where the principles, applied mechanically, would produce outcomes that dignity cannot endorse.</text:p>
      <text:p text:style-name="Text_20_body">Derived from Axioms I and III.</text:p>
      <text:p text:style-name="Horizontal_20_Line"/>
      <text:h text:style-name="Heading_20_3" text:outline-level="3">Formation</text:h>
      <text:p text:style-name="Text_20_body"><text:span text:style-name="Strong_20_Emphasis">Principle 20. Cultivation</text:span></text:p>
      <text:p text:style-name="Text_20_body">We accept responsibility for the knowledge, skill, and judgment of our members — not as a service we provide but as an obligation we share. We hold that every person deserves access to the full breadth of human knowledge and capability, and that genuine education is a condition of dignity, not a commodity. We build systems of formation — colleges, apprenticeships, curricula — through which knowledge, skill, and wisdom pass from one generation to the next through human relationship rather than mere instruction.</text:p>
      <text:p text:style-name="Text_20_body">We cultivate not just competence but judgment — the capacity to think clearly, act wisely, and transmit what we know to those who come after us. Human capacities are not permanent possessions. They are achievements that require ongoing practice and active transmission to survive. What communities do not practice they forget. What they forget they lose — sometimes permanently. The knowledge of how to grow food, how to heal, how to govern ourselves, how to resolve conflict, how to build — these live in practice or they do not live at all.</text:p>
      <text:p text:style-name="Text_20_body"><text:soft-page-break/>The Society therefore treats the transmission of knowledge and skill as a standing obligation rather than an optional enrichment. Every member who knows something that another member needs to know bears an obligation to transmit it — not just to document it, not just to make it available, but to transmit it through the kind of human relationship in which genuine formation occurs. A manual is not a mentor. A curriculum is not a college. The knowledge that matters most passes between people, in practice, over time, through the relationship of those who know to those who are learning. We build the structures — the colleges, the apprenticeships, the compendium — that make that transmission possible at scale.</text:p>
      <text:p text:style-name="Text_20_body">Derived from Axioms III and XI.</text:p>
      <text:p text:style-name="Horizontal_20_Line"/>
      <text:p text:style-name="Text_20_body"><text:span text:style-name="Strong_20_Emphasis">Principle 21. Capacity Over Dependency</text:span></text:p>
      <text:p text:style-name="Text_20_body">The Society commits to building the capacity of its members rather than their dependency on the Society. This is not a preference for self-sufficiency as an ideology. It is the direct institutional consequence of Axiom XI — institutions that absorb human functions do not merely replace them, they destroy them. The Society that does things for its members rather than through them is not serving them. It is diminishing them. And it is diminishing itself — converting what should be a community of capable persons into a provider and its clients, which is precisely the relationship the Society was built to replace.</text:p>
      <text:p text:style-name="Text_20_body">The measure of the Society's success is therefore not what it provides but what its members can do — individually and together — because they are part of it. A member who has been part of the Society for five years should be more capable, not more dependent. More able to grow food, to heal, to govern, to build, to resolve conflict, to transmit knowledge — not less able because the Society has been doing those things for them. Where the Society finds that membership is producing dependency rather than capacity it has failed at something more fundamental than any governance or economic metric can capture.</text:p>
      <text:p text:style-name="Text_20_body">This commitment has specific institutional expressions. The Division of Food builds food growing and preservation capacity in members — it does not merely provide food. The Division of Health builds health knowledge and practice in members — it does not merely provide healthcare. The Division of Education builds the capacity to learn and teach in members — it does not merely provide curriculum. In each case the division's success is measured by what members can do without the division, not by what the division delivers to members who remain dependent on it. The goal of every division is its own progressive obsolescence as the capacities it was built to restore become distributed through the membership.</text:p>
      <text:p text:style-name="Text_20_body">The Society also commits to recognizing when it has become a substituting institution and correcting that tendency actively. The pressure toward substitution is constant and rational — it is always more efficient in the short term for the Society to do something for members than to build the capacity for members to do it themselves. That efficiency is the hidden cost Axiom XI names. We resist it not because efficiency is unimportant but because the alternative — a community of capable persons who can sustain themselves and each other — is worth the inefficiency it requires to build.</text:p>
      <text:p text:style-name="Text_20_body"><text:soft-page-break/>Derived from Axiom XI.</text:p>
      <text:p text:style-name="Horizontal_20_Line"/>
      <text:h text:style-name="Heading_20_3" text:outline-level="3">Economy</text:h>
      <text:p text:style-name="Text_20_body"><text:span text:style-name="Strong_20_Emphasis">Principle 22. Separation of Wealth from Power</text:span></text:p>
      <text:p text:style-name="Text_20_body">Material resources cannot purchase governance power, social standing, or disproportionate influence within this community. This is not a preference for equality as an abstract value. It is a structural response to the most reliable historical mechanism through which self-governing communities lose their capacity for self-governance. Wealth has been the primary vehicle through which power concentrates in democratic societies — not through force but through the patient accumulation of influence over the rules, the institutions, and the decisions that determine whose interests are served. The Society builds structural separation between what a member owns and what a member can decide because the alternative is not a community that happens to have wealthy members. It is a community whose governance has been quietly purchased by them.</text:p>
      <text:p text:style-name="Text_20_body">The corruption of democratic life by concentrated wealth is not a natural feature of democratic arrangements. It is a constructed one — produced through specific political choices about campaign finance, regulatory design, media ownership, and the legal structures that determine how wealth translates into political outcomes. Those choices were made by someone, serve someone's interests, and could be made differently. The Society makes them differently — explicitly, accountably, and in the open. No donation purchases access. No wealth purchases standing. No resource concentration purchases governance outcomes. The rules that govern the Society are made by its members as members — not as owners, not as donors, not as patrons whose generosity entitles them to shape what the community decides.</text:p>
      <text:p text:style-name="Text_20_body">This commitment has teeth only if it is structural rather than aspirational. The wealthy member who cannot formally purchase governance power will find informal mechanisms — the accumulation of social capital, the quiet influence of dependency, the subtle authority that comes from being the person others cannot afford to offend. The Society commits to watching for those informal mechanisms as vigilantly as it watches for formal ones, and to building a culture in which the standing of a member in community life is determined by their contribution, their presence, and their character — not by what they own.</text:p>
      <text:p text:style-name="Text_20_body">Derived from Axioms VIII, IX, and XIII.</text:p>
      <text:p text:style-name="Horizontal_20_Line"/>
      <text:p text:style-name="Text_20_body"><text:span text:style-name="Strong_20_Emphasis">Principle 23. Economic Construction</text:span></text:p>
      <text:p text:style-name="Text_20_body">The Society builds its internal economy explicitly, accountably, and in the open. This is not a utopian experiment or a deviation from natural economic arrangements. It is a deliberate set of construction choices made in the service of values different from those that govern the surrounding economy — choices about what gets exchanged, on what terms, with what obligations attached, and toward what ends. Every economy is constructed. The only question is who constructs it, for whom, and toward <text:soft-page-break/>what ends. The Society answers that question openly rather than concealing it behind the appearance of naturalness.</text:p>
      <text:p text:style-name="Text_20_body">The Society's internal economy is built around sufficiency rather than accumulation, around obligation rather than transaction, around the restoration of capacity rather than the engineering of dependency. The kin currency is not a substitute for dollars — it is a different kind of instrument entirely, designed to facilitate exchange within the community without creating the dynamics of accumulation and extraction that dollar-denominated exchange tends to produce. The commons is not a collective asset to be managed for maximum return — it is the shared inheritance of the membership, held in trust for those who come after. The mutual credit system is not a bank — it is a mechanism for honoring the obligations that membership creates without converting those obligations into commodities.</text:p>
      <text:p text:style-name="Text_20_body">The Society also commits to resisting the naturalization of market logic within its own institutions. Market logic will enter the Society through ordinary decisions — through the pressure to price services, to reward contribution differentially, to treat relationships as transactions, to measure value in terms that the surrounding economy recognizes. Each of those pressures will be individually rational. Their accumulated effect is the conversion of communal obligation into commercial relationship — the destruction from within of what the Society was built to create. We name this pressure honestly and build structures that resist it, understanding that the resistance requires ongoing intention rather than founding declaration.</text:p>
      <text:p text:style-name="Text_20_body">Derived from Axiom XIII.</text:p>
      <text:p text:style-name="Horizontal_20_Line"/>
      <text:p text:style-name="Text_20_body"><text:span text:style-name="Strong_20_Emphasis">Principle 24. Economic Literacy</text:span></text:p>
      <text:p text:style-name="Text_20_body">The Society accepts responsibility for equipping every member to see the economic arrangements of the surrounding world clearly — not as natural facts to be adapted to but as political choices to be examined, contested, and where necessary refused. This is not ideological formation. It is the direct educational consequence of Axiom XIII. A person who cannot see the construction choices embedded in the economy they inhabit cannot exercise genuine sovereignty over their own economic life. They are navigating a designed environment while believing it to be natural — which means they cannot distinguish between constraints that are real and constraints that are merely presented as real.</text:p>
      <text:p text:style-name="Text_20_body">The Division of Education therefore maintains a curriculum that equips members to understand how markets are constructed — the specific legal and political mechanisms through which wages, prices, property rights, and distributions are determined; the history of those mechanisms and the interests they were built to serve; the ways in which the appearance of naturalness is manufactured and maintained; and the range of alternative construction choices that have been made in other times and places and could be made again. This curriculum is not advocacy for any particular economic arrangement. It is the restoration of the basic capacity to see economic life as a domain of human choice rather than natural law — which is the precondition for any genuine democratic engagement with economic questions.</text:p>
      <text:p text:style-name="Text_20_body">Economic literacy also means understanding the Society's own internal economy — how the kin currency works and why it was designed the way it was, what the commons is and what obligations it <text:soft-page-break/>generates, how mutual credit differs from debt, and what the Society's economic architecture is trying to accomplish and why. Members who understand the construction choices the Society has made are members who can participate in revising those choices as the Society's needs evolve. Members who do not understand them are members who will be unable to defend them when they are challenged — and they will be challenged, by the logic of the surrounding economy that finds alternative arrangements threatening precisely because they demonstrate that alternatives are possible.</text:p>
      <text:p text:style-name="Text_20_body">Derived from Axioms XI and XIII.</text:p>
      <text:p text:style-name="Horizontal_20_Line"/>
      <text:h text:style-name="Heading_20_3" text:outline-level="3">Community</text:h>
      <text:p text:style-name="Text_20_body"><text:span text:style-name="Strong_20_Emphasis">Principle 25. Community and Flourishing</text:span></text:p>
      <text:p text:style-name="Text_20_body">We accept primary responsibility for building and maintaining the conditions in which genuine community becomes possible — not as a feature we offer but as the central obligation of this organization, because community is the condition in which persons flourish and become more fully themselves. This is not a program or a service. It is the reason the Society exists.</text:p>
      <text:p text:style-name="Text_20_body">Genuine community is not produced by proximity alone. It requires intention, structure, and ongoing care. It requires rhythms of presence — regular gathering that creates the expectation of encounter rather than leaving connection to chance. It requires shared work — the experience of building something together that neither party could build alone. It requires shared ceremony — the marking of beginnings, endings, losses, and celebrations in ways that locate individual experience within a larger common life. And it requires time — the slow accumulation of shared history that makes members genuinely known to one another rather than merely familiar. The Society builds these conditions deliberately and treats their maintenance as a standing obligation rather than an optional feature.</text:p>
      <text:p text:style-name="Text_20_body">We measure the success of this organization by whether its members are actually flourishing — living meaningfully, working purposefully, relating genuinely, and connected to something larger than themselves. This is the only measure that matters, and every other metric the Society might be tempted to track — membership numbers, political influence, revenue, media coverage, the impressiveness of its events — is at best a proxy and at worst a corruption. Proxy measures do not merely miss the target. They move it. An organization that optimizes for membership numbers will do things to attract members that compromise the quality of what membership means. An organization that optimizes for political influence will make alliances that compromise its principles. In each case the organization has replaced its purpose with something easier to count — and that replacement is the defining institutional failure mode.</text:p>
      <text:p text:style-name="Text_20_body">Flourishing cannot be reduced to a single dimension. A member who is materially secure but isolated is not flourishing. A member who belongs to a warm community but has no meaningful work is not flourishing. A member who works purposefully but has lost connection to anything larger than their own projects is not flourishing. The measure is irreducibly multidimensional — which is precisely why it resists the optimization that destroys what it touches. The Society commits to building the conditions in which flourishing becomes possible rather than merely declaring it as a goal — which means <text:soft-page-break/>building genuine community as the irreducible foundation on which everything else the Society offers depends.</text:p>
      <text:p text:style-name="Text_20_body">Derived from Axioms III and VI.</text:p>
      <text:p text:style-name="Horizontal_20_Line"/>
      <text:p text:style-name="Text_20_body"><text:span text:style-name="Strong_20_Emphasis">Principle 26. Resistance to Atomization</text:span></text:p>
      <text:p text:style-name="Text_20_body">The destruction of community in the current era is not accidental. It is the predictable outcome of forces operating exactly as designed — forces that the Society names honestly because you cannot resist what you cannot see.</text:p>
      <text:p text:style-name="Text_20_body">Market logic converts communal relationships into transactions. What was once exchanged freely between neighbors — care, labor, knowledge, time, the watching of children and the tending of the sick — becomes a service to be purchased and a service to be sold. The reciprocity that made those exchanges community rather than commerce is eliminated. The relationship that formed around the exchange is replaced by a contract. The neighbor becomes a vendor. The community becomes a market. This conversion does not happen through malice — it happens because market logic is the dominant organizing principle of the current era and it colonizes every domain it touches, converting every human relationship into an opportunity for exchange at a price.</text:p>
      <text:p text:style-name="Text_20_body">Third places — the spaces where people gathered without spending money, where relationships formed across difference, where belonging was not contingent on consumption — have been systematically eliminated or converted. The pub, the town square, the community hall, the front porch, the park designed for lingering rather than passing through — these were the physical infrastructure of community life. They have been replaced by commercial spaces that tolerate presence only in proportion to consumption, or by private spaces that serve individuals rather than communities. The destruction of third places is the destruction of the physical conditions in which accidental encounter and gradual acquaintance — the raw material of genuine community — become possible.</text:p>
      <text:p text:style-name="Text_20_body">The attention economy has substituted algorithmic engagement for genuine presence. It delivers the sensation of connection — the scroll, the like, the notification, the sense of being part of something — while systematically replacing the conditions that make genuine connection possible. Time that could be spent in the slow, unglamorous work of building real relationships is spent in the frictionless consumption of simulated ones. The substitution is not neutral — it is engineered, deliberately, by systems whose revenue depends on capturing attention that would otherwise go to the people physically present in a person's life.</text:p>
      <text:p text:style-name="Text_20_body">The Society names these mechanisms not to condemn the people who have been shaped by them — which is all of us — but to create the conditions in which they can be recognized and resisted. We build community life that is structurally incompatible with the logic of atomization — that creates genuine alternatives to transactional relationships, that maintains physical spaces for unglamorous presence, that treats time spent together as irreducibly valuable rather than as a cost to be minimized. We do not moralize about screens or markets. We build something better and we make it available.</text:p>
      <text:p text:style-name="Text_20_body">Derived from Axioms II and VI.</text:p>
      <text:p text:style-name="Horizontal_20_Line"/>
      <text:h text:style-name="Heading_20_3" text:outline-level="3"><text:soft-page-break/>Ecology and Inheritance</text:h>
      <text:p text:style-name="Text_20_body"><text:span text:style-name="Strong_20_Emphasis">Principle 27. Ecological Stewardship</text:span></text:p>
      <text:p text:style-name="Text_20_body">We are not separate from the living world. We are part of it. This is not a poetic sentiment — it is a factual claim about what human beings are. We are biological creatures produced by the same evolutionary processes that produced every other living thing, dependent on the same atmospheric chemistry, the same water cycles, the same soil communities, the same web of relationships that connects every living system to every other. We did not arrive from outside nature and set up operations within it. We emerged from it. We are constituted by it. We cannot exit it regardless of how sophisticated our tools become. The pretense that we stand above the living world managing it for our purposes from outside is not just philosophically wrong — it is the pretense that has made the current crisis possible.</text:p>
      <text:p text:style-name="Text_20_body">The land, water, and living systems that sustain us are not resources we manage but a community we belong to. We hold what we share with the living world in trust for those who come after us — human and non-human alike. The living systems being destroyed in the current extinction event represent millions of years of distinct biological history whose logic and worth exist entirely independently of whether any human generation chooses to recognize them. We are passing through something vastly older and larger than ourselves. That fact changes everything about how we are obligated to behave within it.</text:p>
      <text:p text:style-name="Text_20_body">The default is non-interference. The burden of justification falls on those who would extract, develop, or disturb — not on those who would restrain. It is not enough that a use is beneficial, necessary, or economically sound. Those who would act must demonstrate that what will be lost can be restored, that the irreversible cost is worth what cannot be recovered, and that those who come after — human and non-human — have been genuinely considered. Where that demonstration cannot be made, restraint is not a counsel of passivity. It is the only honest response to what we do not own and cannot recreate.</text:p>
      <text:p text:style-name="Text_20_body">Derived from Axioms IV and V.</text:p>
      <text:p text:style-name="Horizontal_20_Line"/>
      <text:p text:style-name="Text_20_body"><text:span text:style-name="Strong_20_Emphasis">Principle 28. Holding in Trust</text:span></text:p>
      <text:p text:style-name="Text_20_body">No generation creates what it receives. The inheritance of the earth — its land, its living systems, its atmosphere, its accumulated knowledge and institutions — arrives before any living person and persists beyond them. What no one has earned, no one owns. We are inhabitants and recipients, not authors and proprietors. The obligation this generates is not one of generosity toward future generations — it is the recognition that what we hold was never ours to consume in the first place.</text:p>
      <text:p text:style-name="Text_20_body">This obligation extends to everything the Society builds. The institutions, governance structures, culture, and commons of a Resolute Society are held in trust for future members not yet present — just as we received what we have from those who came before us. We accept responsibility for building institutions that are designed to be inherited: legible to future members, adaptable to future conditions, and faithful to the foundations without being captured by the preferences of any founding generation. We resist decisions that serve present members at the expense of future ones. The measure of what we build is not whether it serves us well but whether it serves those who will carry it forward.</text:p>
      <text:p text:style-name="Text_20_body"><text:soft-page-break/>The trust extends in both directions simultaneously — backward in gratitude to those whose work we received, and forward in obligation to those who will receive ours. We did not build the world we inhabit. We will not inhabit the world we build. That asymmetry is not a cause for despair. It is the condition of genuine membership in something larger than any single generation — which is what the Society is trying to be.</text:p>
      <text:p text:style-name="Text_20_body">Derived from Axiom IV.</text:p>
      <text:p text:style-name="Horizontal_20_Line"/>
      <text:h text:style-name="Heading_20_3" text:outline-level="3">Governance</text:h>
      <text:p text:style-name="Text_20_body"><text:span text:style-name="Strong_20_Emphasis">Principle 29. Consent and Accountability</text:span></text:p>
      <text:p text:style-name="Text_20_body">Authority within this organization requires genuine ongoing consent and remains utterly answerable to the members subject to it. Consent must be informed, genuine, and always revocable — members must retain the genuine ability to withdraw consent, dissent, and recall authority without prohibitive cost. Accountability is the mechanism by which consent remains real rather than nominal. An organization whose members cannot effectively hold it accountable has already begun losing its legitimacy.</text:p>
      <text:p text:style-name="Text_20_body">Accountability is not only a structural feature. It is a practice — a capacity that exists only in its exercise and atrophies when left to procedures and mechanisms that members no longer actively engage. A community that has outsourced accountability to formal processes — that trusts the recall mechanism to function without ever using it, that trusts the petition system to surface concerns without members who know how to use it, that trusts the deliberative requirements to produce genuine deliberation without members who practice genuine deliberation — has not secured accountability. It has secured the appearance of accountability while the substance quietly disappears.</text:p>
      <text:p text:style-name="Text_20_body">The Society therefore treats the active practice of accountability as a standing obligation of membership rather than a feature of governance that operates independently of member engagement. Members who participate in governance, who use the petition system, who exercise the right of dissent, who attend deliberations and ask hard questions — these members are not merely exercising individual rights. They are maintaining a collective capacity that will atrophy without them. The governance structures exist to make accountability possible. Members make it real. That distinction matters because structures without practice produce the same outcome as no structures at all — authority that is formally answerable and substantively unaccountable.</text:p>
      <text:p text:style-name="Text_20_body">Derived from Axioms VIII, IX, and XI.</text:p>
      <text:p text:style-name="Horizontal_20_Line"/>
      <text:p text:style-name="Text_20_body"><text:span text:style-name="Strong_20_Emphasis">Principle 30. Participation and Subsidiarity</text:span></text:p>
      <text:p text:style-name="Text_20_body">Members have a genuine role in shaping the decisions that affect them — not merely the right to ratify decisions made elsewhere. Decisions belong as close as possible to the people and places most affected by them. This is especially true of morally grave decisions — those touching life, dignity, land, and belonging. Distance from consequence corrupts judgment. Larger bodies exist to support what smaller ones cannot do alone, not to absorb what they can.</text:p>
      <text:p text:style-name="Text_20_body"><text:soft-page-break/>The reason distance corrupts judgment is not merely that local actors have better information — though they do. It is that distance from consequence is one of the three primary mechanisms of moral blindness that Axiom II names. A decision-maker who does not encounter what their decisions cost — who is insulated from the consequences by institutional distance, by abstraction, by the gap between the room where decisions are made and the lives those decisions shape — is operating under exactly the conditions that produce moral catastrophe through entirely ordinary means. Subsidiarity is therefore not just an efficiency argument or a democratic preference. It is a structural defense against the most reliable mechanism of moral failure in institutional life. We keep decisions close to consequence because we know what happens when we don't.</text:p>
      <text:p text:style-name="Text_20_body">The capacity for genuine participation — for shaping decisions rather than ratifying them, for governing rather than being governed — exists only in practice. Communities that have outsourced decision-making to representative bodies, professional administrators, or governance mechanisms that operate without active member engagement lose the practical capacity for self-governance over time. The member who has never participated in a genuine deliberation, who has never exercised the petition system, who has never shaped a decision that actually affected them — that member cannot suddenly participate effectively when the stakes are highest. The Society therefore treats active participation not as an optional expression of civic virtue but as a standing practice that members maintain because the alternative is the gradual loss of the capacity that self-governance requires.</text:p>
      <text:p text:style-name="Text_20_body">Derived from Axioms II, VIII, IX, and XI.</text:p>
      <text:p text:style-name="Horizontal_20_Line"/>
      <text:p text:style-name="Text_20_body"><text:span text:style-name="Strong_20_Emphasis">Principle 31. Transparency</text:span></text:p>
      <text:p text:style-name="Text_20_body">Institutions must be comprehensible to the people subject to them. Information about decisions, resources, and operations is held in common. Complexity shall not be used as a barrier to participation or a shield for power. You cannot genuinely consent to what you cannot understand — opacity is therefore a form of illegitimacy. All people have the right to understand what governs them.</text:p>
      <text:p text:style-name="Text_20_body">Opacity does not always arrive as deliberate concealment. More often it accumulates through the same rational problem-solving process that Axiom XII describes. Each layer of governance complexity was added to solve a real problem — a loophole to close, an edge case to address, a procedure to clarify. The accumulated complexity becomes a barrier to comprehension that serves power without anyone having designed it that way. The member who cannot follow the governance process because it has become too elaborate to track is effectively excluded from participation regardless of whether any formal barrier exists. The Society therefore treats the comprehensibility of its governance as a standing design requirement rather than an incidental feature — and treats accumulated complexity that obscures governance as a form of opacity requiring the same active correction as deliberate concealment.</text:p>
      <text:p text:style-name="Text_20_body">The capacity to understand what governs you — to read founding documents, to follow deliberations, to trace decisions back to their sources, to recognize when governance is serving members and when it has begun serving itself — exists only in practice. A member who has never engaged with the Society's governance in depth cannot suddenly engage effectively when it matters most. The Society therefore <text:soft-page-break/>accepts responsibility not just for producing governance that is comprehensible in principle but for actively cultivating the capacity of members to engage with it in practice. This means the Division of Education maintains curriculum on how the Society governs itself — not as civics instruction but as the transmission of a practical capacity that self-governance requires. Transparent governance and capable members are not separate commitments. They are the two conditions that make genuine consent possible.</text:p>
      <text:p text:style-name="Text_20_body">Derived from Axioms VIII, IX, XI, and XII.</text:p>
      <text:p text:style-name="Horizontal_20_Line"/>
      <text:p text:style-name="Text_20_body"><text:span text:style-name="Strong_20_Emphasis">Principle 32. Structural Integrity</text:span></text:p>
      <text:p text:style-name="Text_20_body">The Society does not trust good intentions to protect against the corruption and concentration of power. This is not cynicism about its members — it is the most important lesson that human history teaches about institutions. Every organization that has been captured by power concentration believed at its founding that its members were virtuous enough to resist that tendency. The belief was sincere. It was also insufficient. Virtue describes the founders. Structure constrains everyone who comes after them.</text:p>
      <text:p text:style-name="Text_20_body">The incentive structures that power creates are more powerful than individual virtue. A person who enters a position of authority with genuine commitment to the community's interests encounters, over time, a steady accumulation of reasons why their continued authority serves those interests — why the exception is warranted, why the usual constraints don't apply in this case, why trusting them a little further will produce better outcomes than the structure allows. These reasons are not always wrong. They are always available. And they are available precisely because power generates them. The structure exists to resist arguments that would not exist without the power they are being used to protect.</text:p>
      <text:p text:style-name="Text_20_body">The Society therefore builds structural protections against power concentration that operate regardless of the virtue of the people subject to them. Sortition distributes governance authority by lot rather than allowing it to accumulate in self-selected individuals. Term limits prevent the consolidation of institutional knowledge into permanent personal power. Recall mechanisms ensure that authority can be withdrawn without prohibitive cost when it stops serving the community. The prohibition on wealth purchasing governance power removes the most reliable historical mechanism of capture. These structures are not expressions of distrust toward any particular member. They are expressions of honest understanding of what power does to people — all people — over time.</text:p>
      <text:p text:style-name="Text_20_body">The Society also commits to treating arguments for exception with structural suspicion. The case for trusting a particular person or body with unchecked authority is always available and always compelling in the moment. The founding generation is visionary. The crisis is urgent. The alternative is worse. The structure is getting in the way of what needs to be done. These arguments will be made. They will sometimes be made honestly and with genuine care for the community. The Society receives them with respect and refuses them with consistency. The moment the Society begins making exceptions to its structural protections on the basis of the virtue of the person asking for them it has begun the process that ends in capture. Eternal vigilance is not a slogan. It is a structural requirement — which means it cannot depend on anyone's willingness to be vigilant.</text:p>
      <text:p text:style-name="Text_20_body"><text:soft-page-break/>Derived from Axiom IX.</text:p>
      <text:p text:style-name="Horizontal_20_Line"/>
      <text:p text:style-name="Text_20_body"><text:span text:style-name="Strong_20_Emphasis">Principle 33. Institutional Simplicity</text:span></text:p>
      <text:p text:style-name="Text_20_body">Complexity is not free. Every layer of organization added to solve a problem — every division, every committee, every program, every governance mechanism, every standing obligation — becomes a cost that must be maintained regardless of whether the problem it was built to solve persists. The Society that cannot simplify when complexity stops paying its way becomes brittle — not because it failed but because it succeeded, and kept succeeding, past the point where success remained sustainable.</text:p>
      <text:p text:style-name="Text_20_body">The Society therefore treats simplicity as a form of strength rather than inadequacy. A Society that can function with less is more resilient than one that requires more to function at the same level. Every addition to the Society's institutional life — every new division, every new program, every new governance requirement — must be evaluated not just for the problem it solves but for the cost it creates. What will it take to maintain this? What dependencies does it generate? What will the Society have to give up elsewhere to sustain it? What happens to the Society if this addition fails or becomes too costly to maintain? These are not bureaucratic questions. They are survival questions. A Society that cannot ask them honestly will accumulate complexity until complexity defeats it.</text:p>
      <text:p text:style-name="Text_20_body">The Society commits to periodic review of its own institutional complexity — asking not just whether each existing structure is functioning but whether it is still paying its way. Structures that were necessary at founding may become unnecessary as the Society matures and members develop capacity. Programs that solved urgent problems may persist long after the urgency has passed, consuming resources and attention that could go elsewhere. The Society treats the simplification of its own institutions not as failure but as one of the most demanding expressions of institutional health — the willingness to let go of what is no longer worth its cost even when it was once worth building.</text:p>
      <text:p text:style-name="Text_20_body">The pressure toward complexity is constant and rational. Every problem the Society encounters will generate proposals for institutional responses. Each proposal will be individually justified. The accumulated cost of justified additions is the trap Axiom XII names. We resist it not by refusing to solve problems but by insisting that every solution be evaluated against its full lifecycle cost — including the cost of maintaining it long after the problem it solved has been forgotten.</text:p>
      <text:p text:style-name="Text_20_body">Derived from Axiom XII.</text:p>
      <text:p text:style-name="P2"><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21:32:18.427787325</meta:creation-date>
    <dc:date>2026-06-18T14:11:44.004161724</dc:date>
    <meta:editing-duration>PT2H12M20S</meta:editing-duration>
    <meta:editing-cycles>11</meta:editing-cycles>
    <meta:generator>LibreOffice/24.2.7.2$Linux_X86_64 LibreOffice_project/420$Build-2</meta:generator>
    <meta:document-statistic meta:table-count="0" meta:image-count="0" meta:object-count="0" meta:page-count="23" meta:paragraph-count="186" meta:word-count="11333" meta:character-count="73235" meta:non-whitespace-character-count="61873"/>
  </office:meta>
</office:document-meta>
</file>