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8: Participation and Subsidiarity</text:span></text:p>
      <text:p text:style-name="P1"><text:span text:style-name="Emphasis">Members of a Resolute Society have a genuine role in shaping the decisions that affect them — not merely the right to ratify decisions made elsewhere. Decisions belong as close as possible to the people and places most affected by them. This is especially true of morally grave decisions — those touching life, dignity, land, and belonging. Distance from consequence corrupts judgment. Larger bodies exist to support what smaller ones cannot do alone, not to absorb what they can.</text:span></text:p>
      <text:p text:style-name="P1"><text:span text:style-name="Emphasis">Derived from Axioms VI, VII,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28:37.484005880</meta:creation-date>
    <dc:date>2026-06-16T12:28:45.855901577</dc:date>
    <meta:editing-duration>PT8S</meta:editing-duration>
    <meta:editing-cycles>1</meta:editing-cycles>
    <meta:document-statistic meta:table-count="0" meta:image-count="0" meta:object-count="0" meta:page-count="1" meta:paragraph-count="3" meta:word-count="89" meta:character-count="562" meta:non-whitespace-character-count="474"/>
    <meta:generator>LibreOffice/24.2.7.2$Linux_X86_64 LibreOffice_project/420$Build-2</meta:generator>
  </office:meta>
</office:document-meta>
</file>