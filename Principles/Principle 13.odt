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inciple 13: Flourishing as the Measure</text:span></text:p>
      <text:p text:style-name="P1"><text:span text:style-name="Emphasis">A Resolute Society measures its success by whether its members are actually flourishing — living meaningfully, working purposefully, relating genuinely, and connected to something larger than themselves. It does not measure success by growth, revenue, membership numbers, political influence, or any other proxy that mistakes the means for the end.</text:span></text:p>
      <text:p text:style-name="P1"><text:span text:style-name="Emphasis">Derived from Axioms II and V.</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21:20.782526524</meta:creation-date>
    <dc:date>2026-06-16T12:21:31.401313027</dc:date>
    <meta:editing-duration>PT10S</meta:editing-duration>
    <meta:editing-cycles>1</meta:editing-cycles>
    <meta:document-statistic meta:table-count="0" meta:image-count="0" meta:object-count="0" meta:page-count="1" meta:paragraph-count="3" meta:word-count="61" meta:character-count="417" meta:non-whitespace-character-count="358"/>
    <meta:generator>LibreOffice/24.2.7.2$Linux_X86_64 LibreOffice_project/420$Build-2</meta:generator>
  </office:meta>
</office:document-meta>
</file>