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rinciple 15: Ecological Stewardship</text:span></text:p>
      <text:p text:style-name="P1"><text:span text:style-name="Emphasis">A Resolute Society recognizes that it is not separate from the natural world — it is part of it. The land, water, and living systems that sustain human life are not resources to be managed but a community to belong to. What is shared with the living world is held in trust for those who come after — human and non-human alike. A Resolute Society rejects degradation it cannot restore and consumption that leaves depletion. Future generations have the same right to a living world that current members inherited, and a Resolute Society accepts responsibility for passing it forward intact.</text:span></text:p>
      <text:p text:style-name="P1"><text:span text:style-name="Emphasis">Derived from Axioms III, V, and X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23:44.444560176</meta:creation-date>
    <dc:date>2026-06-16T12:23:54.146928760</dc:date>
    <meta:editing-duration>PT10S</meta:editing-duration>
    <meta:editing-cycles>1</meta:editing-cycles>
    <meta:document-statistic meta:table-count="0" meta:image-count="0" meta:object-count="0" meta:page-count="1" meta:paragraph-count="3" meta:word-count="109" meta:character-count="658" meta:non-whitespace-character-count="550"/>
    <meta:generator>LibreOffice/24.2.7.2$Linux_X86_64 LibreOffice_project/420$Build-2</meta:generator>
  </office:meta>
</office:document-meta>
</file>