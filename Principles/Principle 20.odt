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inciple 20: Precaution</text:span></text:p>
      <text:p text:style-name="Text_20_body"><text:span text:style-name="Emphasis">Where evidence is insufficient to reliably predict the consequences of an action, and where those consequences may be irreversible or significantly harmful, a Resolute Society defaults to the position that preserves the most options and causes the least irreversible harm. Uncertainty is not a reason for paralysis — it is a reason for humility about the pace and scale of action. The burden of proof falls on irreversibility, not on caution. What cannot be undone demands a higher threshold of certainty before it is done.</text:span></text:p>
      <text:p text:style-name="Text_20_body"><text:span text:style-name="Emphasis">Derived from Axioms I, X, and Principle 2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5:30:30.150441955</meta:creation-date>
    <meta:generator>LibreOffice/24.2.7.2$Linux_X86_64 LibreOffice_project/420$Build-2</meta:generator>
    <dc:date>2026-06-16T15:30:58.249917660</dc:date>
    <meta:editing-duration>PT28S</meta:editing-duration>
    <meta:editing-cycles>1</meta:editing-cycles>
    <meta:document-statistic meta:table-count="0" meta:image-count="0" meta:object-count="0" meta:page-count="1" meta:paragraph-count="3" meta:word-count="95" meta:character-count="589" meta:non-whitespace-character-count="496"/>
  </office:meta>
</office:document-meta>
</file>