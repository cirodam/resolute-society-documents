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14: Community</text:span></text:p>
      <text:p text:style-name="P1"><text:span text:style-name="Emphasis">A Resolute Society accepts primary responsibility for building and maintaining the conditions in which genuine community becomes possible — not as a feature it offers but as the central obligation of the organization, because community is the condition in which persons flourish and become more fully themselves. It actively resists the forces of atomization that have destroyed the connective tissue of American life. It builds rhythms of presence, shared work, and shared ceremony that make members genuinely known to one another over time. Genuine community requires intention, structure, and ongoing care — it does not arise spontaneously and cannot be sustained passively. To be a member of a Resolute Society is to accept responsibility not just for your own participation but for the communal life that makes participation meaningful.</text:span></text:p>
      <text:p text:style-name="P1"><text:span text:style-name="Emphasis">Derived from Axioms V and VI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2:22:31.329868576</meta:creation-date>
    <dc:date>2026-06-16T12:22:40.390093361</dc:date>
    <meta:editing-duration>PT9S</meta:editing-duration>
    <meta:editing-cycles>1</meta:editing-cycles>
    <meta:document-statistic meta:table-count="0" meta:image-count="0" meta:object-count="0" meta:page-count="1" meta:paragraph-count="3" meta:word-count="136" meta:character-count="895" meta:non-whitespace-character-count="760"/>
    <meta:generator>LibreOffice/24.2.7.2$Linux_X86_64 LibreOffice_project/420$Build-2</meta:generator>
  </office:meta>
</office:document-meta>
</file>