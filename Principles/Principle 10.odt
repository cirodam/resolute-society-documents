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orphans="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Principle 10: Cultivation</text:span></text:p>
      <text:p text:style-name="P1"><text:span text:style-name="Emphasis">A Resolute Society accepts responsibility for the knowledge, skill, and judgment of its members — not as a service it provides but as an obligation it shares. Every person deserves access to the full breadth of human knowledge and capability, and genuine education is a condition of dignity, not a commodity. It builds systems of formation — colleges, apprenticeships, curricula — through which knowledge, skill, and wisdom pass from one generation to the next through human relationship rather than mere instruction. It cultivates not just competence but judgment: the capacity to think clearly, act wisely, and transmit what is known to those who come after. Human capacities are not permanent possessions. They are achievements that require ongoing practice and active transmission to survive. What communities do not practice they forget. What they forget they lose — sometimes permanently. The knowledge of how to grow food, how to heal, how to govern, how to resolve conflict, how to build — these live in practice or they do not live at all. A Resolute Society builds systems of formation not because education is valuable in the abstract but because the alternative is the loss of what cannot be afforded to lose.</text:span></text:p>
      <text:p text:style-name="P1"><text:span text:style-name="Emphasis">Derived from Axioms II, V, and X.</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6T12:17:17.877847822</meta:creation-date>
    <dc:date>2026-06-16T12:17:34.372427692</dc:date>
    <meta:editing-duration>PT16S</meta:editing-duration>
    <meta:editing-cycles>1</meta:editing-cycles>
    <meta:document-statistic meta:table-count="0" meta:image-count="0" meta:object-count="0" meta:page-count="1" meta:paragraph-count="3" meta:word-count="204" meta:character-count="1279" meta:non-whitespace-character-count="1073"/>
    <meta:generator>LibreOffice/24.2.7.2$Linux_X86_64 LibreOffice_project/420$Build-2</meta:generator>
  </office:meta>
</office:document-meta>
</file>