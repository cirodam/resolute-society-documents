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inciple 8: Non-Domination</text:span></text:p>
      <text:p text:style-name="Text_20_body"><text:span text:style-name="Emphasis">A Resolute Society rejects domination. It holds as illegitimate the use of force, coercion, or control of resources to subordinate another person or to claim authority not freely granted. This applies to the state, to markets, to institutions, and to members in their relations with each other. Authority within a Resolute Society flows from consent and is always recallable.</text:span></text:p>
      <text:p text:style-name="Text_20_body"><text:span text:style-name="Emphasis">Derived from Axioms II, VII,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12:28.468658244</meta:creation-date>
    <dc:date>2026-06-16T12:12:38.798447178</dc:date>
    <meta:editing-duration>PT10S</meta:editing-duration>
    <meta:editing-cycles>1</meta:editing-cycles>
    <meta:document-statistic meta:table-count="0" meta:image-count="0" meta:object-count="0" meta:page-count="1" meta:paragraph-count="3" meta:word-count="69" meta:character-count="440" meta:non-whitespace-character-count="374"/>
    <meta:generator>LibreOffice/24.2.7.2$Linux_X86_64 LibreOffice_project/420$Build-2</meta:generator>
  </office:meta>
</office:document-meta>
</file>