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Principle 6: Epistemic Humility in Judgment</text:span></text:p>
      <text:p text:style-name="Text_20_body"><text:span text:style-name="Emphasis">When a decision is morally grave, irreducibly particular, and the relevant facts are only accessible through genuine proximity to the situation, the legitimacy of external judgment diminishes to the point of disappearance. Those closest to the facts, with genuine stakes in the outcome, are in the only position from which the decision can be made with any legitimacy. A Resolute Society builds the conditions in which such decisions can be made with wisdom and care. It does not judge from outside what cannot be judged from outside.</text:span></text:p>
      <text:p text:style-name="Text_20_body"><text:span text:style-name="Emphasis">Derived from Axioms I, II, and VII.</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6T12:02:32.591829584</meta:creation-date>
    <meta:generator>LibreOffice/24.2.7.2$Linux_X86_64 LibreOffice_project/420$Build-2</meta:generator>
    <dc:date>2026-06-16T12:04:01.127058015</dc:date>
    <meta:editing-duration>PT1M28S</meta:editing-duration>
    <meta:editing-cycles>1</meta:editing-cycles>
    <meta:document-statistic meta:table-count="0" meta:image-count="0" meta:object-count="0" meta:page-count="1" meta:paragraph-count="3" meta:word-count="100" meta:character-count="612" meta:non-whitespace-character-count="515"/>
  </office:meta>
</office:document-meta>
</file>