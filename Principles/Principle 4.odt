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orphans="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Principle 4: Sovereignty of the Person</text:span></text:p>
      <text:p text:style-name="P1"><text:span text:style-name="Emphasis">Every person has the right to be the genuine author of their own beliefs, decisions, and life. A Resolute Society holds as illegitimate any system — corporate, political, or social — that colonizes the interior life, engineers dependence, or substitutes another's will for one's own without knowledge or consent. It builds community life that protects and restores this capacity in its members. The manipulation of persons for profit, power, or ideology is not merely harmful — it is a violation of what persons are.</text:span></text:p>
      <text:p text:style-name="P1"><text:span text:style-name="Emphasis">Derived from Axioms I and II.</text:span></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16T11:59:33.748637511</meta:creation-date>
    <meta:generator>LibreOffice/24.2.7.2$Linux_X86_64 LibreOffice_project/420$Build-2</meta:generator>
    <dc:date>2026-06-16T12:00:57.278731277</dc:date>
    <meta:editing-duration>PT1M23S</meta:editing-duration>
    <meta:editing-cycles>1</meta:editing-cycles>
    <meta:document-statistic meta:table-count="0" meta:image-count="0" meta:object-count="0" meta:page-count="1" meta:paragraph-count="3" meta:word-count="93" meta:character-count="583" meta:non-whitespace-character-count="490"/>
  </office:meta>
</office:document-meta>
</file>