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orphans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Principle 3: Deliberation</text:span></text:p>
      <text:p text:style-name="P1"><text:span text:style-name="Emphasis">A Resolute Society holds that genuine disagreement is not a failure of consensus but the mechanism through which it approaches truth together. Dissent is not a problem to be managed but a resource to be protected. It builds community life in which members can disagree honestly without social or political cost — where the person who sees differently is heard before they are outvoted, and where persistent disagreement is treated as information rather than obstruction. It distinguishes between deliberation and decision: during deliberation all views are in play and contrary voices are actively sought; after decision members act together while preserving the right to return. It protects dissent because it may be wrong — and the person who says so may be the most valuable member in the room.</text:span></text:p>
      <text:p text:style-name="Standard">Derived from Axiom I and Principle 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6T11:57:15.299162224</meta:creation-date>
    <meta:generator>LibreOffice/24.2.7.2$Linux_X86_64 LibreOffice_project/420$Build-2</meta:generator>
    <dc:date>2026-06-16T11:59:22.850054110</dc:date>
    <meta:editing-duration>PT2M7S</meta:editing-duration>
    <meta:editing-cycles>1</meta:editing-cycles>
    <meta:document-statistic meta:table-count="0" meta:image-count="0" meta:object-count="0" meta:page-count="1" meta:paragraph-count="3" meta:word-count="137" meta:character-count="858" meta:non-whitespace-character-count="722"/>
  </office:meta>
</office:document-meta>
</file>