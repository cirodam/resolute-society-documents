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Principle 7: Subsistence</text:span></text:p>
      <text:p text:style-name="P1"><text:span text:style-name="Emphasis">Human dignity cannot exist in the absence of food, shelter, healthcare, and safety. A Resolute Society accepts collective responsibility for ensuring every member has these essentials. This is mutual obligation, not charity — members guarantee to each other what dignity requires. The material floor is not conditional on merit, productivity, or compliance. It is what dignity demands.</text:span></text:p>
      <text:p text:style-name="P1"><text:span text:style-name="Emphasis">Derived from Axioms II and IV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07:14.458456342</meta:creation-date>
    <dc:date>2026-06-16T12:07:27.788557366</dc:date>
    <meta:editing-duration>PT13S</meta:editing-duration>
    <meta:editing-cycles>1</meta:editing-cycles>
    <meta:document-statistic meta:table-count="0" meta:image-count="0" meta:object-count="0" meta:page-count="1" meta:paragraph-count="3" meta:word-count="65" meta:character-count="439" meta:non-whitespace-character-count="376"/>
    <meta:generator>LibreOffice/24.2.7.2$Linux_X86_64 LibreOffice_project/420$Build-2</meta:generator>
  </office:meta>
</office:document-meta>
</file>