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orph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Principle 11: Sufficiency</text:span></text:p>
      <text:p text:style-name="P1"><text:span text:style-name="Emphasis">A Resolute Society recognizes that accumulation beyond enough ceases to produce flourishing and begins to harm — the person accumulating, the community around them, and the living world that sustains both. It builds its economic life around sufficiency rather than growth, and resists the conversion of the organization itself into a vehicle for accumulation.</text:span></text:p>
      <text:p text:style-name="P1"><text:span text:style-name="Emphasis">Derived from Axioms III, V, and X.</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2:19:10.208186873</meta:creation-date>
    <dc:date>2026-06-16T12:19:23.607368559</dc:date>
    <meta:editing-duration>PT13S</meta:editing-duration>
    <meta:editing-cycles>1</meta:editing-cycles>
    <meta:document-statistic meta:table-count="0" meta:image-count="0" meta:object-count="0" meta:page-count="1" meta:paragraph-count="3" meta:word-count="63" meta:character-count="418" meta:non-whitespace-character-count="357"/>
    <meta:generator>LibreOffice/24.2.7.2$Linux_X86_64 LibreOffice_project/420$Build-2</meta:generator>
  </office:meta>
</office:document-meta>
</file>