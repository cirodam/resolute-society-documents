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We hold simultaneously that circumstances shape persons profoundly and that persons remain genuine agents within their circumstances. We do not reduce outcomes to individual choice, because doing so denies the reality of conditions that are not of the person's making and produces cruelty dressed as accountability. We do not deny agency, because doing so reduces persons to objects of their circumstances and produces condescension dressed as compassion. Both failures violate dignity. We build community life, governance, and judgment around the honest acknowledgment of both truths — that where a person stands is partly the result of conditions they did not choose, and that who a person is remains genuinely their own.</text:span></text:p>
      <text:p text:style-name="Text_20_body"><text:span text:style-name="Emphasis">Derived from Axioms II and V.</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3:11:25.043789816</meta:creation-date>
    <dc:date>2026-06-17T13:11:45.452394881</dc:date>
    <meta:editing-duration>PT20S</meta:editing-duration>
    <meta:editing-cycles>1</meta:editing-cycles>
    <meta:document-statistic meta:table-count="0" meta:image-count="0" meta:object-count="0" meta:page-count="1" meta:paragraph-count="2" meta:word-count="116" meta:character-count="752" meta:non-whitespace-character-count="637"/>
    <meta:generator>LibreOffice/24.2.7.2$Linux_X86_64 LibreOffice_project/420$Build-2</meta:generator>
  </office:meta>
</office:document-meta>
</file>