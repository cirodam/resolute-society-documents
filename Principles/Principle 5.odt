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inciple 5: Equal Standing</text:h>
      <text:p text:style-name="P1"><text:span text:style-name="Strong_20_Emphasis">Principle 5: Equal Standing</text:span></text:p>
      <text:p text:style-name="P1"><text:span text:style-name="Emphasis">Every member participates with genuinely equal standing regardless of wealth, social capital, fluency with institutional language, or any other attribute that produces inequality of voice in ordinary life. A Resolute Society does not merely remove formal barriers to participation — it actively builds the conditions in which the quietest and most marginal member can be heard as fully as the most articulate and connected. Formal equality that produces substantive inequality is insufficient.</text:span></text:p>
      <text:p text:style-name="P1"><text:span text:style-name="Emphasis">Derived from Axiom II and Principle 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01:14.189082419</meta:creation-date>
    <meta:generator>LibreOffice/24.2.7.2$Linux_X86_64 LibreOffice_project/420$Build-2</meta:generator>
    <dc:date>2026-06-16T12:02:24.738581045</dc:date>
    <meta:editing-duration>PT1M10S</meta:editing-duration>
    <meta:editing-cycles>1</meta:editing-cycles>
    <meta:document-statistic meta:table-count="0" meta:image-count="0" meta:object-count="0" meta:page-count="1" meta:paragraph-count="4" meta:word-count="86" meta:character-count="585" meta:non-whitespace-character-count="502"/>
  </office:meta>
</office:document-meta>
</file>