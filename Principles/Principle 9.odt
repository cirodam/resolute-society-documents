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Principle 9: Restorative Justice</text:span></text:p>
      <text:p text:style-name="Text_20_body"><text:span text:style-name="Emphasis">When harm is done within a Resolute Society it asks not what punishment is deserved but what repair is possible. Its first obligation is to those who have been harmed — their safety, their healing, their needs define the response. Where the person who caused harm accepts genuine accountability, it works toward restoration: of the relationship, of the community, and where possible of the person themselves. Permanent exclusion from community is itself a serious harm, to be chosen only when the safety of members requires it and never as mere punishment. The dignity of every person — including those who have caused harm — remains inviolable throughout. Genuine accountability is more demanding than punishment, and the absence of suffering is not the absence of consequence.</text:span></text:p>
      <text:p text:style-name="Text_20_body"><text:span text:style-name="Emphasis">Derived from Axioms II, VIII, and IX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6T12:15:35.351158713</meta:creation-date>
    <dc:date>2026-06-16T12:15:42.040754312</dc:date>
    <meta:editing-duration>PT7S</meta:editing-duration>
    <meta:editing-cycles>1</meta:editing-cycles>
    <meta:document-statistic meta:table-count="0" meta:image-count="0" meta:object-count="0" meta:page-count="1" meta:paragraph-count="3" meta:word-count="133" meta:character-count="847" meta:non-whitespace-character-count="714"/>
    <meta:generator>LibreOffice/24.2.7.2$Linux_X86_64 LibreOffice_project/420$Build-2</meta:generator>
  </office:meta>
</office:document-meta>
</file>