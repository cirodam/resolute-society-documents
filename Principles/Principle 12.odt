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rinciple 12: Separation of Wealth from Power</text:span></text:p>
      <text:p text:style-name="P1"><text:span text:style-name="Emphasis">Material resources cannot purchase governance power, social standing, or disproportionate influence within a Resolute Society. The corruption of democratic life by concentrated wealth is one of the defining failures of the existing order. A Resolute Society builds structural separation between what a member owns and what a member can decide.</text:span></text:p>
      <text:p text:style-name="P1"><text:span text:style-name="Emphasis">Derived from Axioms II, V, and VIII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20:11.907697388</meta:creation-date>
    <dc:date>2026-06-16T12:20:30.234674189</dc:date>
    <meta:editing-duration>PT18S</meta:editing-duration>
    <meta:editing-cycles>1</meta:editing-cycles>
    <meta:document-statistic meta:table-count="0" meta:image-count="0" meta:object-count="0" meta:page-count="1" meta:paragraph-count="3" meta:word-count="64" meta:character-count="424" meta:non-whitespace-character-count="363"/>
    <meta:generator>LibreOffice/24.2.7.2$Linux_X86_64 LibreOffice_project/420$Build-2</meta:generator>
  </office:meta>
</office:document-meta>
</file>