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7: Consent and Accountability</text:span></text:p>
      <text:p text:style-name="P1"><text:span text:style-name="Emphasis">Authority within a Resolute Society requires genuine ongoing consent and remains utterly answerable to the members subject to it. Consent must be informed, genuine, and always revocable — members must retain the genuine ability to withdraw consent, dissent, and recall authority without prohibitive cost. Accountability is the mechanism by which consent remains real rather than nominal. An organization whose members cannot effectively hold it accountable has already begun losing its legitimacy.</text:span></text:p>
      <text:p text:style-name="P1"><text:span text:style-name="Emphasis">Derived from Axioms VI, VII, and VI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27:39.921476025</meta:creation-date>
    <dc:date>2026-06-16T12:27:49.549243386</dc:date>
    <meta:editing-duration>PT9S</meta:editing-duration>
    <meta:editing-cycles>1</meta:editing-cycles>
    <meta:document-statistic meta:table-count="0" meta:image-count="0" meta:object-count="0" meta:page-count="1" meta:paragraph-count="3" meta:word-count="82" meta:character-count="575" meta:non-whitespace-character-count="495"/>
    <meta:generator>LibreOffice/24.2.7.2$Linux_X86_64 LibreOffice_project/420$Build-2</meta:generator>
  </office:meta>
</office:document-meta>
</file>