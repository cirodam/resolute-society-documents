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orphans="1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1965in" style:contextual-spacing="false" fo:line-height="100%" fo:text-indent="0in" style:auto-text-indent="false"/>
    </style:style>
    <style:style style:name="P3" style:family="paragraph" style:parent-style-name="Text_20_body">
      <style:paragraph-properties fo:orphans="1"/>
    </style:style>
    <style:style style:name="T1" style:family="text">
      <style:text-properties fo:font-variant="normal" fo:text-transfor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Principle 19: Transparency</text:span></text:p>
      <text:p text:style-name="P3"><text:span text:style-name="Emphasis">The institutions of a Resolute Society must be comprehensible to the people subject to them. Information about decisions, resources, and operations is held in common. Complexity shall not be used as a barrier to participation or a shield for power. Genuine consent requires understanding — opacity is therefore a form of illegitimacy. Every member has the right to understand what governs them.</text:span></text:p>
      <text:p text:style-name="P3"><text:span text:style-name="Emphasis">Derived from Axioms VI and VIII, and Principle 17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2:29:28.609368112</meta:creation-date>
    <dc:date>2026-06-16T12:29:38.211250673</dc:date>
    <meta:editing-duration>PT9S</meta:editing-duration>
    <meta:editing-cycles>1</meta:editing-cycles>
    <meta:document-statistic meta:table-count="0" meta:image-count="0" meta:object-count="0" meta:page-count="1" meta:paragraph-count="3" meta:word-count="73" meta:character-count="470" meta:non-whitespace-character-count="399"/>
    <meta:generator>LibreOffice/24.2.7.2$Linux_X86_64 LibreOffice_project/420$Build-2</meta:generator>
  </office:meta>
</office:document-meta>
</file>