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orphans="1" fo:text-indent="0in" style:auto-text-indent="false"/>
    </style:style>
    <style:style style:name="P2"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2: Humility and Self-Correction</text:span></text:p>
      <text:p text:style-name="P2"><text:span text:style-name="Emphasis">A Resolute Society acknowledges that it may be wrong — individually and as an institution. It holds its beliefs provisionally and builds structures that make correction possible: a culture where being wrong is not stigmatized, mechanisms that surface error rather than conceal it, and protection for those who identify failure. The greatest institutional failure is not error itself but the refusal to correct i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1:55:15.996741100</meta:creation-date>
    <meta:generator>LibreOffice/24.2.7.2$Linux_X86_64 LibreOffice_project/420$Build-2</meta:generator>
    <dc:date>2026-06-16T11:57:01.230814502</dc:date>
    <meta:editing-duration>PT1M45S</meta:editing-duration>
    <meta:editing-cycles>1</meta:editing-cycles>
    <meta:document-statistic meta:table-count="0" meta:image-count="0" meta:object-count="0" meta:page-count="1" meta:paragraph-count="2" meta:word-count="68" meta:character-count="454" meta:non-whitespace-character-count="387"/>
  </office:meta>
</office:document-meta>
</file>