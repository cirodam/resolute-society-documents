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6: Institutional Stewardship</text:span></text:p>
      <text:p text:style-name="P1"><text:span text:style-name="Emphasis">A Resolute Society builds not for its present members alone but for those who come after. Its institutions, culture, and governance are held in trust for future members not yet present — just as what exists was received from those who came before. It accepts responsibility for building institutions designed to be inherited: legible to future members, adaptable to future conditions, and faithful to the foundations without being captured by the preferences of any founding generation. It resists decisions that serve present members at the expense of future ones. The measure of what is built is not whether it serves well now but whether it serves those who will carry it forward.</text:span></text:p>
      <text:p text:style-name="P1"><text:span text:style-name="Emphasis">Derived from Axioms III and VI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24:36.886134326</meta:creation-date>
    <dc:date>2026-06-16T12:24:46.541801995</dc:date>
    <meta:editing-duration>PT9S</meta:editing-duration>
    <meta:editing-cycles>1</meta:editing-cycles>
    <meta:document-statistic meta:table-count="0" meta:image-count="0" meta:object-count="0" meta:page-count="1" meta:paragraph-count="3" meta:word-count="121" meta:character-count="755" meta:non-whitespace-character-count="636"/>
    <meta:generator>LibreOffice/24.2.7.2$Linux_X86_64 LibreOffice_project/420$Build-2</meta:generator>
  </office:meta>
</office:document-meta>
</file>