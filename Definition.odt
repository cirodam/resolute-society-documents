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style style:name="P2" style:family="paragraph" style:parent-style-name="Subtitle">
      <style:text-properties fo:color="#1e3a5f" loext:opacity="100%"/>
    </style:style>
    <style:style style:name="P3" style:family="paragraph" style:parent-style-name="Title">
      <style:text-properties fo:color="#1e3a5f" loext:opacity="100%"/>
    </style:style>
    <style:style style:name="P4" style:family="paragraph" style:parent-style-name="Standard">
      <style:paragraph-properties fo:margin-left="0in" fo:margin-right="0in" style:line-height-at-least="0.198in" fo:text-indent="0in" style:auto-text-indent="false"/>
      <style:text-properties fo:color="#111111" loext:opacity="100%" style:font-name="IM FELL English SC" fo:font-size="10.5pt" fo:font-weight="bold" officeooo:paragraph-rsid="001f52f8" fo:background-color="transparent"/>
    </style:style>
    <style:style style:name="P5" style:family="paragraph" style:parent-style-name="First_20_Paragraph">
      <style:text-properties fo:color="#2c2c2c" loext:opacity="100%"/>
    </style:style>
    <style:style style:name="P6" style:family="paragraph" style:parent-style-name="Standard">
      <style:paragraph-properties style:line-height-at-least="0.198in"/>
      <style:text-properties fo:color="#2c2c2c" loext:opacity="100%" style:font-name="IM FELL English SC" fo:font-size="10.5pt" fo:font-weight="bold" fo:background-color="transparent"/>
    </style:style>
    <style:style style:name="P7" style:family="paragraph" style:parent-style-name="Standard">
      <style:paragraph-properties style:line-height-at-least="0.198in"/>
      <style:text-properties fo:color="#2c2c2c" loext:opacity="100%" style:font-name="IM FELL English SC" fo:background-color="transparent"/>
    </style:style>
    <style:style style:name="P8" style:family="paragraph" style:parent-style-name="Standard">
      <style:text-properties fo:color="#2c2c2c" loext:opacity="100%"/>
    </style:style>
    <style:style style:name="P9" style:family="paragraph" style:parent-style-name="First_20_Paragraph">
      <style:text-properties fo:color="#2c2c2c" loext:opacity="100%" officeooo:paragraph-rsid="003a82d1"/>
    </style:style>
    <style:style style:name="P10" style:family="paragraph" style:parent-style-name="First_20_Paragraph">
      <style:text-properties fo:color="#2c2c2c" loext:opacity="100%" officeooo:paragraph-rsid="003afd50"/>
    </style:style>
    <style:style style:name="P11" style:family="paragraph" style:parent-style-name="Standard">
      <style:paragraph-properties fo:text-indent="0in" style:auto-text-indent="false"/>
      <style:text-properties fo:color="#2c2c2c" loext:opacity="100%"/>
    </style:style>
    <style:style style:name="P12" style:family="paragraph" style:parent-style-name="Text_20_body">
      <style:paragraph-properties fo:margin-top="0.278in" fo:margin-bottom="0.0835in" style:contextual-spacing="false"/>
      <style:text-properties fo:color="#2c2c2c" loext:opacity="100%" officeooo:paragraph-rsid="00437437"/>
    </style:style>
    <style:style style:name="P13" style:family="paragraph" style:parent-style-name="Text_20_body">
      <style:paragraph-properties fo:text-indent="0in" style:auto-text-indent="false"/>
    </style:style>
    <style:style style:name="P14" style:family="paragraph" style:parent-style-name="Standard">
      <style:paragraph-properties fo:margin-top="0.1665in" fo:margin-bottom="0.278in" style:contextual-spacing="false"/>
      <style:text-properties fo:color="#3a3a3a" loext:opacity="100%" style:font-name="Georgia" fo:font-size="12pt" fo:font-style="italic" officeooo:paragraph-rsid="00437437" style:font-name-asian="Georgia1" style:font-size-asian="12pt" style:font-style-asian="italic" style:font-name-complex="Georgia1" style:font-size-complex="12pt" style:font-style-complex="italic"/>
    </style:style>
    <style:style style:name="P15" style:family="paragraph" style:parent-style-name="Standard">
      <style:paragraph-properties fo:margin-top="0.278in" fo:margin-bottom="0.0835in" style:contextual-spacing="false"/>
      <style:text-properties officeooo:paragraph-rsid="0047ebc2"/>
    </style:style>
    <style:style style:name="P16" style:family="paragraph" style:parent-style-name="Standard">
      <style:paragraph-properties fo:margin-left="0.25in" fo:margin-top="0in" fo:margin-bottom="0.1252in" style:contextual-spacing="false"/>
      <style:text-properties officeooo:paragraph-rsid="0047ebc2"/>
    </style:style>
    <style:style style:name="P17" style:family="paragraph" style:parent-style-name="Standard">
      <style:paragraph-properties fo:margin-left="0.25in" fo:margin-top="0.0417in" fo:margin-bottom="0.139in" style:contextual-spacing="false"/>
      <style:text-properties officeooo:paragraph-rsid="0047ebc2"/>
    </style:style>
    <style:style style:name="P18" style:family="paragraph" style:parent-style-name="Standard">
      <style:paragraph-properties fo:margin-top="0.222in" fo:margin-bottom="0.222in" style:contextual-spacing="false" fo:padding-left="0in" fo:padding-right="0in" fo:padding-top="0in" fo:padding-bottom="0.0835in" fo:border-left="none" fo:border-right="none" fo:border-top="none" fo:border-bottom="0.51pt solid #8b7355"/>
      <style:text-properties officeooo:paragraph-rsid="0047ebc2"/>
    </style:style>
    <style:style style:name="P19" style:family="paragraph" style:parent-style-name="Standard">
      <style:paragraph-properties fo:margin-top="0.3335in" fo:margin-bottom="0.1665in" style:contextual-spacing="false" fo:padding-left="0in" fo:padding-right="0in" fo:padding-top="0in" fo:padding-bottom="0.0555in" fo:border-left="none" fo:border-right="none" fo:border-top="none" fo:border-bottom="0.26pt solid #c4a862"/>
      <style:text-properties officeooo:paragraph-rsid="0047ebc2"/>
    </style:style>
    <style:style style:name="P20" style:family="paragraph" style:parent-style-name="Text_20_body">
      <style:paragraph-properties fo:orphans="1"/>
    </style:style>
    <style:style style:name="P21" style:family="paragraph" style:parent-style-name="Text_20_body">
      <style:paragraph-properties fo:text-indent="0in" style:auto-text-indent="false"/>
      <style:text-properties fo:color="#2c2416" loext:opacity="100%" style:font-name="Georgia" fo:font-size="12pt" fo:font-weight="bold" style:font-name-asian="Georgia1" style:font-size-asian="12pt" style:font-weight-asian="bold" style:font-name-complex="Georgia1" style:font-size-complex="12pt" style:font-weight-complex="bold"/>
    </style:style>
    <style:style style:name="P22" style:family="paragraph" style:parent-style-name="Heading_20_1">
      <style:text-properties fo:color="#1e3a5f" loext:opacity="100%"/>
    </style:style>
    <style:style style:name="P23" style:family="paragraph" style:parent-style-name="Heading_20_2">
      <style:paragraph-properties fo:text-indent="0in" style:auto-text-indent="false"/>
    </style:style>
    <style:style style:name="P24" style:family="paragraph" style:parent-style-name="Heading_20_2">
      <style:text-properties fo:color="#1e3a5f" loext:opacity="100%"/>
    </style:style>
    <style:style style:name="P25" style:family="paragraph" style:parent-style-name="Standard">
      <style:paragraph-properties fo:margin-left="0.25in" fo:margin-top="0.0417in" fo:margin-bottom="0.139in" style:contextual-spacing="false"/>
      <style:text-properties fo:color="#8b7355" loext:opacity="100%" style:font-name="Georgia" fo:font-size="10pt" fo:font-style="italic" officeooo:paragraph-rsid="0047ebc2" style:font-name-asian="Georgia1" style:font-size-asian="10pt" style:font-style-asian="italic" style:font-name-complex="Georgia1" style:font-size-complex="10pt" style:font-style-complex="italic"/>
    </style:style>
    <style:style style:name="P26" style:family="paragraph" style:parent-style-name="Standard">
      <style:paragraph-properties fo:margin-left="0.25in" fo:margin-top="0in" fo:margin-bottom="0.1252in" style:contextual-spacing="false"/>
      <style:text-properties fo:color="#1a1a1a" loext:opacity="100%" style:font-name="Georgia" fo:font-size="12pt" officeooo:paragraph-rsid="0047ebc2" style:font-name-asian="Georgia1" style:font-size-asian="12pt" style:font-name-complex="Georgia1" style:font-size-complex="12pt"/>
    </style:style>
    <style:style style:name="P27" style:family="paragraph" style:parent-style-name="Standard">
      <style:paragraph-properties fo:margin-top="0.3335in" fo:margin-bottom="0.1665in" style:contextual-spacing="false" fo:padding-left="0in" fo:padding-right="0in" fo:padding-top="0in" fo:padding-bottom="0.0555in" fo:border-left="none" fo:border-right="none" fo:border-top="none" fo:border-bottom="0.26pt solid #c4a862"/>
      <style:text-properties fo:color="#5c4a2a" loext:opacity="100%" style:font-name="Georgia" fo:font-size="11pt" fo:letter-spacing="0.0555in" fo:font-weight="bold" officeooo:paragraph-rsid="0047ebc2" style:font-name-asian="Georgia1" style:font-size-asian="11pt" style:font-weight-asian="bold" style:font-name-complex="Georgia1" style:font-size-complex="11pt" style:font-weight-complex="bold"/>
    </style:style>
    <style:style style:name="P28" style:family="paragraph" style:parent-style-name="Standard">
      <style:paragraph-properties fo:margin-left="0.25in" fo:margin-top="0in" fo:margin-bottom="0.1252in" style:contextual-spacing="false"/>
      <style:text-properties officeooo:paragraph-rsid="0047ebc2"/>
    </style:style>
    <style:style style:name="T1" style:family="text">
      <style:text-properties officeooo:rsid="00207e9d"/>
    </style:style>
    <style:style style:name="T2" style:family="text">
      <style:text-properties officeooo:rsid="0024f617"/>
    </style:style>
    <style:style style:name="T3" style:family="text">
      <style:text-properties officeooo:rsid="0026ccf4"/>
    </style:style>
    <style:style style:name="T4" style:family="text">
      <style:text-properties officeooo:rsid="0027efd4"/>
    </style:style>
    <style:style style:name="T5" style:family="text">
      <style:text-properties officeooo:rsid="00297856"/>
    </style:style>
    <style:style style:name="T6" style:family="text">
      <style:text-properties officeooo:rsid="002a39be"/>
    </style:style>
    <style:style style:name="T7" style:family="text">
      <style:text-properties officeooo:rsid="002b7d10"/>
    </style:style>
    <style:style style:name="T8" style:family="text">
      <style:text-properties officeooo:rsid="002cc6bf"/>
    </style:style>
    <style:style style:name="T9" style:family="text">
      <style:text-properties officeooo:rsid="002cf6af"/>
    </style:style>
    <style:style style:name="T10" style:family="text">
      <style:text-properties officeooo:rsid="002ec032"/>
    </style:style>
    <style:style style:name="T11" style:family="text">
      <style:text-properties officeooo:rsid="002f17f7"/>
    </style:style>
    <style:style style:name="T12" style:family="text">
      <style:text-properties officeooo:rsid="00310cfc"/>
    </style:style>
    <style:style style:name="T13" style:family="text">
      <style:text-properties officeooo:rsid="003210b5"/>
    </style:style>
    <style:style style:name="T14" style:family="text">
      <style:text-properties officeooo:rsid="003732d9"/>
    </style:style>
    <style:style style:name="T15" style:family="text">
      <style:text-properties officeooo:rsid="003783fc"/>
    </style:style>
    <style:style style:name="T16" style:family="text">
      <style:text-properties officeooo:rsid="003a82d1"/>
    </style:style>
    <style:style style:name="T17" style:family="text">
      <style:text-properties officeooo:rsid="003d5d7c"/>
    </style:style>
    <style:style style:name="T18" style:family="text">
      <style:text-properties officeooo:rsid="003e42c0"/>
    </style:style>
    <style:style style:name="T19" style:family="text">
      <style:text-properties fo:color="#1a1a1a" loext:opacity="100%" style:font-name="Georgia" fo:font-size="12pt" style:font-name-asian="Georgia1" style:font-size-asian="12pt" style:font-name-complex="Georgia1" style:font-size-complex="12pt"/>
    </style:style>
    <style:style style:name="T20" style:family="text">
      <style:text-properties fo:color="#1a1a1a" loext:opacity="100%" style:font-name="Georgia" fo:font-size="12pt" fo:font-weight="bold" style:font-name-asian="Georgia1" style:font-size-asian="12pt" style:font-weight-asian="bold" style:font-name-complex="Georgia1" style:font-size-complex="12pt" style:font-weight-complex="bold"/>
    </style:style>
    <style:style style:name="T21" style:family="text">
      <style:text-properties fo:color="#8b7355" loext:opacity="100%" style:font-name="Georgia" fo:font-size="12pt" style:font-name-asian="Georgia1" style:font-size-asian="12pt" style:font-name-complex="Georgia1" style:font-size-complex="12pt"/>
    </style:style>
    <style:style style:name="T22" style:family="text">
      <style:text-properties fo:color="#8b7355" loext:opacity="100%" style:font-name="Georgia" fo:font-size="10pt" fo:font-style="italic" style:font-name-asian="Georgia1" style:font-size-asian="10pt" style:font-style-asian="italic" style:font-name-complex="Georgia1" style:font-size-complex="10pt" style:font-style-complex="italic"/>
    </style:style>
    <style:style style:name="T23" style:family="text">
      <style:text-properties fo:color="#2c2416" loext:opacity="100%" style:font-name="Georgia" fo:font-size="12pt" fo:font-weight="bold" style:font-name-asian="Georgia1" style:font-size-asian="12pt" style:font-weight-asian="bold" style:font-name-complex="Georgia1" style:font-size-complex="12pt" style:font-weight-complex="bold"/>
    </style:style>
    <style:style style:name="T24" style:family="text">
      <style:text-properties fo:color="#2c2416" loext:opacity="100%" style:font-name="Georgia" fo:font-size="12pt" style:font-name-asian="Georgia1" style:font-size-asian="12pt" style:font-name-complex="Georgia1" style:font-size-complex="12pt"/>
    </style:style>
    <style:style style:name="T25" style:family="text">
      <style:text-properties fo:color="#5c4a2a" loext:opacity="100%" style:font-name="Georgia" fo:font-size="11pt" fo:letter-spacing="0.0555in" fo:font-weight="bold" style:font-name-asian="Georgia1" style:font-size-asian="11pt" style:font-weight-asian="bold" style:font-name-complex="Georgia1"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The Resolute Society <text:span text:style-name="T2">Definition</text:span></text:p>
      <text:p text:style-name="P2"><text:span text:style-name="T2">As </text:span>Held In Common By All <text:span text:style-name="T2">Resolute </text:span>Societies</text:p>
      <text:p text:style-name="P6"/>
      <text:p text:style-name="P7"/>
      <text:h text:style-name="P22" text:outline-level="1">Preamble</text:h>
      <text:p text:style-name="P7"/>
      <text:p text:style-name="P5">There are moments in history that test the character of a nation, that demand more than ordinary times prepare <text:span text:style-name="T3">any person</text:span> for. We believe we are living in such a moment. We do not take that lightly. We resolve to meet it together.</text:p>
      <text:p text:style-name="P8">The institutions of American democracy and American society are in deep dysfunction. Some can be reformed and others cannot. The failure of institutions does not mean the failure of the nation. This nation is not its government. It is not its Congress, its courts, or its presidency. This nation is its people. The character and promise of this nation has never lived in its institutions or its political parties. Those things have always lived in the hearts and minds of its people.</text:p>
      <text:p text:style-name="P8">It's with that knowledge and in that spirit that we found <text:span text:style-name="T4">Resolute</text:span> Societies. Not as a political movement, not as an ideology, not as a statement of what we are against. As a commitment to what we are building. A <text:span text:style-name="T4">Resolute</text:span> Society exists wherever people choose agency over powerlessness and solidarity over isolation.</text:p>
      <text:p text:style-name="P8">This <text:span text:style-name="T5">document</text:span> defines a <text:span text:style-name="T5">Resolute</text:span> Society is. It is held in common by all member societies. No single society may change it. It is our shared definition of ourselves.</text:p>
      <text:p text:style-name="P8"/>
      <text:p text:style-name="P11"/>
      <text:p text:style-name="P14">These are the irreducible claims on which everything else rests. They are not proven here — they are asserted. Each one is defensible, but none is derived from anything else in this document. They are the ground, not the conclusion.</text:p>
      <text:p text:style-name="P12"><text:span text:style-name="Strong_20_Emphasis"><text:span text:style-name="T24">I. Reality exists independently of our perceptions and preferences.</text:span></text:span></text:p>
      <text:p text:style-name="Text_20_body"><text:soft-page-break/>The world is what it is regardless of what we wish it to be. It can be known — not perfectly, not finally, but genuinely. Our ability to perceive reality is itself limited — by the boundaries of human sense, by the tools available to us, and by the categories through which we interpret what we observe. The history of human knowledge is in part the history of building instruments that extend perception beyond those natural limits, and each extension has revealed how much the previous picture was missing. We are certainly still missing significant parts of the picture. We are nonetheless obligated to pursue reality honestly, to follow evidence wherever it leads, and to hold our conclusions provisionally — open to revision as perception improves and evidence accumulates. We do not mistake the current limit of our knowledge for the limit of what is real.</text:p>
      <text:p text:style-name="Horizontal_20_Line"/>
      <text:p text:style-name="Text_20_body"><text:span text:style-name="Strong_20_Emphasis">II. Human dignity is equal, sacred, and inviolable.</text:span></text:p>
      <text:p text:style-name="Text_20_body">Every person possesses a worth not contingent on birth, behavior, or belief. What you were born into — your ancestry, your race, your sex, your place — tells us nothing about your worth. Dignity cannot be earned or lost, granted or revoked. That it is violated does not make it less real — violation presupposes it. This is the ground on which everything else stands.</text:p>
      <text:p text:style-name="Horizontal_20_Line"/>
      <text:p text:style-name="Text_20_body"><text:span text:style-name="Strong_20_Emphasis">III. Our moral obligations extend beyond the present.</text:span></text:p>
      <text:p text:style-name="Text_20_body">The future is real. Those who will inhabit it have claims on us now. We do not own the present — we hold it in trust for those who come after.</text:p>
      <text:p text:style-name="Horizontal_20_Line"/>
      <text:p text:style-name="Text_20_body"><text:span text:style-name="Strong_20_Emphasis">IV. Communities make covenants with their members.</text:span></text:p>
      <text:p text:style-name="Text_20_body">Communities make covenants with their members. To ask someone to participate — to work, to contribute, to belong — is to promise that participation will be meaningful. An economy is the primary mechanism through which a community keeps or breaks that promise. When a person can work honestly and still be unable to sustain a life, the covenant has been broken.</text:p>
      <text:p text:style-name="Horizontal_20_Line"/>
      <text:p text:style-name="Text_20_body"><text:span text:style-name="Strong_20_Emphasis">V. Community is constitutive of the person.</text:span></text:p>
      <text:p text:style-name="Text_20_body">We do not arrive in the world as finished individuals who then choose association. We become who we are through relationship, language, place, and <text:soft-page-break/>belonging. Community is not a tool persons use — it is the condition in which persons become possible.</text:p>
      <text:p text:style-name="Horizontal_20_Line"/>
      <text:p text:style-name="Text_20_body"><text:span text:style-name="Strong_20_Emphasis">VI. Legitimacy is distinct from legality and cannot be reduced to it.</text:span></text:p>
      <text:p text:style-name="Text_20_body">Authority is legitimate when it flows from genuine consent, serves those subject to it, and remains accountable to them. Legal correctness guarantees none of this. Law derives its claim on conscience from legitimacy, not the reverse. When that claim is absent, compliance may be compelled but it cannot be owed. We build institutions that earn legitimacy rather than merely assume it.</text:p>
      <text:p text:style-name="Horizontal_20_Line"/>
      <text:p text:style-name="Text_20_body"><text:span text:style-name="Strong_20_Emphasis">VII. Experience shapes persons. It does not determine them.</text:span></text:p>
      <text:p text:style-name="Text_20_body">The conditions in which persons develop — their community, their material circumstances, their early experiences, their exposure to violence or stability, the presence or absence of care — shape who they become in ways that cannot be ignored or wished away. Where a person is born predicts the arc of their life with a precision that should humble anyone who believes outcomes are purely the product of individual choice. At the same time persons are not merely products of their circumstances. Agency is real. People make choices that matter. The capacity for self-determination is itself part of what dignity means. We hold both truths simultaneously — that circumstances shape persons profoundly and that persons remain agents within their circumstances — because the alternative to holding both is either cruelty or condescension.</text:p>
      <text:p text:style-name="Horizontal_20_Line"/>
      <text:p text:style-name="Text_20_body"><text:span text:style-name="Strong_20_Emphasis">VIII. Power tends to corrupt and always tends to concentrate.</text:span></text:p>
      <text:p text:style-name="Text_20_body">This is not cynicism — it is the most consistently documented pattern in human history. Those who hold power tend to use it in ways that serve themselves. Institutions left unchecked tend toward self-service. Concentrated power tends toward more concentrated power regardless of the intentions of those who hold it. The incentive structures that power creates are more powerful than individual virtue. No founding intention however pure protects an institution from these tendencies. Only structure does. We build our institutions with this knowledge at their foundation — not in despair but in clear-eyed determination to resist what power naturally does. Eternal vigilance is not a slogan. It is a structural requirement.</text:p>
      <text:p text:style-name="Horizontal_20_Line"><text:soft-page-break/></text:p>
      <text:p text:style-name="Text_20_body"><text:span text:style-name="Strong_20_Emphasis">IX. Persons are not identical to their worst moments.</text:span></text:p>
      <text:p text:style-name="Text_20_body">Persons are not identical to their worst moments. Accountability is real — harm done requires acknowledgment, repair where possible, and demonstrated change over time. But accountability is not permanent definition. The capacity for genuine transformation is part of what dignity means. Communities that cannot metabolize failure and extend renewal to those who have earned it will calcify. We are not in the business of permanent judgment. We are in the business of building people and communities capable of genuine change.</text:p>
      <text:p text:style-name="Horizontal_20_Line"/>
      <text:p text:style-name="Text_20_body"><text:span text:style-name="Strong_20_Emphasis">X. We live in a world of real limits. Pretending otherwise has consequences.</text:span></text:p>
      <text:p text:style-name="Text_20_body">The planet has a carrying capacity. Human attention has boundaries. Communities have a scale beyond which genuine belonging becomes impossible. Power unchecked reaches limits in collapse and tyranny. The body has needs that cannot be indefinitely deferred. These are not preferences or political positions — they are features of reality that exist whether we acknowledge them or not. The modern era has been defined by the systematic pretense that limits can be overcome, deferred, or ignored. The consequences of that pretense are now arriving simultaneously across every domain of human life. We do not treat limits as failures or constraints on freedom. We treat them as the architecture of a livable human life — the conditions within which genuine flourishing becomes possible. We build accordingly.</text:p>
      <text:p text:style-name="Text_20_body"><text:span text:style-name="T23"/></text:p>
      <text:p text:style-name="P21">----------------------------------------------------------------------------------------------------</text:p>
      <text:h text:style-name="P23" text:outline-level="2"><text:span text:style-name="T23"/></text:h>
      <text:p text:style-name="P20"><text:span text:style-name="Strong_20_Emphasis">A principle is a standing obligation derived from the axioms that constrains all governance without specifying it.</text:span></text:p>
      <text:p text:style-name="P13"><text:span text:style-name="T23"/></text:p>
      <text:p text:style-name="P15"><text:span text:style-name="T21">1. </text:span><text:span text:style-name="T23">Fidelity to Evidence</text:span></text:p>
      <text:p text:style-name="P16"><text:soft-page-break/><text:span text:style-name="T19">We follow evidence wherever it leads, regardless of whether the conclusion is comfortable and regardless of which interest it serves or undermines. We build community life that supports rather than corrupts this capacity. The evidence leads and we follow — not the reverse. Motivated reasoning, however sincere, is a failure of this commitment.</text:span></text:p>
      <text:p text:style-name="P25">Derived from Axiom I.</text:p>
      <text:p text:style-name="P15"><text:span text:style-name="T21">2. </text:span><text:span text:style-name="T23">Humility and Self-Correction</text:span></text:p>
      <text:p text:style-name="P26">We acknowledge that we may be wrong — individually and as an institution. We hold our beliefs provisionally and build structures that make correction possible: a culture where being wrong is not stigmatized, mechanisms that surface error rather than conceal it, and protection for those who identify failure. The greatest institutional failure is not error itself but the refusal to correct it.</text:p>
      <text:p text:style-name="P25">Derived from Axioms I and IX.</text:p>
      <text:p text:style-name="P15"><text:span text:style-name="T21">3. </text:span><text:span text:style-name="T23">Deliberation</text:span></text:p>
      <text:p text:style-name="P26">We hold that genuine disagreement is not a failure of consensus but the mechanism through which we approach truth together. Dissent is not a problem to be managed but a resource to be protected. We build community life in which members can disagree honestly without social or political cost — where the person who sees differently is heard before they are outvoted, and where persistent disagreement is treated as information rather than obstruction. We distinguish between deliberation and decision: during deliberation all views are in play and contrary voices are actively sought; after decision we act together while preserving the right to return. We protect dissent because we know we may be wrong — and the person who tells us so may be the most valuable member in the room.</text:p>
      <text:p text:style-name="P25">Derived from Axiom I.</text:p>
      <text:p text:style-name="P18"><text:soft-page-break/></text:p>
      <text:p text:style-name="P27">THE PERSON</text:p>
      <text:p text:style-name="P15"><text:span text:style-name="T21">4. </text:span><text:span text:style-name="T23">Sovereignty of the Person</text:span></text:p>
      <text:p text:style-name="P26">Every person has the right to be the genuine author of their own beliefs, decisions, and life. We hold as illegitimate any system — corporate, political, or social — that colonizes the interior life, engineers dependence, or substitutes another's will for one's own without knowledge or consent. We build community life that protects and restores this capacity in our members. The manipulation of persons for profit, power, or ideology is not merely harmful — it is a violation of what persons are.</text:p>
      <text:p text:style-name="P25">Derived from Axioms I and II.</text:p>
      <text:p text:style-name="P15"><text:span text:style-name="T21">5. </text:span><text:span text:style-name="T23">Equal Standing</text:span></text:p>
      <text:p text:style-name="P26">Every member participates with genuinely equal standing regardless of wealth, social capital, fluency with institutional language, or any other attribute that produces inequality of voice in ordinary life. We do not merely remove formal barriers to participation — we actively build the conditions in which the quietest and most marginal member can be heard as fully as the most articulate and connected. Formal equality that produces substantive inequality is insufficient.</text:p>
      <text:p text:style-name="P25">Derived from Axiom II.</text:p>
      <text:p text:style-name="P15"><text:span text:style-name="T21">6. </text:span><text:span text:style-name="T23">Epistemic Humility in Judgment</text:span></text:p>
      <text:p text:style-name="P16"><text:span text:style-name="T19">When a decision is morally grave, irreducibly particular, and the relevant facts are only accessible through genuine proximity to the </text:span><text:soft-page-break/><text:span text:style-name="T19">situation — the legitimacy of external judgment diminishes to the point of disappearance. Those closest to the facts, with genuine stakes in the outcome, are in the only position from which the decision can be made with any legitimacy. We build the conditions in which such decisions can be made with wisdom and care. We do not judge from outside what cannot be judged from outside.</text:span></text:p>
      <text:p text:style-name="P25">Derived from Axioms I, II, and VII, and Principle 18.</text:p>
      <text:p text:style-name="P18"/>
      <text:p text:style-name="P27">DIGNITY AND JUSTICE</text:p>
      <text:p text:style-name="P15"><text:span text:style-name="T21">7. </text:span><text:span text:style-name="T23">Subsistence</text:span></text:p>
      <text:p text:style-name="P26">Human dignity cannot exist in the absence of food, shelter, healthcare, and safety. We accept collective responsibility for ensuring every member has these essentials. This is mutual obligation, not charity — we guarantee to each other what dignity requires. The material floor is not conditional on merit, productivity, or compliance. It is what dignity demands.</text:p>
      <text:p text:style-name="P25">Derived from Axiom II.</text:p>
      <text:p text:style-name="P15"><text:span text:style-name="T21">8. </text:span><text:span text:style-name="T23">Non-Domination</text:span></text:p>
      <text:p text:style-name="P26">We reject domination. We hold as illegitimate the use of force, coercion, or control of resources to subordinate another person or to claim authority not freely granted. This applies to the state, to markets, to institutions, and to members in their relations with each other. Authority within this society flows from consent and is always recallable.</text:p>
      <text:p text:style-name="P17"><text:soft-page-break/><text:span text:style-name="T22">Derived from Axioms II and VII.</text:span></text:p>
      <text:p text:style-name="P15"><text:span text:style-name="T21">9. </text:span><text:span text:style-name="T23">Restorative Justice</text:span></text:p>
      <text:p text:style-name="P26">When harm is done within this community we ask not what punishment is deserved but what repair is possible. Our first obligation is to those who have been harmed — their safety, their healing, their needs define the response. Where the person who caused harm accepts genuine accountability, we work toward restoration: of the relationship, of the community, and where possible of the person themselves. We recognize that permanent exclusion from community is itself a serious harm, to be chosen only when the safety of members requires it and never as mere punishment. The dignity of every person — including those who have caused harm — remains inviolable throughout. We understand that genuine accountability is more demanding than punishment, and we do not mistake the absence of suffering for the absence of consequence.</text:p>
      <text:p text:style-name="P25">Derived from Axioms II, VI, and VIII.</text:p>
      <text:p text:style-name="P15"><text:span text:style-name="T21">10. </text:span><text:span text:style-name="T23">Cultivation</text:span></text:p>
      <text:p text:style-name="P16"><text:span text:style-name="T19">We accept responsibility for the knowledge, skill, and judgment of our members — not as a service we provide but as an obligation we share. We hold that every person deserves access to the full breadth of human knowledge and capability, and that genuine education is a condition of dignity, not a commodity. We build systems of formation — colleges, apprenticeships, curricula — through which knowledge, skill, and wisdom pass from one generation to the next through human relationship rather than mere instruction. We cultivate not just competence but judgment: the capacity to think clearly, act wisely, and transmit what we know to those who come after us. Human capacities are not permanent possessions. They are achievements that require ongoing practice and active transmission to survive. What communities do not practice they forget. What they forget they lose — sometimes </text:span><text:soft-page-break/><text:span text:style-name="T19">permanently. The knowledge of how to grow food, how to heal, how to govern ourselves, how to resolve conflict, how to build — these live in practice or they do not live at all. We build systems of formation not because education is valuable in the abstract but because the alternative is the loss of what we cannot afford to lose.</text:span></text:p>
      <text:p text:style-name="P25">Derived from Axioms II and VIII.</text:p>
      <text:p text:style-name="P18"/>
      <text:p text:style-name="P27">ECONOMY</text:p>
      <text:p text:style-name="P15"><text:span text:style-name="T21">11. </text:span><text:span text:style-name="T23">Sufficiency</text:span></text:p>
      <text:p text:style-name="P26">We recognize that accumulation beyond enough ceases to produce flourishing and begins to harm — the person accumulating, the community around them, and the living world that sustains both. We build our economic life around sufficiency rather than growth, and we resist the conversion of the organization itself into a vehicle for accumulation.</text:p>
      <text:p text:style-name="P25">Derived from Axioms V and X.</text:p>
      <text:p text:style-name="P15"><text:span text:style-name="T21">12. </text:span><text:span text:style-name="T23">Separation of Wealth from Power</text:span></text:p>
      <text:p text:style-name="P26">Material resources cannot purchase governance power, social standing, or disproportionate influence within this community. We hold that the corruption of democratic life by concentrated wealth is one of the defining failures of the existing order, and we build structural separation between what a member owns and what a member can decide.</text:p>
      <text:p text:style-name="P25">Derived from Axioms V, VII, and IX.</text:p>
      <text:p text:style-name="P15"><text:soft-page-break/><text:span text:style-name="T21">13. </text:span><text:span text:style-name="T23">Flourishing as the Measure</text:span></text:p>
      <text:p text:style-name="P26">We measure the success of this organization by whether its members are actually flourishing — living meaningfully, working purposefully, relating genuinely, and connected to something larger than themselves. We do not measure success by growth, revenue, membership numbers, political influence, or any other proxy that mistakes the means for the end.</text:p>
      <text:p text:style-name="P25">Derived from Axiom V.</text:p>
      <text:p text:style-name="P18"/>
      <text:p text:style-name="P27">COMMUNITY</text:p>
      <text:p text:style-name="P15"><text:span text:style-name="T21">14. </text:span><text:span text:style-name="T23">Community</text:span></text:p>
      <text:p text:style-name="P26">We accept primary responsibility for building and maintaining the conditions in which genuine community becomes possible — not as a feature we offer but as the central obligation of this organization, because community is the condition in which persons flourish and become more fully themselves. We actively resist the forces of atomization that have destroyed the connective tissue of American life. We build rhythms of presence, shared work, and shared ceremony that make members genuinely known to one another over time. We understand that genuine community requires intention, structure, and ongoing care — that it does not arise spontaneously and cannot be sustained passively. To be a member of this society is to accept responsibility not just for your own participation but for the communal life that makes participation meaningful.</text:p>
      <text:p text:style-name="P25">Derived from Axioms VI and VIII.</text:p>
      <text:p text:style-name="P18"><text:soft-page-break/></text:p>
      <text:p text:style-name="P27">ECOLOGY AND TIME</text:p>
      <text:p text:style-name="P15"><text:span text:style-name="T21">15. </text:span><text:span text:style-name="T23">Ecological Stewardship</text:span></text:p>
      <text:p text:style-name="P26">We are not separate from the natural world — we are part of it. The land, water, and living systems that sustain us are not resources we manage but a community we belong to. We treat what we share with the living world as held in trust for those who come after us — human and non-human alike. We reject degradation we cannot restore and consumption that leaves depletion. Future generations have the same right to a living world that we inherited, and we accept responsibility for passing it forward intact.</text:p>
      <text:p text:style-name="P25">Derived from Axioms III, IV, and X.</text:p>
      <text:p text:style-name="P15"><text:span text:style-name="T21">16. </text:span><text:span text:style-name="T23">Institutional Stewardship</text:span></text:p>
      <text:p text:style-name="P26">We build not for ourselves alone but for those who come after us. The institutions, culture, and governance of this society are held in trust for future members not yet present — just as we received what we have from those who came before. We accept responsibility for building institutions that are designed to be inherited: legible to future members, adaptable to future conditions, and faithful to the foundations without being captured by the preferences of any founding generation. We resist decisions that serve present members at the expense of future ones. The measure of what we build is not whether it serves us well but whether it serves those who will carry it forward.</text:p>
      <text:p text:style-name="P25">Derived from Axioms III and IX.</text:p>
      <text:p text:style-name="P18"/>
      <text:p text:style-name="P19"><text:soft-page-break/><text:span text:style-name="T25">GOVERNANCE</text:span></text:p>
      <text:p text:style-name="P15"><text:span text:style-name="T21">17. </text:span><text:span text:style-name="T23">Consent and Accountability</text:span></text:p>
      <text:p text:style-name="P26">Authority within this organization requires genuine ongoing consent and remains utterly answerable to the members subject to it. Consent must be informed, genuine, and always revocable — members must retain the genuine ability to withdraw consent, dissent, and recall authority without prohibitive cost. Accountability is the mechanism by which consent remains real rather than nominal. An organization whose members cannot effectively hold it accountable has already begun losing its legitimacy.</text:p>
      <text:p text:style-name="P25">Derived from Axioms VII and IX.</text:p>
      <text:p text:style-name="P15"><text:span text:style-name="T21">18. </text:span><text:span text:style-name="T23">Participation and Subsidiarity</text:span></text:p>
      <text:p text:style-name="P26">Members have a genuine role in shaping the decisions that affect them — not merely the right to ratify decisions made elsewhere. Decisions belong as close as possible to the people and places most affected by them. This is especially true of morally grave decisions — those touching life, dignity, land, and belonging. Distance from consequence corrupts judgment. Larger bodies exist to support what smaller ones cannot do alone, not to absorb what they can.</text:p>
      <text:p text:style-name="P25">Derived from Axioms VII and IX.</text:p>
      <text:p text:style-name="P15"><text:span text:style-name="T21">19. </text:span><text:span text:style-name="T23">Transparency</text:span></text:p>
      <text:p text:style-name="P16"><text:span text:style-name="T20">Institutions must be comprehensible to the people subject to them. Information about decisions, resources, and operations is held in common. Complexity shall not be used as a barrier to participation or a shield for power. You cannot genuinely consent to what you cannot understand — opacity is therefore a form of </text:span><text:soft-page-break/><text:span text:style-name="T20">illegitimacy. All people have the right to understand what governs them.</text:span></text:p>
      <text:p text:style-name="P16"><text:span text:style-name="T20"/></text:p>
      <text:p text:style-name="Text_20_body"><text:span text:style-name="Strong_20_Emphasis"><text:span text:style-name="T19">Principle 20: Precaution</text:span></text:span></text:p>
      <text:p text:style-name="Text_20_body"><text:span text:style-name="Emphasis">Where evidence is insufficient to reliably predict the consequences of an action, and where those consequences may be irreversible or significantly harmful, a Resolute Society defaults to the position that preserves the most options and causes the least irreversible harm. Uncertainty is not a reason for paralysis — it is a reason for humility about the pace and scale of action. The burden of proof falls on irreversibility, not on caution. What cannot be undone demands a higher threshold of certainty before it is done.</text:span></text:p>
      <text:p text:style-name="Text_20_body"><text:span text:style-name="Emphasis">Derived from Axioms I, X, and Principle 2.</text:span><text:span text:style-name="T20"/></text:p>
      <text:p text:style-name="P7"/>
      <text:h text:style-name="P22" text:outline-level="1">Foundational Principles</text:h>
      <text:p text:style-name="P7"/>
      <text:p text:style-name="P5">These principles define what a <text:span text:style-name="T6">Resolute</text:span> Society is. They are not aspirations or political positions - they are requirements. A society that abandons these principles has ceased to be a <text:span text:style-name="T6">Resolute</text:span> Society.</text:p>
      <text:p text:style-name="P7"/>
      <text:h text:style-name="P24" text:outline-level="2">I. Human Dignity</text:h>
      <text:p text:style-name="P5">We hold that human dignity is equal, sacred, and inviolable. It cannot be earned or lost, granted or revoked. You have it because you are human: wherever you were born, whatever you have done, whoever you are. This is foundational.</text:p>
      <text:p text:style-name="P7"/>
      <text:h text:style-name="P24" text:outline-level="2">II. Self-Governance</text:h>
      <text:p text:style-name="P5">We hold the human right to democracy to be inviolable. No authority is legitimate that does not flow from the genuine, informed consent of the people subject to it. Anyone who seeks governance authority for personal gain, status, or power is utterly and completely unfit to hold it</text:p>
      <text:p text:style-name="P7"/>
      <text:h text:style-name="P24" text:outline-level="2">III. Honest Inquiry</text:h>
      <text:p text:style-name="P5">We commit to honest inquiry. The world is what it is regardless of what we wish it to be. We follow evidence wherever it leads, acknowledging that we may be <text:soft-page-break/>wrong and that truth emerges through <text:span text:style-name="T18">honest inquiry, evidence, and reasoning</text:span>. We cultivate both intellectual humility and the courage to act on what we know.</text:p>
      <text:p text:style-name="P7"/>
      <text:h text:style-name="P24" text:outline-level="2">IV. Mutual Obligation</text:h>
      <text:p text:style-name="P5">Human dignity cannot exist in the absence of food, shelter, healthcare, and safety. We accept collective responsibility for ensuring every member has these essentials. This is mutual obligation, not charity - we guarantee to each other what dignity requires.</text:p>
      <text:p text:style-name="P7"/>
      <text:h text:style-name="P24" text:outline-level="2">V. Stewardship</text:h>
      <text:p text:style-name="P5">We are stewards of the natural world. We treat land, water, and living systems as held in trust for those who come after us. We reject degradation we cannot restore and consumption that leaves depletion. Future generations have the same right to a living world that we inherited.</text:p>
      <text:p text:style-name="P7"/>
      <text:h text:style-name="P24" text:outline-level="2">VI. Clarity</text:h>
      <text:p text:style-name="P5">We protect our capacity to think and decide for ourselves. We reject systems designed to manipulate perception, exploit attention, or engineer dependence. We build community life that supports independent thought and genuine connection rather than capturing and commodifying them.</text:p>
      <text:p text:style-name="P7"/>
      <text:h text:style-name="P24" text:outline-level="2">VII. <text:span text:style-name="T17">Subsidiarity</text:span></text:h>
      <text:p text:style-name="P5">Decisions belong to those who must live with them. We hold that authority over any matter should rest as close as possible to the people and places most affected by it. This is especially true of morally grave decisions — those touching life, dignity, land, and belonging. Distance from consequence corrupts judgment. We resist the upward drift of authority that separates decision from witness. Larger bodies exist to support what smaller ones cannot do alone, not to absorb what they can.</text:p>
      <text:p text:style-name="P7"/>
      <text:h text:style-name="P24" text:outline-level="2">VIII. Moral Economy</text:h>
      <text:p text:style-name="P5">Human worth is measured by character and contribution, not by wealth or possessions. We reject the subordination of dignity and community to financial gain. Money is a tool in service of human flourishing, not its measure.</text:p>
      <text:p text:style-name="P7"/>
      <text:h text:style-name="P24" text:outline-level="2"><text:soft-page-break/>IX. Non-Domination</text:h>
      <text:p text:style-name="P5">We reject domination. We hold as illegitimate the use <text:span text:style-name="T7">of</text:span> force, coercion, or control of resources to subordinate another person or to claim authority not freely granted. Authority within this society flows from consent and is always recallable.</text:p>
      <text:p text:style-name="P7"/>
      <text:h text:style-name="P24" text:outline-level="2">X. Transparency</text:h>
      <text:p text:style-name="P5">We reject opacity. Institutions must be comprehensible to the people subject to them. Information about decisions, resources, and operations is held in common. Complexity shall not be used as a barrier to participation or a shield for power. All people have the right to understand what governs them.</text:p>
      <text:p text:style-name="P7"/>
      <text:h text:style-name="P22" text:outline-level="1">What Every <text:span text:style-name="T8">Resolute</text:span> Society <text:span text:style-name="T8">Requires</text:span></text:h>
      <text:p text:style-name="P7"/>
      <text:p text:style-name="P5">A <text:span text:style-name="T9">Resolute</text:span> Society is not merely a community that holds the founding principles. It is a community that has built the institutions those principles require. The following are the institutional minimums: what a community must have and maintain to call itself a Ben Franklin Society. These are not aspirations. They are requirements.</text:p>
      <text:p text:style-name="P7"/>
      <text:h text:style-name="P24" text:outline-level="2">1. Community Authority</text:h>
      <text:p text:style-name="P5">All authority originates with and belongs to the community in its entirety. A <text:span text:style-name="T10">Resolute</text:span> Society must maintain this principle in its institutional design: not as a statement of belief but as an operational reality. Authority is delegated downward for practical purposes and is always recallable upward. The community has final say over all institutions, bodies, and decisions within the Society.</text:p>
      <text:p text:style-name="P8"/>
      <text:h text:style-name="P24" text:outline-level="2">2. General Assembly</text:h>
      <text:p text:style-name="P5">A <text:span text:style-name="T11">Resolute</text:span> Society must maintain a General Assembly drawn by sortition from the full adult membership. The General Assembly is the primary decision-making body of the <text:span text:style-name="T12">s</text:span>ociety, acting by delegation from the community. It must be genuinely sortition-drawn: no elections, no appointments, no hereditary positions. The randomness of selection is not a procedural detail. It is the mechanism by which the General Assembly remains the community's body rather than any faction's instrument.</text:p>
      <text:p text:style-name="P7"/>
      <text:h text:style-name="P24" text:outline-level="2"><text:soft-page-break/>3. The <text:span text:style-name="T13">Society Ledger</text:span></text:h>
      <text:p text:style-name="First_20_Paragraph">A <text:span text:style-name="T14">Resolute</text:span> Society must establish and maintain <text:span text:style-name="T14">a</text:span> Society Ledger as the authoritative record of mutual obligation among its members. The Ledger is not a financial instrument. It is the community's memory — a living record of what members have carried on one another's behalf, and what the community has yet to return.</text:p>
      <text:p text:style-name="Standard">The <text:span text:style-name="T15">society credit</text:span> is the unit by which the Ledger measures obligation. It is issued on the basis of the person-year, equal for every member, because the community holds that a person's capacity to contribute is the only legitimate basis for economic standing. The <text:span text:style-name="T15">society credit</text:span> does not represent stored value. It represents the community's acknowledgment that something is owed.</text:p>
      <text:p text:style-name="Standard">When a member carries a role, tends a neighbor, grows food for the common table, or teaches a skill the community needs, the Ledger records that the community owes them something in return. When a member draws on what others have provided, the Ledger records that they now carry an obligation back. No transaction has occurred. No commerce has taken place. The community has simply remembered what it owes and what it is owed.</text:p>
      <text:p text:style-name="Standard"><text:span text:style-name="T15">A Resolute</text:span> Society maintains the Ledger. It does not underwrite it. The obligation recorded there runs between members and the community as a whole — not between members and the institution. If the Society were ever dissolved, the obligations would remain. They belong to the people, not to the organization that witnessed them.</text:p>
      <text:p text:style-name="P7"/>
      <text:h text:style-name="P24" text:outline-level="2">5. The Colleges</text:h>
      <text:p text:style-name="P5">A <text:span text:style-name="T16">Resolute</text:span> Society must maintain the Colleges framework: the system of peer bodies through which the community acknowledges domain expertise and draws qualified practitioners for governance in specialized domains. The specific Colleges a society maintains will vary with its size, population, and development. The framework itself (peer credentialing, qualified sortition, General Assembly creation and accountability) must be maintained. A <text:span text:style-name="T16">Resolute</text:span> Society governs itself through qualified democracy, not through either unqualified populism or expert technocracy.</text:p>
      <text:p text:style-name="P7"/>
      <text:h text:style-name="P24" text:outline-level="2">6. Material Security</text:h>
      <text:p text:style-name="P9">A <text:span text:style-name="T16">Resolute</text:span> Society must guarantee every member adequate food, healthcare, and shelter. No member shall go without these essentials through failure of the community to act. The Society must maintain health services at whatever level of capacity it can sustain, working continuously to expand that capacity. It must maintain food security through food services, reserves, and agricultural capacity development. It must ensure adequate shelter through housing services, emergency shelter, and maintenance support. The Society plans explicitly for <text:soft-page-break/>circumstances in which conventional resources are scarce or absent. Resilience is built in, not assumed. The specific institutions may vary. The obligations do not.</text:p>
      <text:p text:style-name="P7"/>
      <text:h text:style-name="P24" text:outline-level="2"><text:span text:style-name="T1">7. </text:span>Human Dignity in Practice</text:h>
      <text:p text:style-name="P10">A <text:span text:style-name="T16">Resolute</text:span> Society must maintain institutional protections for human dignity that give Principle I operational force. No member shall be removed from membership, deprived of their rights, or subjected to institutional action without due process. No institution of the Society shall treat any member as less than fully human. The unconditional dignity of Principle I is not merely a statement of belief. It is a constitutional constraint on every institution the Society maintains.</text:p>
      <text:p text:style-name="P7"/>
      <text:h text:style-name="P24" text:outline-level="2">8. Non-Partisan Infrastructure</text:h>
      <text:p text:style-name="P10">A <text:span text:style-name="T16">Resolute</text:span> Society exists to serve all people in its community who accept its founding principles. It is infrastructure, not ideology. The Society may not be captured by any political party, factional interest, or ideological project. It does not exist to advance any agenda beyond its Charter obligations. Services, governance, and membership are not conditional on political alignment or ideological conformity. The Society protects its role as community infrastructure available to all who commit to its principles.</text:p>
      <text:p text:style-name="P7"/>
      <text:h text:style-name="P24" text:outline-level="2">9. Fair Dealing with Neighboring Societies</text:h>
      <text:p text:style-name="P10">A <text:span text:style-name="T16">Resolute </text:span>Society must deal fairly with other member societies. The economic sovereignty guaranteed to members within a society extends, in principle, to the relations between societies. A Ben Franklin Society may not use control of essential resources (water, land access, transport routes, food supply, or infrastructure) to coerce, extract from, or systematically disadvantage another society. Trade and mutual aid between societies must be conducted in good faith. A society that leverages necessity into exploitation has violated the same principle it claims to uphold for its own members. Complaints of inter-society exploitation are subject to Federation mediation and may constitute grounds for compliance review.</text:p>
      <text:p text:style-name="P7"/>
      <text:h text:style-name="P24" text:outline-level="2">10. Annual Review of Founding Purpose</text:h>
      <text:p text:style-name="P5">A Ben Franklin Society must convene an annual meeting dedicated to honest examination of whether the Society remains true to its founding purpose and principles. This is not a celebratory formality. It is a deliberate moment of institutional self-scrutiny. The meeting must engage these questions directly: Are we still serving the purpose we were founded to serve? Have our founding <text:soft-page-break/>assumptions proven sound or do they require revision? Are our institutions achieving what they were designed to achieve? Where have we failed, and what must change? This annual review is not optional. It is the mechanism by which the Society maintains the honest inquiry required by Principle III and prevents institutional drift from charter obligations. The review findings must be made available to all members and must inform the General Assembly's legislative priorities for the following year.</text:p>
      <text:p text:style-name="P7"/>
      <text:h text:style-name="P24" text:outline-level="2">11. Religious Liberty and Neutrality</text:h>
      <text:p text:style-name="P5">A Ben Franklin Society respects the religious conscience of every member and maintains strict neutrality in matters of faith. No member shall be required to profess, practice, or renounce any religious belief as a condition of membership, service, or governance. No religious test shall be applied to any position within the Society. The Society does not establish, endorse, or favor any religion or religious practice. It does not establish, endorse, or favor irreligion or opposition to religion. Members are free to hold and practice any faith or none. The Society's institutions, Services, and governance remain neutral ground where people of all faiths and none can work together toward common purposes.</text:p>
      <text:p text:style-name="P7"/>
      <text:h text:style-name="P24" text:outline-level="2">12. Voluntary Association and Free Exit</text:h>
      <text:p text:style-name="P5">Membership in a Ben Franklin Society is entirely voluntary. No person may be compelled to join or remain a member. Members are free to leave at any time without penalty. A departing member may not be deprived of resources, compensation, or property to which they have a rightful claim. The Society may not use control of essential resources (healthcare access, housing, food security, or financial assets) to coerce retention of membership. A person who leaves in good standing retains any debts owed to them and may not be subjected to retaliation, blacklisting, or institutional punishment for their departure. The Society exists through the free choice of its members, not through dependence or coercion.</text:p>
      <text:p text:style-name="P7"/>
      <text:h text:style-name="P24" text:outline-level="2">13. Aid Beyond Membership</text:h>
      <text:p text:style-name="P5">The moral obligations of a Ben Franklin Society extend beyond its membership. Where there is need outside the membership that the Society can reasonably address, the Society is obligated to provide aid. The Society does not exist to create exclusive security for members alone. It exists to demonstrate that communities can meet human needs through solidarity. A society that refuses to extend aid to those in need when it reasonably can do so violates the spirit of Principle IV (Mutual Obligation) and Principle I (Human Dignity). The Society balances its obligations to members with its moral duty to help others, but it <text:soft-page-break/>does not hoard resources or close ranks when faced with need it has capacity to address.</text:p>
      <text:p text:style-name="P7"/>
      <text:h text:style-name="P24" text:outline-level="2">14. Membership and Belonging</text:h>
      <text:p text:style-name="P5">Membership in a Ben Franklin Society is open to all people within the community who are willing to commit to its founding principles and contribute to its common life. A society may not impose barriers to membership beyond acceptance of the Charter principles and willingness to participate in the Society's mutual obligations. Membership cannot be conditional on wealth, social status, employment, education, or any other criterion that would create a privileged class. To become a provisional member, a person must be vouched for by three current members in good standing. After a minimum period defined by the Society's constitution, a provisional member may take the membership oath before witnesses to become a full member with all rights of participation, including eligibility for sortition. The Society defines its own membership age and residency requirements, but these must be applied uniformly. Membership can only be revoked through due process for violations of fundamental Charter principles or constitutional obligations. No member may be expelled for political views, religious belief, or personal disagreement so long as they uphold the Charter's principles in practice.</text:p>
      <text:p text:style-name="P6"/>
      <text:h text:style-name="P22" text:outline-level="1">Part Three: The Nature of This Charter</text:h>
      <text:p text:style-name="P7"/>
      <text:p text:style-name="P5">This Charter defines what a Ben Franklin Society is. It is held in common by all member societies. No single society may change it. It is our shared definition of ourselves.</text:p>
      <text:p text:style-name="P7"/>
      <text:h text:style-name="P24" text:outline-level="2">Held in Common</text:h>
      <text:p text:style-name="P5">This Charter is held collectively by all Ben Franklin Societies. It is not the property of any single society, any founding body, or any individual. It belongs to the network of communities that have adopted it and committed to living by it. No single society may amend it. Changes to the Charter require the deliberate consensus of the societies that hold it.</text:p>
      <text:p text:style-name="P7"/>
      <text:h text:style-name="P24" text:outline-level="2">A Definition, Not a Constitution</text:h>
      <text:p text:style-name="P5">This Charter defines what a Ben Franklin Society is. It does not govern how any particular society governs itself. Each society maintains its own constitution: its own foundational document establishing the specific institutions, processes, and <text:soft-page-break/>commitments by which it lives the Charter's principles and maintains the Charter's institutional minimums. A society's constitution may go further than this Charter requires. It may not fall short of it.</text:p>
      <text:p text:style-name="P8"/>
      <text:h text:style-name="P24" text:outline-level="2">A Living Standard</text:h>
      <text:p text:style-name="P5">The Charter is a living standard — a definition that communities are measured against, not just at founding but continuously. A Ben Franklin Society that abandons its General Assembly, that surrenders its Frank, that allows its members to go without food or shelter or care, has ceased to be a Ben Franklin Society in any meaningful sense. The Charter names what we are. Living up to it is the ongoing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indent="0.2in" style:auto-text-indent="false"/>
      <style:text-properties style:font-name="Libre Baskerville" fo:font-family="'Libre Baskervill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IM FELL English SC1" fo:font-family="'IM FELL English SC'" style:font-style-name="Bold"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IM FELL English SC1" fo:font-family="'IM FELL English SC'" style:font-style-name="Bold" style:font-pitch="variable" fo:font-size="11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1799in" style:contextual-spacing="false" fo:text-align="center" style:justify-single-word="false"/>
      <style:text-properties style:font-name="IM FELL English SC2" fo:font-family="'IM FELL English SC'" style:font-style-name="Regular"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IM FELL English SC2" fo:font-family="'IM FELL English SC'" style:font-style-name="Regular" style:font-pitch="variable" fo:font-size="13pt" style:font-size-asian="18pt" style:font-size-complex="18pt"/>
    </style:style>
    <style:style style:name="First_20_Paragraph" style:display-name="First Paragraph" style:family="paragraph" style:parent-style-name="Standard" style:master-page-name="">
      <style:paragraph-properties fo:text-indent="0in" style:auto-text-indent="false" style:page-number="auto"/>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Resolute Societies of Americ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3:48:24.763225727</meta:creation-date>
    <dc:date>2026-06-16T18:26:16.537566196</dc:date>
    <meta:editing-duration>PT20H56M36S</meta:editing-duration>
    <meta:editing-cycles>31</meta:editing-cycles>
    <meta:generator>LibreOffice/24.2.7.2$Linux_X86_64 LibreOffice_project/420$Build-2</meta:generator>
    <meta:document-statistic meta:table-count="0" meta:image-count="0" meta:object-count="0" meta:page-count="20" meta:paragraph-count="157" meta:word-count="5423" meta:character-count="34416" meta:non-whitespace-character-count="29096"/>
  </office:meta>
</office:document-meta>
</file>