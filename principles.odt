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paragraph-properties fo:orphans="1"/>
    </style:style>
    <style:style style:name="P2" style:family="paragraph" style:parent-style-name="Text_20_body">
      <style:paragraph-properties fo:orphan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Claude responded: PRINCIPLES</text:h>
      <text:p text:style-name="P2"><text:span text:style-name="Strong_20_Emphasis">PRINCIPLES</text:span></text:p>
      <text:p text:style-name="P1"/>
      <text:p text:style-name="P2"><text:span text:style-name="Strong_20_Emphasis">Reality</text:span></text:p>
      <text:p text:style-name="P2"><text:span text:style-name="Strong_20_Emphasis">1. Fidelity to Evidence</text:span></text:p>
      <text:p text:style-name="P2">We follow evidence wherever it leads, regardless of whether the conclusion is comfortable and regardless of which interest it serves or undermines. We build community life that supports rather than corrupts this capacity. The evidence leads and we follow — not the reverse. Motivated reasoning, however sincere, is a failure of this commitment.</text:p>
      <text:p text:style-name="P2"><text:span text:style-name="Emphasis">Derived from Axiom I.</text:span></text:p>
      <text:p text:style-name="P1"/>
      <text:p text:style-name="P2"><text:span text:style-name="Strong_20_Emphasis">2. Humility and Self-Correction</text:span></text:p>
      <text:p text:style-name="P2">We acknowledge that we may be wrong — individually and as an institution. We hold our beliefs provisionally and build structures that make correction possible: a culture where being wrong is not stigmatized, mechanisms that surface error rather than conceal it, and protection for those who identify failure. The greatest institutional failure is not error itself but the refusal to correct it.</text:p>
      <text:p text:style-name="P2"><text:span text:style-name="Emphasis">Derived from Axioms I and XI.</text:span></text:p>
      <text:p text:style-name="P1"/>
      <text:p text:style-name="P2"><text:span text:style-name="Strong_20_Emphasis">3. Deliberation</text:span></text:p>
      <text:p text:style-name="P2">We hold that genuine disagreement is not a failure of consensus but the mechanism through which we approach truth together. Dissent is not a problem to be managed but a resource to be protected. We build community life in which members can disagree honestly without social or political cost — where the person who sees differently is heard before they are outvoted, and where persistent disagreement is treated as information rather than obstruction. We distinguish between deliberation and decision: during deliberation all views are in play and contrary voices are actively sought; after decision we act together while preserving the right to return. We protect dissent because we know we may be wrong — and the person who tells us so may be the most valuable member in the room.</text:p>
      <text:p text:style-name="P2"><text:span text:style-name="Emphasis">Derived from Axiom I.</text:span></text:p>
      <text:p text:style-name="P1"/>
      <text:p text:style-name="P2"><text:span text:style-name="Strong_20_Emphasis">The Person</text:span></text:p>
      <text:p text:style-name="P2"><text:span text:style-name="Strong_20_Emphasis">4. Sovereignty of the Person</text:span></text:p>
      <text:p text:style-name="P2">Every person has the right to be the genuine author of their own beliefs, decisions, and life. We hold as illegitimate any system — corporate, political, or social — that colonizes the interior life, engineers dependence, or substitutes another's will for one's own without knowledge or consent. We build <text:soft-page-break/>community life that protects and restores this capacity in our members. The manipulation of persons for profit, power, or ideology is not merely harmful — it is a violation of what persons are.</text:p>
      <text:p text:style-name="P2"><text:span text:style-name="Emphasis">Derived from Axioms I and III.</text:span></text:p>
      <text:p text:style-name="P1"/>
      <text:p text:style-name="P2"><text:span text:style-name="Strong_20_Emphasis">5. Equal Standing</text:span></text:p>
      <text:p text:style-name="P2">Every member participates with genuinely equal standing regardless of wealth, social capital, fluency with institutional language, or any other attribute that produces inequality of voice in ordinary life. We do not merely remove formal barriers to participation — we actively build the conditions in which the quietest and most marginal member can be heard as fully as the most articulate and connected. Formal equality that produces substantive inequality is insufficient.</text:p>
      <text:p text:style-name="P2"><text:span text:style-name="Emphasis">Derived from Axiom III.</text:span></text:p>
      <text:p text:style-name="P1"/>
      <text:p text:style-name="P2"><text:span text:style-name="Strong_20_Emphasis">6. Epistemic Humility in Judgment</text:span></text:p>
      <text:p text:style-name="P2">When a decision is morally grave, irreducibly particular, and the relevant facts are only accessible through genuine proximity to the situation — the legitimacy of external judgment diminishes to the point of disappearance. Those closest to the facts, with genuine stakes in the outcome, are in the only position from which the decision can be made with any legitimacy. We build the conditions in which such decisions can be made with wisdom and care. We do not judge from outside what cannot be judged from outside.</text:p>
      <text:p text:style-name="P2"><text:span text:style-name="Emphasis">Derived from Axioms I, III, and VIII, and Principle 18.</text:span></text:p>
      <text:p text:style-name="P1"/>
      <text:p text:style-name="P2"><text:span text:style-name="Strong_20_Emphasis">Dignity and Justice</text:span></text:p>
      <text:p text:style-name="P2"><text:span text:style-name="Strong_20_Emphasis">7. Subsistence</text:span></text:p>
      <text:p text:style-name="P2">Human dignity cannot exist in the absence of food, shelter, healthcare, and safety. We accept collective responsibility for ensuring every member has these essentials. This is mutual obligation, not charity — we guarantee to each other what dignity requires. The material floor is not conditional on merit, productivity, or compliance. It is what dignity demands.</text:p>
      <text:p text:style-name="P2"><text:span text:style-name="Emphasis">Derived from Axiom III.</text:span></text:p>
      <text:p text:style-name="P1"/>
      <text:p text:style-name="P2"><text:span text:style-name="Strong_20_Emphasis">8. Non-Domination</text:span></text:p>
      <text:p text:style-name="P2">We reject domination. We hold as illegitimate the use of force, coercion, or control of resources to subordinate another person or to claim authority not freely granted. This applies to the state, to markets, to institutions, and to members in their relations with each other. Authority within this society flows from consent and is always recallable.</text:p>
      <text:p text:style-name="P2"><text:span text:style-name="Emphasis">Derived from Axioms III and VII.</text:span></text:p>
      <text:p text:style-name="P1"><text:soft-page-break/></text:p>
      <text:p text:style-name="P2"><text:span text:style-name="Strong_20_Emphasis">9. Restorative Justice</text:span></text:p>
      <text:p text:style-name="P2">When harm is done within this community we ask not what punishment is deserved but what repair is possible. Our first obligation is to those who have been harmed — their safety, their healing, their needs define the response. Where the person who caused harm accepts genuine accountability, we work toward restoration: of the relationship, of the community, and where possible of the person themselves. We recognize that permanent exclusion from community is itself a serious harm, to be chosen only when the safety of members requires it and never as mere punishment. The dignity of every person — including those who have caused harm — remains inviolable throughout. We understand that genuine accountability is more demanding than punishment, and we do not mistake the absence of suffering for the absence of consequence.</text:p>
      <text:p text:style-name="P2"><text:span text:style-name="Emphasis">Derived from Axioms III, IX, and X.</text:span></text:p>
      <text:p text:style-name="P1"/>
      <text:p text:style-name="P2"><text:span text:style-name="Strong_20_Emphasis">10. Cultivation</text:span></text:p>
      <text:p text:style-name="P2">We accept responsibility for the knowledge, skill, and judgment of our members — not as a service we provide but as an obligation we share. We hold that every person deserves access to the full breadth of human knowledge and capability, and that genuine education is a condition of dignity, not a commodity. We build systems of formation — colleges, apprenticeships, curricula — through which knowledge, skill, and wisdom pass from one generation to the next through human relationship rather than mere instruction. We cultivate not just competence but judgment: the capacity to think clearly, act wisely, and transmit what we know to those who come after us. Human capacities are not permanent possessions. They are achievements that require ongoing practice and active transmission to survive. What communities do not practice they forget. What they forget they lose — sometimes permanently. The knowledge of how to grow food, how to heal, how to govern ourselves, how to resolve conflict, how to build — these live in practice or they do not live at all. We build systems of formation not because education is valuable in the abstract but because the alternative is the loss of what we cannot afford to lose.</text:p>
      <text:p text:style-name="P2"><text:span text:style-name="Emphasis">Derived from Axioms III and X.</text:span></text:p>
      <text:p text:style-name="P1"/>
      <text:p text:style-name="P2"><text:span text:style-name="Strong_20_Emphasis">Economy</text:span></text:p>
      <text:p text:style-name="P2"><text:span text:style-name="Strong_20_Emphasis">11. Sufficiency</text:span></text:p>
      <text:p text:style-name="P2">We recognize that accumulation beyond enough ceases to produce flourishing and begins to harm — the person accumulating, the community around them, and the living world that sustains both. We build our economic life around sufficiency rather than growth, and we resist the conversion of the organization itself into a vehicle for accumulation.</text:p>
      <text:p text:style-name="P2"><text:span text:style-name="Emphasis">Derived from Axioms VII and XII.</text:span></text:p>
      <text:p text:style-name="P1"/>
      <text:p text:style-name="P2"><text:soft-page-break/><text:span text:style-name="Strong_20_Emphasis">12. Separation of Wealth from Power</text:span></text:p>
      <text:p text:style-name="P2">Material resources cannot purchase governance power, social standing, or disproportionate influence within this community. We hold that the corruption of democratic life by concentrated wealth is one of the defining failures of the existing order, and we build structural separation between what a member owns and what a member can decide.</text:p>
      <text:p text:style-name="P2"><text:span text:style-name="Emphasis">Derived from Axioms VII, X, and XI.</text:span></text:p>
      <text:p text:style-name="P1"/>
      <text:p text:style-name="P2"><text:span text:style-name="Strong_20_Emphasis">13. Flourishing as the Measure</text:span></text:p>
      <text:p text:style-name="P2">We measure the success of this organization by whether its members are actually flourishing — living meaningfully, working purposefully, relating genuinely, and connected to something larger than themselves. We do not measure success by growth, revenue, membership numbers, political influence, or any other proxy that mistakes the means for the end.</text:p>
      <text:p text:style-name="P2"><text:span text:style-name="Emphasis">Derived from Axiom VII.</text:span></text:p>
      <text:p text:style-name="P1"/>
      <text:p text:style-name="P2"><text:span text:style-name="Strong_20_Emphasis">Community</text:span></text:p>
      <text:p text:style-name="P2"><text:span text:style-name="Strong_20_Emphasis">14. Community</text:span></text:p>
      <text:p text:style-name="P2">We accept primary responsibility for building and maintaining the conditions in which genuine community becomes possible — not as a feature we offer but as the central obligation of this organization, because community is the condition in which persons flourish and become more fully themselves. We actively resist the forces of atomization that have destroyed the connective tissue of American life. We build rhythms of presence, shared work, and shared ceremony that make members genuinely known to one another over time. We understand that genuine community requires intention, structure, and ongoing care — that it does not arise spontaneously and cannot be sustained passively. To be a member of this society is to accept responsibility not just for your own participation but for the communal life that makes participation meaningful.</text:p>
      <text:p text:style-name="P2"><text:span text:style-name="Emphasis">Derived from Axioms IX and X.</text:span></text:p>
      <text:p text:style-name="P1"/>
      <text:p text:style-name="P2"><text:span text:style-name="Strong_20_Emphasis">Ecology and Time</text:span></text:p>
      <text:p text:style-name="P2"><text:span text:style-name="Strong_20_Emphasis">15. Ecological Stewardship</text:span></text:p>
      <text:p text:style-name="P2">We are not separate from the natural world — we are part of it. The land, water, and living systems that sustain us are not resources we manage but a community we belong to. We hold what we share with the living world in trust for those who come after us — human and non-human alike.</text:p>
      <text:p text:style-name="P2">The default is non-interference. The burden of justification falls on those who would extract, develop, or disturb — not on those who would restrain. It is not enough that a use is beneficial, necessary, or economically sound. Those who would act must demonstrate that what will be lost can be restored, that the irreversible cost is worth what cannot be recovered, and that those who come after — human and <text:soft-page-break/>non-human — have been genuinely considered. Where that demonstration cannot be made, restraint is not a counsel of passivity. It is the only honest response to what we do not own and cannot recreate.</text:p>
      <text:p text:style-name="P2"><text:span text:style-name="Emphasis">Derived from Axioms IV, V, VI, and XII.</text:span></text:p>
      <text:p text:style-name="P1"/>
      <text:p text:style-name="P2"><text:span text:style-name="Strong_20_Emphasis">16. Institutional Stewardship</text:span></text:p>
      <text:p text:style-name="P2">We build not for ourselves alone but for those who come after us. The institutions, culture, and governance of this society are held in trust for future members not yet present — just as we received what we have from those who came before. We accept responsibility for building institutions that are designed to be inherited: legible to future members, adaptable to future conditions, and faithful to the foundations without being captured by the preferences of any founding generation. We resist decisions that serve present members at the expense of future ones. The measure of what we build is not whether it serves us well but whether it serves those who will carry it forward.</text:p>
      <text:p text:style-name="P2"><text:span text:style-name="Emphasis">Derived from Axioms IV and XI.</text:span></text:p>
      <text:p text:style-name="P1"/>
      <text:p text:style-name="P2"><text:span text:style-name="Strong_20_Emphasis">Governance</text:span></text:p>
      <text:p text:style-name="P2"><text:span text:style-name="Strong_20_Emphasis">17. Consent and Accountability</text:span></text:p>
      <text:p text:style-name="P2">Authority within this organization requires genuine ongoing consent and remains utterly answerable to the members subject to it. Consent must be informed, genuine, and always revocable — members must retain the genuine ability to withdraw consent, dissent, and recall authority without prohibitive cost. Accountability is the mechanism by which consent remains real rather than nominal. An organization whose members cannot effectively hold it accountable has already begun losing its legitimacy.</text:p>
      <text:p text:style-name="P2"><text:span text:style-name="Emphasis">Derived from Axioms IX and X.</text:span></text:p>
      <text:p text:style-name="P1"/>
      <text:p text:style-name="P2"><text:span text:style-name="Strong_20_Emphasis">18. Participation and Subsidiarity</text:span></text:p>
      <text:p text:style-name="P2">Members have a genuine role in shaping the decisions that affect them — not merely the right to ratify decisions made elsewhere. Decisions belong as close as possible to the people and places most affected by them. This is especially true of morally grave decisions — those touching life, dignity, land, and belonging. Distance from consequence corrupts judgment. Larger bodies exist to support what smaller ones cannot do alone, not to absorb what they can.</text:p>
      <text:p text:style-name="P2"><text:span text:style-name="Emphasis">Derived from Axioms IX and X.</text:span></text:p>
      <text:p text:style-name="P1"/>
      <text:p text:style-name="P2"><text:span text:style-name="Strong_20_Emphasis">19. Transparency</text:span></text:p>
      <text:p text:style-name="P2">Institutions must be comprehensible to the people subject to them. Information about decisions, resources, and operations is held in common. Complexity shall not be used as a barrier to participation <text:soft-page-break/>or a shield for power. You cannot genuinely consent to what you cannot understand — opacity is therefore a form of illegitimacy. All people have the right to understand what governs them.</text:p>
      <text:p text:style-name="P2"><text:span text:style-name="Emphasis">Derived from Axioms IX and X.</text:span></text:p>
      <text:p text:style-name="P1"/>
      <text:p text:style-name="P2"><text:span text:style-name="Strong_20_Emphasis">20. Precaution</text:span></text:p>
      <text:p text:style-name="P2">Where evidence is insufficient to reliably predict the consequences of an action, and where those consequences may be irreversible or significantly harmful, a Resolute Society defaults to the position that preserves the most options and causes the least irreversible harm. Uncertainty is not a reason for paralysis — it is a reason for humility about the pace and scale of action. The burden of proof falls on irreversibility, not on caution. What cannot be undone demands a higher threshold of certainty before it is done.</text:p>
      <text:p text:style-name="P2"><text:span text:style-name="Emphasis">Derived from Axioms I and XII, and Principle 2.</text:span></text:p>
      <text:p text:style-name="P1"/>
      <text:p text:style-name="P2"><text:span text:style-name="Strong_20_Emphasis">The Person and Circumstance</text:span></text:p>
      <text:p text:style-name="P2"><text:span text:style-name="Strong_20_Emphasis">21. Circumstance and Agency</text:span></text:p>
      <text:p text:style-name="P2">We hold simultaneously that circumstances shape persons profoundly and that persons remain genuine agents within their circumstances. We do not reduce outcomes to individual choice, because doing so denies the reality of conditions that are not of the person's making and produces cruelty dressed as accountability. We do not deny agency, because doing so reduces persons to objects of their circumstances and produces condescension dressed as compassion. Both failures violate dignity. We build community life, governance, and judgment around the honest acknowledgment of both truths — that where a person stands is partly the result of conditions they did not choose, and that who a person is remains genuinely their own.</text:p>
      <text:p text:style-name="P2"><text:span text:style-name="Emphasis">Derived from Axioms III and VII.</text:span></text:p>
      <text:p text:style-name="P1"/>
      <text:p text:style-name="P2"><text:span text:style-name="Strong_20_Emphasis">Moral Perception</text:span></text:p>
      <text:p text:style-name="P2"><text:span text:style-name="Strong_20_Emphasis">22. Moral Vigilance</text:span></text:p>
      <text:p text:style-name="P2">We assume our own partial blindness as a permanent condition. The mechanisms that have produced moral catastrophe throughout human history — distance from consequence, normalization, and incentive structures that make not-seeing profitable — are not features of other people or other institutions. They operate in us and will operate in this Society if we permit the conditions that enable them. We therefore hold as a standing obligation the assumption that harm we are causing or enabling may currently be invisible to us, and we treat the perceptions of those with least institutional standing — the newest, the most marginal, those who bear costs the majority does not — as information the community cannot afford to ignore. Clarity is not a state we achieve. It is a practice we maintain or lose.</text:p>
      <text:p text:style-name="P2"><text:soft-page-break/><text:span text:style-name="Emphasis">Derived from Axiom II.</text:span></text:p>
      <text:p text:style-name="P1"/>
      <text:p text:style-name="P2"><text:span text:style-name="Strong_20_Emphasis">23. Moral Permeability</text:span></text:p>
      <text:p text:style-name="P2">The capacity to ignore suffering we find inconvenient to acknowledge is not compartmentalized. A community that learns to look away from suffering in one context — because it is economically convenient, because distance makes it abstract, because the being that suffers is not the kind we have learned to count — does not confine that capacity to the context in which it was practiced. It carries it everywhere. We therefore hold that the suffering of beings capable of experiencing it generates real moral obligations regardless of species, and that the Society's commitment to seeing clearly extends to every scale at which suffering occurs and every context in which we might benefit from not seeing it. We do not claim to have fully answered what this requires of us. We claim only that we will not look away from the question.</text:p>
      <text:p text:style-name="P2"><text:span text:style-name="Emphasis">Derived from Axioms II and VIII.</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21:32:18.427787325</meta:creation-date>
    <dc:date>2026-06-17T21:34:13.252158829</dc:date>
    <meta:editing-duration>PT1M55S</meta:editing-duration>
    <meta:editing-cycles>1</meta:editing-cycles>
    <meta:generator>LibreOffice/24.2.7.2$Linux_X86_64 LibreOffice_project/420$Build-2</meta:generator>
    <meta:document-statistic meta:table-count="0" meta:image-count="0" meta:object-count="0" meta:page-count="7" meta:paragraph-count="81" meta:word-count="2356" meta:character-count="14809" meta:non-whitespace-character-count="12494"/>
  </office:meta>
</office:document-meta>
</file>