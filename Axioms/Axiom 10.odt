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orphan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On the Tenth Axiom: We live in a world of real limits. Pretending otherwise has consequences.</text:span></text:p>
      <text:p text:style-name="Text_20_body"><text:span text:style-name="Emphasis">The planet has a carrying capacity. Human attention has boundaries. Communities have a scale beyond which genuine belonging becomes impossible. Power unchecked reaches limits in collapse and tyranny. The body has needs that cannot be indefinitely deferred. These are not preferences or political positions — they are features of reality that exist whether we acknowledge them or not. The modern era has been defined by the systematic pretense that limits can be overcome, deferred, or ignored. The consequences of that pretense are now arriving simultaneously across every domain of human life. We do not treat limits as failures or constraints on freedom. We treat them as the architecture of a livable human life — the conditions within which genuine flourishing becomes possible. We build accordingly.</text:span></text:p>
      <text:p text:style-name="Text_20_body"><text:span text:style-name="Emphasis"/></text:p>
      <text:p text:style-name="Text_20_body"><text:span text:style-name="Emphasis">-------------------------------------------------------------------------------------</text:span></text:p>
      <text:p text:style-name="P1">Yes. And it's the most Tainter axiom in the framework.</text:p>
      <text:p text:style-name="P1">The consequences of that pretense are now arriving simultaneously across every domain of human life — that's essentially the collapse thesis stated plainly. Not as prediction but as observation. The simultaneity is what makes this moment different from previous periods of institutional stress. It's not one system under pressure. It's all of them at once.</text:p>
      <text:p text:style-name="P1">Climate. Debt. Democratic legitimacy. Attention. Community scale. Public health. Supply chain fragility. Soil fertility. Aquifer depletion. Political complexity exceeding the capacity of institutions to manage it.</text:p>
      <text:p text:style-name="P1">Each of these is a limit being reached. And they're interacting with each other in ways that make each one harder to address in isolation.</text:p>
      <text:p text:style-name="P1">But before we build the foundation I want to ask you something specific.</text:p>
      <text:p text:style-name="P1">The axiom is making two distinct claims that are worth separating.</text:p>
      <text:p text:style-name="P1">The first is descriptive — limits are real, they exist whether acknowledged or not, the pretense has consequences. That's an empirical claim and relatively straightforward to ground.</text:p>
      <text:p text:style-name="P1">The second is normative and more interesting — limits are not failures or constraints on freedom but the architecture of a livable human life, the conditions within which genuine flourishing becomes possible.</text:p>
      <text:p text:style-name="P1">That second claim is doing the harder philosophical work. It's trying to reframe how Americans think about limits entirely. Because the dominant American cultural relationship to limits is adversarial. Limits are obstacles. Freedom means transcending them. The frontier myth, manifest destiny, infinite growth, technology as the solution to every constraint — these are all expressions of a culture that treats limits as enemies to be overcome rather than reality to be inhabited honestly.</text:p>
      <text:p text:style-name="Text_20_body"><text:span text:style-name="Emphasis"/></text:p>
      <text:p text:style-name="Text_20_body">--------------------------------------------------------------------------</text:p>
      <text:p text:style-name="Text_20_body"/>
      <text:p text:style-name="Text_20_body"><text:soft-page-break/>You're separating two categories of limits.</text:p>
      <text:p text:style-name="Text_20_body"><text:span text:style-name="Strong_20_Emphasis">Hard limits</text:span> — features of physical reality that are not negotiable regardless of human ingenuity. Gravity. Thermodynamics. The speed of light. The fact that biological organisms require certain inputs to survive. These are not limits that technology will overcome. They are the structure of the universe we inhabit.</text:p>
      <text:p text:style-name="Text_20_body"><text:span text:style-name="Strong_20_Emphasis">Soft limits</text:span> — constraints that are real under current conditions but potentially moveable given sufficient knowledge, technology, or social organization. Carrying capacity under current agricultural methods is different from carrying capacity with radically different food production. Energy limits under fossil fuels are different from energy limits with mature fusion or solar. These are genuine limits now that might not be permanent limits forever.</text:p>
      <text:p text:style-name="Text_20_body">The distinction matters because if you conflate them the axiom becomes either too strong or too weak.</text:p>
      <text:p text:style-name="Text_20_body">Too strong — if you treat all limits as hard limits you deny genuine human agency and ingenuity. You become fatalistic in a way that isn't warranted and isn't honest. Humans have genuinely expanded what's possible throughout history. That's real.</text:p>
      <text:p text:style-name="Text_20_body">Too weak — if you treat all limits as soft limits you reproduce exactly the pretense the axiom is warning against. The history of technological optimism is full of people who assumed current constraints were temporary and made decisions based on that assumption that turned out to be catastrophically wrong.</text:p>
      <text:p text:style-name="Text_20_body">So the honest framework probably needs to say something like — some limits are negotiable and human ingenuity is real and worth investing in. But the burden of proof falls on the claim that a limit is soft rather than hard. And in the meantime — before that proof exists — you act as though the limit is real because the cost of being wrong about a hard limit is catastrophic and often irreversible.</text:p>
      <text:p text:style-name="Text_20_body">Which connects directly to Axiom I. You follow the evidence. You hold conclusions provisionally. You don't assume limits are permanent. But you also don't assume they're temporary just because assuming they're temporary is more convenient or more profitable.</text:p>
      <text:p text:style-name="Text_20_body">The precautionary principle in Axiom XX is essentially this applied to governance. Where consequences may be irreversible, default to caution. The asymmetry of outcomes demands it. If you're wrong about a soft limit being hard, you were overly cautious. If you're wrong about a hard limit being soft, you may have made an irreversible mistake at civilizational scale.</text:p>
      <text:p text:style-name="Text_20_body"/>
      <text:p text:style-name="Text_20_body">----------------------------------------------------------------------</text:p>
      <text:p text:style-name="Text_20_body"/>
      <text:p text:style-name="Text_20_body">Yes. And those are some of the most important limits the axiom is addressing because they're the least visible and the most systematically violated right now.</text:p>
      <text:p text:style-name="Text_20_body">Human beings have a set of social and cognitive limits that are features of our biology — built over hundreds of thousands of years of evolution in small band societies — that have not changed meaningfully in the time that technology has been pushing against them.</text:p>
      <text:p text:style-name="Text_20_body"><text:soft-page-break/><text:span text:style-name="Strong_20_Emphasis">Dunbar's number</text:span></text:p>
      <text:p text:style-name="Text_20_body">Robin Dunbar's research established that humans can maintain genuine stable social relationships with roughly 150 people. Not acquaintances. Not followers. Genuine relationships where you know the person, track their life, feel real obligation toward them and they toward you. This isn't a cultural preference. It's a cognitive limit rooted in neocortex size. The social brain can only hold so many people as full persons simultaneously.</text:p>
      <text:p text:style-name="Text_20_body">Social media has given people the illusion of thousands of relationships while destroying the conditions for the 150 real ones. You can follow ten thousand people. You cannot genuinely know them. The technology pushed past the limit without acknowledging the limit existed.</text:p>
      <text:p text:style-name="Text_20_body"><text:span text:style-name="Strong_20_Emphasis">Attention</text:span></text:p>
      <text:p text:style-name="Text_20_body">Human attention is finite, depletable, and requires recovery. The attention economy treats it as an infinite resource to be extracted. The consequences are arriving — epidemic levels of anxiety, inability to sustain concentration, the destruction of the capacity for deep thought that complex problems require. These aren't character failings of weak-willed people. They're the predictable outcome of a system designed to extract a resource past its sustainable yield.</text:p>
      <text:p text:style-name="Text_20_body"><text:span text:style-name="Strong_20_Emphasis">Cognitive bandwidth</text:span></text:p>
      <text:p text:style-name="Text_20_body">Scarcity research by Sendhil Mullainathan and Eldar Shafir established that poverty and chronic stress consume cognitive bandwidth in measurable ways — literally reducing available mental capacity for decision making, planning, and impulse control. The mental load of managing precarity is itself a tax on cognition. This connects directly back to Axiom VII. Circumstances shape persons not just through opportunity but through the direct consumption of cognitive resources that agency requires.</text:p>
      <text:p text:style-name="Text_20_body"><text:span text:style-name="Strong_20_Emphasis">Trust and community scale</text:span></text:p>
      <text:p text:style-name="Text_20_body">Genuine community — the kind that makes mutual aid possible, that sustains genuine accountability, that produces the belonging Axiom V identifies as constitutive of personhood — has a scale limit. The Society's threshold of thirty members before formal governance kicks in, and the federation structure rather than unlimited growth, are direct expressions of this limit. You cannot scale genuine community the way you scale a platform. The attempt produces something that looks like community from the outside and functions like atomization from the inside. Facebook has three billion users and loneliness is at epidemic levels.</text:p>
      <text:p text:style-name="Text_20_body"><text:span text:style-name="Strong_20_Emphasis">The recovery limit</text:span></text:p>
      <text:p text:style-name="Text_20_body">Humans require rest, sleep, unstructured time, and periods of genuine disengagement to function well. The always-on culture produced by smartphones and remote work has pushed systematically past this limit. The body keeps score regardless of whether the culture acknowledges it. Burnout, chronic illness, anxiety disorders, depression — these are in significant part the physiological consequences of ignoring a hard biological limit.</text:p>
      <text:p text:style-name="Text_20_body">What's striking about all of these is that they're not soft limits that technology might eventually overcome. They're features of human biology that evolved over deep time and are not going to change on the timescale of technological development. We are not going to evolve larger neocortexes in <text:soft-page-break/>response to social media. We are not going to stop needing sleep because productivity culture finds it inconvenient.</text:p>
      <text:p text:style-name="Text_20_body">Which means the appropriate response isn't to wait for technology to solve the problem it created. It's to build social structures that respect the limits technology is violating.</text:p>
      <text:p text:style-name="Text_20_body">And that's exactly what the Society is doing. The scale limits on community size. The friction-as-philosophy approach to the platform. The mandatory human responses. The emphasis on physical presence and shared work. The rhythms of ceremony and common life.</text:p>
      <text:p text:style-name="Text_20_body">These aren't romantic nostalgia for a simpler time. They're structural responses to hard human limits that the dominant culture is systematically ignoring.</text:p>
      <text:p text:style-name="Text_20_body"/>
      <text:p text:style-name="Text_20_body"><text:span text:style-name="Emphasis"/></text:p>
      <text:p text:style-name="Horizontal_20_Line"/>
      <text:p text:style-name="Text_20_body"><text:span text:style-name="Strong_20_Emphasis">Why It Is True</text:span></text:p>
      <text:p text:style-name="Text_20_body">Every system has limits. This is not a philosophical position — it is a feature of physical reality that applies without exception to every system that has ever existed. Ecosystems have carrying capacities beyond which they degrade. Economies built on extraction exhaust their resource base. Attention is finite and cannot be indefinitely divided. Communities have a scale beyond which the social bonds that make genuine belonging possible become too thin to bear weight. Political systems that concentrate power without constraint reach their limits in tyranny or collapse. The human body has needs — for rest, for nourishment, for care — that cannot be indefinitely deferred without consequence.</text:p>
      <text:p text:style-name="Text_20_body">None of this is controversial when stated abstractly. Everyone knows that systems have limits. The controversy arises when specific limits are named — when someone says this particular resource is being depleted, this particular community has grown beyond the scale of genuine belonging, this particular rate of consumption cannot continue. At that point the limit becomes a political position, a constraint on freedom, an obstacle to progress. The naming of the limit gets treated as the problem rather than the limit itself.</text:p>
      <text:p text:style-name="Text_20_body">This is a confusion that has consequences. The limit exists whether it is named or not. The ecosystem degrades whether or not the degradation is acknowledged. The attention fractures whether or not the fracturing is admitted. The community loses coherence whether or not anyone notices. Reality does not wait for consensus. The consequences of ignoring limits arrive on their own schedule regardless of whether the ignoring was deliberate or unconscious, ideological or merely convenient.</text:p>
      <text:p text:style-name="Text_20_body">The most important categories for our moment are ecological, attentional, and communal. Each deserves direct examination.</text:p>
      <text:p text:style-name="Text_20_body">The ecological limit is the most consequential and the most resisted. The planet's atmosphere, its soils, its fresh water systems, its biodiversity — these are not infinite resources. They are systems with carrying capacities that human activity has been exceeding with increasing intensity for two centuries. The consequences are not future projections. They are current conditions — in the altered climate, in <text:soft-page-break/>the depleted aquifers, in the degraded soils, in the disrupted agricultural systems that billions of people depend on. The limit was always there. We are now living inside the consequences of having ignored it.</text:p>
      <text:p text:style-name="Text_20_body">The attentional limit is less discussed but increasingly urgent. Human attention is finite and cannot be indefinitely divided without cost. The attention economy — the system of platforms and algorithms designed to capture and hold human attention for commercial purposes — has industrialized the exploitation of that limit. The result is a population whose capacity for sustained thought, genuine deliberation, deep relationship, and patient work has been measurably degraded. The attention that genuine community, genuine self-governance, and genuine human development require is being consumed by systems optimized to consume it. This is not a metaphor. It is a description of what is happening to the cognitive and social infrastructure of human life.</text:p>
      <text:p text:style-name="Text_20_body">The communal limit is perhaps the oldest observation in political philosophy. Aristotle noted that a city of a hundred thousand cannot be a genuine city — that governance and belonging require a scale at which people can actually know each other, can see the consequences of collective decisions, can hold each other accountable in the direct ways that genuine community requires. The modern organization of human life — in metropolitan areas of millions, in national institutions of hundreds of millions, in global systems of billions — has systematically exceeded the scale at which genuine belonging is possible. The loneliness epidemic documented in Axiom V is partly a consequence of this. People are not isolated because they have chosen isolation. They are isolated because the scale of the systems they live inside makes genuine connection structurally difficult.</text:p>
      <text:p text:style-name="Horizontal_20_Line"/>
      <text:p text:style-name="Text_20_body"><text:span text:style-name="Strong_20_Emphasis">An American Tradition</text:span></text:p>
      <text:p text:style-name="Text_20_body">America was founded on assumptions about limits — or rather, on the assumption that limits did not apply.</text:p>
      <text:p text:style-name="Text_20_body">The continent seemed infinite. The resources seemed inexhaustible. The land beyond the frontier seemed to promise that any failure, any exhaustion, any social problem could be solved by moving west and starting over. Frederick Jackson Turner argued in 1893 that the frontier was the defining fact of American character — that the availability of free land had produced the American disposition toward individualism, optimism, and the belief that problems could always be solved by expansion. He was right that it had shaped the character. He was also delivering the eulogy — the frontier had just closed.</text:p>
      <text:p text:style-name="Text_20_body">The assumptions that made sense when the continent was vast and the population was small have outlived their context. The idea that growth can always solve scarcity made sense when there was genuine abundance to grow into. The idea that you could externalize the costs of production onto the natural world made sense when the natural world seemed capable of absorbing anything. The idea that community problems could be solved by moving somewhere else made sense when somewhere else was always available. None of those conditions exist anymore. The frontier is closed. The atmosphere is full. The aquifers are depleting. The somewhere else has run out.</text:p>
      <text:p text:style-name="Text_20_body">This is not a criticism of the founders or of the generations that built the country under those assumptions. They were operating rationally within the conditions they faced. The criticism is of the <text:soft-page-break/>refusal to update the assumptions when the conditions changed — the insistence on acting as if the frontier is still open when it has been closed for over a century, as if growth can still solve every problem when growth itself is now producing problems faster than it solves them.</text:p>
      <text:p text:style-name="Text_20_body">The counter-tradition has always existed. Jefferson's vision of a republic of modest self-sufficient farms was in part an intuition about scale — that genuine self-governance required communities small enough for people to actually know each other and see the consequences of their decisions. The conservation movement recognized that natural systems had limits that extraction would eventually hit. Wendell Berry has spent fifty years articulating what a civilization that took its limits seriously might actually look like — rooted in place, scaled to human belonging, organized around the health of the land rather than the extraction of its value. These voices were never dominant. They were always right.</text:p>
      <text:p text:style-name="Text_20_body">The Dust Bowl is the most instructive American case study in what happens when ecological limits are ignored. The Great Plains had sustained human life for millennia under the practices of the people who lived there before European settlement. The combination of the steel plow, commodity agriculture, and the assumption that the land could absorb anything produced one of the worst ecological catastrophes in American history within a single generation. The limit was always there. Nobody believed in it until the topsoil was blowing to the Atlantic.</text:p>
      <text:p text:style-name="Horizontal_20_Line"/>
      <text:p text:style-name="Text_20_body"><text:span text:style-name="Strong_20_Emphasis">The Current Moment</text:span></text:p>
      <text:p text:style-name="Text_20_body">The axiom says that the consequences of ignoring limits are arriving simultaneously across every domain of human life. That is not hyperbole. It is a description of the present moment.</text:p>
      <text:p text:style-name="Text_20_body">The ecological consequences are the most visible and the most consequential. The climate is destabilizing in ways that are disrupting agricultural systems, intensifying extreme weather, threatening coastal infrastructure, and beginning to displace populations at a scale that will accelerate dramatically over the coming decades. The fresh water systems that agriculture and human habitation depend on are being depleted faster than they recharge across the major agricultural regions of the world. The soils that food production depends on are being degraded by industrial agricultural practices at rates that are not sustainable over even a medium-term horizon. These are not distant threats. They are current conditions whose consequences are already arriving and will intensify regardless of what decisions are made now because of decisions already made.</text:p>
      <text:p text:style-name="Text_20_body">The fiscal consequences are structural and accelerating. The national debt represents an accumulated decision to consume the present at the expense of the future — to fund current expenditure by borrowing against the capacity of future people who had no say in the decision. The interest on that debt now consumes a significant and growing portion of the federal budget, crowding out the investments that would actually build future capacity. The limit that borrowing eventually hits is not a political position. It is arithmetic.</text:p>
      <text:p text:style-name="Text_20_body">The attentional consequences are perhaps the least discussed and the most immediately visible in daily life. The epidemic of anxiety, depression, and inability to sustain attention — particularly among young people who have grown up entirely inside the attention economy — represents a population whose cognitive and emotional infrastructure has been degraded by systems designed to exploit it. The <text:soft-page-break/>capacity for the sustained attention that genuine self-governance, genuine relationship, and genuine craft require is being systematically consumed. A self-governing community requires citizens capable of sustained thought. The attention economy is producing something different.</text:p>
      <text:p text:style-name="Text_20_body">The communal consequences are what Axiom V documents in detail — the collapse of genuine associational life, the epidemic of loneliness, the replacement of genuine community with digital simulation. These are in part consequences of scale — of organizing human life at dimensions that exceed the limits of genuine belonging — and in part consequences of the economic arrangements that prioritize mobility and individual optimization over rootedness and communal health.</text:p>
      <text:p text:style-name="Text_20_body">What makes the current moment distinctive is not that any one of these limits is being hit — limits have been hit before — but that they are all being hit simultaneously, that they interact with and amplify each other, and that the political and economic systems that might respond to them are themselves compromised by the dynamics that Axiom VIII describes. The concentration of power that benefits from the current arrangements has a strong interest in denying that the limits are real. The short-term incentive structures that govern political and economic decision-making make it nearly impossible to respond to consequences that arrive slowly and whose costs fall on people who cannot yet vote or organize.</text:p>
      <text:p text:style-name="Horizontal_20_Line"/>
      <text:p text:style-name="Text_20_body"><text:span text:style-name="Strong_20_Emphasis">The Demand It Makes</text:span></text:p>
      <text:p text:style-name="Text_20_body">This axiom demands a fundamental reorientation in how we think about what a good life and a good community look like.</text:p>
      <text:p text:style-name="Text_20_body">The dominant model of the good life in modern America is organized around more — more consumption, more options, more mobility, more growth, more optimization. This model made a certain kind of sense when more was genuinely available and its costs were genuinely diffuse. It makes less sense when the costs are arriving and the availability is contracting. A model of the good life organized around more is not just ecologically unsustainable. It is humanly unsatisfying — the research on what actually produces human flourishing consistently points away from consumption and toward connection, meaning, craft, and belonging. The limit is not just external. It is internal. More does not produce flourishing beyond a certain threshold and we passed that threshold a long time ago.</text:p>
      <text:p text:style-name="Text_20_body">The reorientation this axiom demands is toward sufficiency rather than maximization — toward asking not how much can be extracted or consumed or optimized but what is actually needed for a genuinely good human life, and then building toward that with honesty about what it requires and what it costs.</text:p>
      <text:p text:style-name="Text_20_body">This is not asceticism. It is not the demand that people live with less than they need. It is the recognition that what people actually need for a genuinely good life is not what the consumption economy tells them they need — and that building communities organized around genuine human flourishing rather than around the production of consumption is both more honest and more livable.</text:p>
      <text:p text:style-name="Text_20_body">The Resolute Society takes limits seriously as the architecture of a livable human life. We build at a scale where genuine belonging is possible. We make decisions with honest accounting of their long-term consequences. We organize our economic life around sufficiency and covenant rather than <text:soft-page-break/>maximization and extraction. We treat the limits we live inside not as failures or constraints on freedom but as the conditions within which genuine human flourishing becomes possible.</text:p>
      <text:p text:style-name="Text_20_body">We build accordingl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5T22:13:31.646561097</meta:creation-date>
    <dc:date>2026-06-17T13:00:57.443033211</dc:date>
    <meta:editing-duration>PT8M59S</meta:editing-duration>
    <meta:editing-cycles>4</meta:editing-cycles>
    <meta:generator>LibreOffice/24.2.7.2$Linux_X86_64 LibreOffice_project/420$Build-2</meta:generator>
    <meta:document-statistic meta:table-count="0" meta:image-count="0" meta:object-count="0" meta:page-count="8" meta:paragraph-count="69" meta:word-count="3388" meta:character-count="22403" meta:non-whitespace-character-count="19035"/>
  </office:meta>
</office:document-meta>
</file>