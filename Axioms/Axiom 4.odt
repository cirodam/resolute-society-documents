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n the Fourth Axiom: Communities make covenants with their members.</text:span></text:p>
      <text:p text:style-name="Text_20_body"><text:span text:style-name="Emphasis">Communities make covenants with their members. To ask someone to participate — to work, to contribute, to belong — is to promise that participation will be meaningful. An economy is the primary mechanism through which a community keeps or breaks that promise. When a person can work honestly and still be unable to sustain a life, the covenant has been broken.</text:span></text:p>
      <text:p text:style-name="Text_20_body"><text:span text:style-name="Emphasis"/></text:p>
      <text:p text:style-name="Text_20_body"><text:span text:style-name="Emphasis">-------------------------------------------------------------------------------------</text:span></text:p>
      <text:p text:style-name="Text_20_body"><text:span text:style-name="Emphasis">A contract is explicit, transactional, legally enforceable. A covenant is something deeper — a mutual commitment that creates genuine obligation even without explicit negotiation. Marriage is a covenant. Citizenship has covenant-like qualities. Community membership as the Society understands it is explicitly covenantal.</text:span></text:p>
      <text:p text:style-name="Text_20_body"><text:span text:style-name="Emphasis"/></text:p>
      <text:p text:style-name="Text_20_body"><text:span text:style-name="Emphasis">---------------------------------------------------</text:span></text:p>
      <text:p text:style-name="Text_20_body"><text:span text:style-name="Emphasis"/></text:p>
      <text:p text:style-name="Text_20_body"><text:span text:style-name="Emphasis">And that's not a metaphor — it's a biological and psychological fact. Humans are the most socially dependent species that has ever existed. We have the longest period of childhood helplessness of any animal. We cannot survive infancy without sustained care from others. We develop language, cognition, identity, and emotional regulation through relationship. Our nervous systems are literally calibrated by early social experience in ways that shape us for the rest of our lives.</text:span></text:p>
      <text:p text:style-name="Text_20_body">The hermit is actually the aberration that requires explanation, not the community dweller. Solitary existence for a human being is a achievement of will against a powerful current running the other direction. And even hermits — monks, ascetics, recluses throughout history — almost universally emerged from communities, carried community with them in their language and thought and practice, and often maintained some contact with the world they withdrew from.</text:p>
      <text:p text:style-name="Text_20_body">There's also something deeper than biology.</text:p>
      <text:p text:style-name="Text_20_body">Humans don't just need other people for survival. We need them for meaning. The things that make life feel worth living — love, recognition, shared purpose, the transmission of what we know to someone who will carry it forward, being witnessed in our existence — none of these are available in solitude. You cannot love someone who isn't there. You cannot be known by no one. You cannot transmit what you know to an empty room.</text:p>
      <text:p text:style-name="Text_20_body">This is what Axiom V is actually about — community is constitutive of the person. But it's already implicit in Axiom IV. The reason the covenant matters is that participation in community isn't optional for human beings. We don't choose community the way we choose a gym membership. We are already in it by virtue of being human. And because we're already in it — because we have no real alternative that doesn't cost us something fundamental about our humanity — the terms of participation carry enormous moral weight.</text:p>
      <text:p text:style-name="Text_20_body">Which sharpens the covenant claim considerably.</text:p>
      <text:p text:style-name="Text_20_body"><text:soft-page-break/>If community participation were truly optional — if the hermit life were a genuine equal alternative — then the terms of participation would be more like a contract. Take it or leave it. But it's not optional in any meaningful sense. We are social beings who require community for survival and for meaning. The ask — participate, contribute, belong — isn't really an ask. It's a description of what we already are.</text:p>
      <text:p text:style-name="Text_20_body">Which means the obligation runs deeper than contract logic can capture. You can't opt out of needing community. Therefore the community cannot treat the terms of participation as merely transactional. The covenant isn't between equals negotiating from positions of freedom. It's between a community and beings who need it in the most fundamental sense.</text:p>
      <text:p text:style-name="Text_20_body">That asymmetry is what generates the strong obligation. The community has power over something people cannot do without. That power carries responsibility.</text:p>
      <text:p text:style-name="Text_20_body"><text:span text:style-name="Emphasis"/></text:p>
      <text:p text:style-name="Text_20_body"><text:span text:style-name="Emphasis">---------------------------------------------------------</text:span></text:p>
      <text:p text:style-name="Text_20_body"><text:span text:style-name="Emphasis"/></text:p>
      <text:p text:style-name="Text_20_body"><text:span text:style-name="Emphasis">If participation isn't truly optional — if community is the condition of human existence rather than a lifestyle choice — then the terms of participation carry a weight that purely contractual logic can't capture. You're not negotiating from freedom. You're participating from necessity. And that asymmetry generates a strong obligation on the community's side.</text:span></text:p>
      <text:p text:style-name="Text_20_body">The covenant isn't just implicit either. It's actively reinforced. From childhood Americans are told explicitly — go to school, work hard, follow the rules, contribute. The community makes the ask loudly and repeatedly. It builds entire institutions around preparing people to participate. Schools, credentials, legal structures, social norms — all of it oriented toward producing contributing members.</text:p>
      <text:p text:style-name="Text_20_body">That active solicitation of participation strengthens the obligation considerably. You're not just implicitly part of a community by virtue of being human. You're explicitly recruited into a specific set of expectations and roles. The promise is made loudly even if it's never written down.</text:p>
      <text:p text:style-name="Text_20_body">And what is the minimum the promise requires in return?</text:p>
      <text:p text:style-name="Text_20_body">I think it's precisely what you said. Basic subsistence. The material conditions under which a person can actually exist with dignity. Not reward proportional to contribution. Not wealth. Not comfort beyond necessity.</text:p>
      <text:p text:style-name="Text_20_body">Just — you will not starve. You will have shelter. You will be able to sustain a life.</text:p>
      <text:p text:style-name="Text_20_body">That's an extraordinarily modest ask given what the community requires of its members. And yet it's the ask that the current economic arrangement most systematically fails to honor.</text:p>
      <text:p text:style-name="Text_20_body">Which is what makes the betrayal experience so powerful and so legitimate. It's not that people expected too much. It's that they expected the absolute minimum and didn't get it.</text:p>
      <text:p text:style-name="Text_20_body">There's a philosopher named John Rawls who built an entire theory of justice around a related idea — that the basic structure of society must be justifiable to the least advantaged members. Not just <text:soft-page-break/>tolerable to them. Justifiable. That's a high bar. And it's essentially what your axiom is asserting from a different direction.</text:p>
      <text:p text:style-name="Text_20_body">But your formulation is actually more accessible than Rawls because it doesn't require anyone to adopt a theoretical framework. It just asks people to take seriously the promise that was already made to them. The covenant isn't a philosophical abstraction. It's the thing your parents told you, your teachers told you, your president told you. Work hard and you'll be okay.</text:p>
      <text:p text:style-name="Text_20_body"><text:span text:style-name="Emphasis"/></text:p>
      <text:p text:style-name="Text_20_body"><text:span text:style-name="Emphasis">------------------------------------------------------------</text:span></text:p>
      <text:p text:style-name="Text_20_body"><text:span text:style-name="Emphasis"/></text:p>
      <text:p text:style-name="Text_20_body"><text:span text:style-name="Emphasis">The pure libertarian position — the economy owes you nothing, community owes you nothing, you are a self-sufficient individual responsible entirely for your own outcomes — requires a set of premises that collapse under examination.</text:span></text:p>
      <text:p text:style-name="Text_20_body"><text:span text:style-name="Strong_20_Emphasis">It requires that you arrived at your position purely through your own choices and merits.</text:span></text:p>
      <text:p text:style-name="Text_20_body">But you didn't. You were born into a particular family, a particular place, a particular moment in history, with a particular set of inherited advantages or disadvantages that had nothing to do with your choices. The zip code you were born in predicts your life outcomes with a precision that should embarrass anyone who believes in pure meritocracy. The child born into poverty in rural Appalachia and the child born into wealth in Connecticut are not starting the same race. Pretending otherwise isn't rugged individualism. It's a failure to perceive reality honestly — which violates Axiom I.</text:p>
      <text:p text:style-name="Text_20_body"><text:span text:style-name="Strong_20_Emphasis">It requires that your success is purely your own achievement.</text:span></text:p>
      <text:p text:style-name="Text_20_body">But it isn't. Every successful person in America built their success on public infrastructure — roads, courts, contract law, currency, educated workers, the internet, GPS, basic research funded by taxpayer money. The entrepreneur who claims to be self-made used all of that without paying its full cost. The wealth generated by the American economy is partly a collective achievement that the covenant framework simply asks to be distributed honestly.</text:p>
      <text:p text:style-name="Text_20_body"><text:span text:style-name="Strong_20_Emphasis">It requires that the rules of the economy are neutral.</text:span></text:p>
      <text:p text:style-name="Text_20_body">But they aren't. They were written by people with interests, enforced by institutions with interests, and modified continuously by those with the power to modify them. The rules that govern wages, property, debt, incorporation, taxation — these are political choices that benefit some people systematically over others. Calling the outcome of those rules natural or neutral is a mystification of what is actually a set of choices that could have been made differently.</text:p>
      <text:p text:style-name="Text_20_body"><text:span text:style-name="Strong_20_Emphasis">And then the farcical outcomes.</text:span></text:p>
      <text:p text:style-name="Text_20_body">Follow the nothing-is-owed position to its logical conclusion. A person works full time, follows every rule, contributes honestly, and cannot afford food or shelter. What does the nothing-is-owed position say to them?</text:p>
      <text:p text:style-name="Text_20_body">That's your problem.</text:p>
      <text:p text:style-name="Text_20_body"><text:soft-page-break/>And then what? They starve? They become homeless? They turn to crime because the legitimate economy failed them? They become dependent on charity that may or may not materialize? They watch their children go hungry while working sixty hours a week?</text:p>
      <text:p text:style-name="Text_20_body">Every one of those outcomes generates enormous costs — human costs, social costs, economic costs — that get distributed across the community anyway. The person who can't afford healthcare still shows up in the emergency room. The person who can't afford housing still exists somewhere. The community pays for these outcomes one way or another. The nothing-is-owed position doesn't eliminate the costs. It just ensures they're paid in the most wasteful, cruel, and socially destructive way possible.</text:p>
      <text:p text:style-name="Text_20_body">There's also a stability argument that conservatives used to make before it became unfashionable. A community that systematically breaks its covenant with its members produces people with no stake in the system. People with no stake in the system have no reason to maintain it. The breakdown of social trust, the rise of political extremism, the collapse of civic participation — these are the predictable outcomes of a covenant systematically broken at scale. You cannot ask people to believe in and maintain institutions that have demonstrably failed them.</text:p>
      <text:p text:style-name="Text_20_body">Which is actually the Tainter argument applied domestically. Complexity that cannot justify its costs to the people bearing them loses legitimacy. And legitimacy lost is very hard to recover.</text:p>
      <text:p text:style-name="Text_20_body">The nothing-is-owed position isn't just morally wrong within your framework. It's strategically catastrophic for the people who benefit most from the current arrangement. You would think enlightened self-interest would produce a different conclusion. The fact that it hasn't tells you something about how thoroughly short-term thinking has captured American institutional life.</text:p>
      <text:p text:style-name="Text_20_body"><text:span text:style-name="Emphasis"/></text:p>
      <text:p text:style-name="Text_20_body"><text:span text:style-name="Emphasis">---------------------------------------------------------------</text:span></text:p>
      <text:p text:style-name="Text_20_body"><text:span text:style-name="Emphasis"/></text:p>
      <text:p text:style-name="Text_20_body"><text:span text:style-name="Emphasis">Community participation is not truly optional for human beings — we are social creatures who require community for survival and meaning. Therefore the ask to participate carries genuine moral weight that purely contractual logic cannot capture.</text:span></text:p>
      <text:p text:style-name="Text_20_body">The community actively solicits participation — through socialization, institutions, explicit cultural promises. That active solicitation strengthens the obligation considerably.</text:p>
      <text:p text:style-name="Text_20_body">The minimum return on participation is basic subsistence — not wealth, not reward proportional to contribution, just the material conditions under which a person can exist with dignity. That's an extraordinarily modest ask.</text:p>
      <text:p text:style-name="Text_20_body">The current American economy systematically fails to honor that ask through specific, identifiable, non-accidental mechanisms — financialization of housing, healthcare, education, and the growing gap between productivity and wages.</text:p>
      <text:p text:style-name="Text_20_body">The nothing-is-owed critique collapses under examination because it requires premises that are empirically false — that people arrive at their positions purely through their own choices, that success is purely individual achievement, that economic rules are neutral — and because following it to its <text:soft-page-break/>conclusion produces outcomes that are both morally monstrous and strategically catastrophic even for those who benefit from the current arrangement.</text:p>
      <text:p text:style-name="Text_20_body">That's a foundation that can support everything the Society builds on top of it — the internal economy, the kin currency, the obligated divisions, the subsistence guarantee.</text:p>
      <text:p text:style-name="Text_20_body"><text:span text:style-name="Emphasis"/></text:p>
      <text:p text:style-name="Text_20_body"><text:span text:style-name="Emphasis"/></text:p>
      <text:p text:style-name="Horizontal_20_Line"/>
      <text:p text:style-name="Text_20_body"><text:span text:style-name="Strong_20_Emphasis">Why It Is True</text:span></text:p>
      <text:p text:style-name="Text_20_body">An economy is not a natural phenomenon. It is not weather or gravity — something that exists independently of human choice and simply must be endured. An economy is a set of arrangements that communities build to organize contribution and distribute what contribution produces. Like all human arrangements it reflects choices. And choices carry obligations.</text:p>
      <text:p text:style-name="Text_20_body">The covenant at the heart of economic life is not complicated. It does not require elaborate theory to identify. It is implicit in the act of asking someone to participate. When a community says — show up, work, contribute, follow the rules, be part of this — it is making a promise. The promise is that participation will be meaningful. That honest work will produce a life. That the person who gives their time and labor and presence to the community's productive life will receive in return the means to live decently within it.</text:p>
      <text:p text:style-name="Text_20_body">This covenant is not between worker and market. Markets are mechanisms. They optimize for price. They make no promises and bear no obligations. The covenant is between the community and its members. The community is the moral actor. The economy is simply the primary instrument through which the community either keeps or breaks the promise it has made.</text:p>
      <text:p text:style-name="Text_20_body">When a person can work honestly — can show up every day, do the job, follow the rules, give what is asked — and still be unable to afford rent, food, healthcare, the basic conditions of a decent life — the covenant has been broken. Not by the market. By the community that built the market and tolerates its failures. The worker has kept their end. The community has not kept its.</text:p>
      <text:p text:style-name="Horizontal_20_Line"/>
      <text:p text:style-name="Text_20_body"><text:span text:style-name="Strong_20_Emphasis">An American Tradition</text:span></text:p>
      <text:p text:style-name="Text_20_body">The covenant has deep roots in American life, and so does its violation.</text:p>
      <text:p text:style-name="Text_20_body">The early republic was organized around an ideal that Thomas Jefferson articulated most clearly — the yeoman farmer, the person whose honest labor on their own land produced genuine independence. The ideal was never universally available and was built on dispossession that violated everything it claimed to value. But the underlying principle was sound and resonant: that a person who worked honestly should be able to stand on their own ground and participate fully in the life of their community. Work and dignity and independence were understood as inseparable. The covenant was woven into the founding vision of what American life was supposed to be.</text:p>
      <text:p text:style-name="Text_20_body"><text:soft-page-break/>The labor movement of the late nineteenth and early twentieth centuries was essentially a covenant enforcement movement. Working people who had kept their end of the bargain — who showed up, did dangerous work, built the industrial economy with their bodies — looked at what they received in return and named it a betrayal. The language of the labor movement was explicitly covenant language: a fair day's work for a fair day's pay. Not charity. Not redistribution. A kept promise. The strikes and the organizing and the legislation that followed were the response of people who understood that the covenant was real and that its violation was not an impersonal market outcome but a moral failure.</text:p>
      <text:p text:style-name="Text_20_body">The New Deal represented the most explicit federal acknowledgment in American history that the covenant had broken at scale. When a third of the workforce was unemployed and honest people who had done nothing wrong were losing everything, the Roosevelt administration did not tell them they should have made better choices. It acknowledged that the arrangements had failed and that the community — in this case the national community — had an obligation to repair them. Whatever one thinks of the specific programs, the underlying premise was exactly right: the community bears responsibility for whether the covenant holds.</text:p>
      <text:p text:style-name="Text_20_body">The postwar period from roughly 1945 to 1975 was the closest America has come to actually keeping the covenant broadly. Productivity rose and wages rose with it. A person with a high school education and a willingness to work could buy a house, raise a family, send children to college, retire with dignity. The covenant felt real because it was real — the arrangements actually delivered on the promise for a wider range of people than at any previous point in American history. That period is what most Americans over sixty mean when they talk about what America used to be. They are not wrong that something has been lost. They are describing a broken covenant.</text:p>
      <text:p text:style-name="Horizontal_20_Line"/>
      <text:p text:style-name="Text_20_body"><text:span text:style-name="Strong_20_Emphasis">The Current Moment</text:span></text:p>
      <text:p text:style-name="Text_20_body">Around 1970 something broke and has not been repaired.</text:p>
      <text:p text:style-name="Text_20_body">Productivity — the measure of how much value American workers produce per hour — has continued to rise for fifty years. Wages for most workers have not kept pace. The gains from the growth of the American economy have flowed overwhelmingly to the top while the people who produce that growth have received a shrinking share. This is not a natural phenomenon. It is the result of specific choices — about labor law, about trade policy, about taxation, about the relative power of workers and capital — that were made by specific people and institutions. The covenant did not break on its own. It was broken.</text:p>
      <text:p text:style-name="Text_20_body">The consequences are visible everywhere. A person working full time at the median American wage cannot afford a two-bedroom apartment in the majority of American counties. Medical debt is the leading cause of personal bankruptcy in the wealthiest country in human history. Retirement security for working people has been systematically dismantled and replaced with arrangements that transfer risk from institutions to individuals. The cost of the things that used to constitute a decent middle class life — housing, healthcare, education, childcare — has risen far faster than wages for decades.</text:p>
      <text:p text:style-name="Text_20_body">The geographic dimension is particularly stark. Entire communities — small cities, rural counties, post-industrial towns — have been economically hollowed out. The factories closed. The main streets <text:soft-page-break/>emptied. The young people left because there was nothing to stay for. The people who remained did everything right by the covenant's terms. They showed up. They worked. They stayed. The community did not hold up its end. And then they were told, by people in comfortable positions in prosperous places, that their situation was the result of their own choices and that they should retrain for the new economy. That response — which is still the default response of most institutions to communities in economic distress — is a covenant violation compounded by contempt.</text:p>
      <text:p text:style-name="Horizontal_20_Line"/>
      <text:p text:style-name="Text_20_body"><text:span text:style-name="Strong_20_Emphasis">The Demand It Makes</text:span></text:p>
      <text:p text:style-name="Text_20_body">This axiom does not specify a mechanism. It does not prescribe a particular economic policy or system. Reasonable people disagree about the best ways to ensure that honest work produces a decent life and the axiom takes no position on those disagreements.</text:p>
      <text:p text:style-name="Text_20_body">What it does is establish the standard against which economic arrangements must be evaluated. The question is not whether the market cleared. The question is whether the covenant held. Did the person who worked honestly end up able to live? If yes, the arrangement is working. If no, something needs to change — not because of ideology but because a promise was made and broken.</text:p>
      <text:p text:style-name="Text_20_body">The Resolute Society takes this seriously at the community level. We cannot fix the national economy. We can build communities in which the covenant is real — in which contribution is recognized, in which members who need support receive it, in which the arrangements we build together actually deliver on the promise that participation will be meaningful. That is a commitment we make to every person who joins us. We will hold up our en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5T21:43:21.023267674</meta:creation-date>
    <meta:generator>LibreOffice/24.2.7.2$Linux_X86_64 LibreOffice_project/420$Build-2</meta:generator>
    <dc:date>2026-06-17T11:51:33.272436661</dc:date>
    <meta:editing-duration>PT3M14S</meta:editing-duration>
    <meta:editing-cycles>4</meta:editing-cycles>
    <meta:document-statistic meta:table-count="0" meta:image-count="0" meta:object-count="0" meta:page-count="7" meta:paragraph-count="68" meta:word-count="3007" meta:character-count="19517" meta:non-whitespace-character-count="16518"/>
  </office:meta>
</office:document-meta>
</file>