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Text_20_body"><text:span text:style-name="Strong_20_Emphasis">On the Fifth Axiom: Community is constitutive of the person.</text:span></text:p>
      <text:p text:style-name="Text_20_body"><text:span text:style-name="Emphasis">We do not arrive in the world as finished individuals who then choose association. We become who we are through relationship, language, place, and belonging. Community is not a tool persons use — it is the condition in which persons become possible.</text:span></text:p>
      <text:p text:style-name="Text_20_body"><text:span text:style-name="Emphasis"/></text:p>
      <text:p text:style-name="Text_20_body"><text:span text:style-name="Emphasis"/></text:p>
      <text:p text:style-name="Text_20_body"><text:span text:style-name="Emphasis">----------------------------------------------------</text:span></text:p>
      <text:p text:style-name="Text_20_body"><text:span text:style-name="Emphasis"/></text:p>
      <text:p text:style-name="Text_20_body"><text:span text:style-name="Emphasis">This isn't primarily a philosophical assertion that requires abstract argument. It's a description of what actually happens to human beings when you observe them carefully.</text:span></text:p>
      <text:p text:style-name="Text_20_body">The evidence is overwhelming and comes from multiple independent directions.</text:p>
      <text:p text:style-name="Text_20_body"><text:span text:style-name="Strong_20_Emphasis">Developmental psychology</text:span></text:p>
      <text:p text:style-name="Text_20_body">Children who are deprived of genuine human relationship in early life — the Romanian orphanage studies are the most documented case — don't just suffer emotionally. They fail to develop cognitively, linguistically, and neurologically in ways that are sometimes permanent. The self doesn't just struggle without community. It fails to fully form. The brain literally develops differently in the presence or absence of consistent human relationship.</text:p>
      <text:p text:style-name="Text_20_body"><text:span text:style-name="Strong_20_Emphasis">Language</text:span></text:p>
      <text:p text:style-name="Text_20_body">You cannot have a self in any meaningful sense without language. And language is irreducibly social — it cannot be invented by a single person, it cannot be learned in isolation, it carries within it the entire accumulated thought of the community that produced it. Every thought you think, you think in words you didn't invent, using concepts you inherited, within a framework of meaning that preceded you by centuries. The most private interior experience is shaped by social inheritance.</text:p>
      <text:p text:style-name="Text_20_body"><text:span text:style-name="Strong_20_Emphasis">Identity</text:span></text:p>
      <text:p text:style-name="Text_20_body">Who you understand yourself to be — your name, your roles, your values, your sense of what matters — all of this is formed in relationship. You know yourself partly through how others see you, through the roles you occupy in relation to others, through the stories your community tells about who you are and where you come from. The self is not discovered in solitude. It's constructed in relationship.</text:p>
      <text:p text:style-name="Text_20_body"><text:span text:style-name="Strong_20_Emphasis">Neuroscience</text:span></text:p>
      <text:p text:style-name="Text_20_body">The human brain is a social organ in a literal sense. It has dedicated architecture for reading other minds, for tracking social relationships, for responding to social inclusion and exclusion. Social pain activates the same neural pathways as physical pain. Chronic loneliness produces measurable physiological effects — elevated cortisol, disrupted sleep, accelerated aging, increased mortality risk <text:soft-page-break/>comparable to smoking fifteen cigarettes a day. The body treats social disconnection as a life threatening condition because evolutionarily it was.</text:p>
      <text:p text:style-name="Text_20_body"><text:span text:style-name="Strong_20_Emphasis">The feral child cases</text:span></text:p>
      <text:p text:style-name="Text_20_body">Every documented case of a child raised without human community — Victor of Aveyron, Genie, Oxana Malaya — shows the same pattern. Language doesn't develop normally. Social cognition doesn't develop normally. The capacity for relationship is severely impaired. These cases are tragic precisely because they reveal how much of what we consider essentially human is actually a social achievement rather than a biological given.</text:p>
      <text:p text:style-name="Text_20_body">So the axiom isn't really contestable on empirical grounds. The libertarian picture of the pre-social individual choosing association is not just philosophically questionable. It's factually wrong. It describes a creature that doesn't exist.</text:p>
      <text:p text:style-name="Text_20_body">Which means the argument against atomization doesn't need to be primarily normative — you shouldn't atomize because community is good. It can be primarily descriptive — atomization is based on a false picture of what persons are. You cannot successfully organize a society around a fiction about human nature without paying a price.</text:p>
      <text:p text:style-name="Text_20_body">And America is paying that price right now in ways that are becoming impossible to ignore. The loneliness epidemic. The collapse of civic participation. The erosion of social trust. The rise of political extremism fed by social isolation. These aren't separate problems with separate causes. They're symptoms of a society organized around a false anthropology.</text:p>
      <text:p text:style-name="Text_20_body"><text:span text:style-name="Emphasis">------------------------------------------------</text:span></text:p>
      <text:p text:style-name="Text_20_body"><text:span text:style-name="Emphasis">The empirical layer is almost unassailable. Developmental psychology, neuroscience, linguistics, the feral child cases, the Romanian orphanage studies — all of it converging on the same conclusion from independent directions. The pre-social autonomous individual is a fiction. Persons are constituted by community. This isn't a philosophical preference. It's a description of what humans actually are.</text:span></text:p>
      <text:p text:style-name="Text_20_body">The critical layer asks why we persist in the fiction despite the evidence. And the answer is that the fiction is useful to specific interests, was deliberately cultivated and funded over decades, and meets a genuine psychological need in a culture that has equated worth with self-sufficiency and dependence with weakness.</text:p>
      <text:p text:style-name="Text_20_body">Which means the Society is doing two things simultaneously with this axiom.</text:p>
      <text:p text:style-name="Text_20_body">Making an intellectual claim that is empirically well grounded and philosophically serious. And building an experiential alternative — a actual community in which the truth of the claim becomes livable rather than just arguable. Where interdependence is the norm rather than the exception. Where needing others is what persons are rather than evidence of personal failure.</text:p>
      <text:p text:style-name="Text_20_body">The intellectual foundation matters. But the lived experience is the more powerful argument. People don't abandon deeply held fictions because they're shown better arguments. They abandon them when they have experiences that make the fiction feel obviously inadequate.</text:p>
      <text:p text:style-name="Text_20_body"><text:span text:style-name="Emphasis"/></text:p>
      <text:p text:style-name="Text_20_body"><text:soft-page-break/><text:span text:style-name="Emphasis"/></text:p>
      <text:p text:style-name="Horizontal_20_Line"/>
      <text:p text:style-name="Text_20_body"><text:span text:style-name="Strong_20_Emphasis">Why It Is True</text:span></text:p>
      <text:p text:style-name="Text_20_body">The dominant story modern American culture tells about the self goes something like this: you are born as yourself. You have a nature, a set of preferences, a character that is essentially yours. You then move through the world — choosing relationships, choosing associations, choosing how much of yourself to share and with whom. Community, on this account, is something you opt into when it serves you and opt out of when it doesn't. The self is prior. Association is optional.</text:p>
      <text:p text:style-name="Text_20_body">This story is false. Not partially false — false at its foundation.</text:p>
      <text:p text:style-name="Text_20_body">Consider language. You did not invent the language you think in. You received it from the people around you before you had any capacity to choose or refuse it. And language is not merely a communication tool you use to express thoughts you would have had anyway. Language is the medium of thought itself. The concepts you use to understand your experience, the categories you use to organize the world, the very capacity for self-reflection — all of it is structured by a language that preceded you and that you share with a community. You cannot think your way outside of it. The self that thinks is already a social product before it thinks its first thought.</text:p>
      <text:p text:style-name="Text_20_body">The same is true of values, of taste, of what feels meaningful or beautiful or worth doing. These do not arise spontaneously from some pre-social inner nature. They are formed through participation — through watching what the people around you treat as important, through being praised and corrected, through absorbing the stories and practices and rituals of the communities you grow up inside. By the time you are old enough to reflect on your values and choose which ones to keep, you are already a person shaped by community. The choosing self was made by the community it is now choosing about.</text:p>
      <text:p text:style-name="Text_20_body">None of this means individuals are merely products of their environments with no capacity for genuine agency — Axiom VII addresses that directly. It means the self is not prior to community. It is produced by community. The question is never whether community will shape you. It is which community, in what ways, toward what kind of person.</text:p>
      <text:p text:style-name="Text_20_body">The person raised in a community that values honesty, craftsmanship, mutual obligation, and genuine belonging will become a different person than someone raised in a community organized around consumption, competition, suspicion, and isolation. Not because of genetics or individual character but because persons are made by the conditions in which they develop. This is not a comfortable fact for a culture that wants to believe outcomes are purely the result of individual choice. But it is a fact.</text:p>
      <text:p text:style-name="Horizontal_20_Line"/>
      <text:p text:style-name="Text_20_body"><text:span text:style-name="Strong_20_Emphasis">An American Tradition</text:span></text:p>
      <text:p text:style-name="Text_20_body">There is a version of American culture that prizes radical individualism above all else — the lone pioneer, the self-made man, the rugged individual who needs nothing from anyone. This version is a myth, and Americans have always known it was a myth even when they celebrated it.</text:p>
      <text:p text:style-name="Text_20_body"><text:soft-page-break/>Alexis de Tocqueville arrived in America in 1831 expecting to find a society of isolated individuals pursuing their private interests. What he found instead astonished him. Americans, he wrote, were the most relational people he had ever encountered. They formed associations constantly and for every conceivable purpose — civic associations, religious associations, political associations, mutual aid societies, literary clubs, fire companies, agricultural cooperatives. Where a Frenchman would wait for the government and an Englishman would wait for the aristocracy, Tocqueville observed, an American would immediately call a meeting and form a committee. The instinct for association was not incidental to American character. It was central to it.</text:p>
      <text:p text:style-name="Text_20_body">What Tocqueville was observing was a society that understood intuitively what this axiom states explicitly — that persons are made and sustained by their connections to others, and that a community of genuinely capable self-governing people requires the constant cultivation of those connections. The township, the congregation, the volunteer fire company, the grange — these were not hobbies. They were the infrastructure of personhood. They were where Americans became capable of the self-governance the republic required of them.</text:p>
      <text:p text:style-name="Text_20_body">The barn raising captures something essential about this tradition. When a family's barn burned down, the community didn't send a check. They showed up with tools and food and spent a day building it back. The transaction was not economic — it operated outside the market entirely. It was an expression of mutual obligation so deeply embedded in community life that it required no negotiation, no contract, no calculation of return. You showed up because that was what membership meant. And in showing up you were not just helping a neighbor — you were maintaining the web of relationship and obligation that made the community a community rather than a collection of households in proximity.</text:p>
      <text:p text:style-name="Text_20_body">That web has been fraying for a long time.</text:p>
      <text:p text:style-name="Horizontal_20_Line"/>
      <text:p text:style-name="Text_20_body"><text:span text:style-name="Strong_20_Emphasis">The Current Moment</text:span></text:p>
      <text:p text:style-name="Text_20_body">In 2000 the political scientist Robert Putnam published a book called Bowling Alone that documented something Americans were already feeling but hadn't seen named clearly. Participation in every form of civic and associational life — clubs, churches, unions, political organizations, bowling leagues, dinner parties — had been declining steadily for decades. Americans were becoming less connected to each other in almost every measurable way. The social infrastructure that Tocqueville had marveled at was quietly collapsing.</text:p>
      <text:p text:style-name="Text_20_body">That trend has accelerated sharply since then. The surgeon general of the United States has declared loneliness a public health epidemic. Surveys consistently find that significant portions of Americans report having no close friends — people they could call in a genuine crisis. The average American spends more time alone than at any point in recorded history. Young people who have grown up entirely inside digital social environments report feeling more isolated, not less, than generations that socialized primarily in person.</text:p>
      <text:p text:style-name="Text_20_body">The consequences of this are not merely emotional. They are physical. Chronic loneliness produces measurable deterioration in physical health — comparable in its effects to smoking fifteen cigarettes a day. It produces cognitive decline. It produces the kind of despair that shows up in the mortality <text:soft-page-break/>statistics as deaths of despair — suicide, overdose, alcohol-related illness — that have driven down American life expectancy for the first time since the influenza pandemic of 1918.</text:p>
      <text:p text:style-name="Text_20_body">What has replaced genuine community is a simulation of it. Social media platforms offer the vocabulary of connection — friends, followers, likes, shares — while delivering something categorically different. Digital connection optimized for engagement is not the same thing as the embodied, reciprocal, obligation-bearing relationships that actually make persons. You cannot raise a barn on the internet. You cannot sit with someone who is dying through a screen. You cannot transmit craft or wisdom or genuine care through an algorithm. The simulation has colonized the space where community used to be and left people with the feeling of connection and the reality of isolation.</text:p>
      <text:p text:style-name="Text_20_body">The result is a population of people who are, in the precise sense this axiom means, being deprived of something essential to what persons are. Not through malice but through a slow structural failure that nobody designed and nobody is accountable for. The architecture of modern American life — the car-dependent suburbs, the collapse of third places, the replacement of local institutions with national platforms, the economic pressures that leave people with no time or energy for association — has systematically dismantled the conditions in which persons are made and sustained.</text:p>
      <text:p text:style-name="Horizontal_20_Line"/>
      <text:p text:style-name="Text_20_body"><text:span text:style-name="Strong_20_Emphasis">The Demand It Makes</text:span></text:p>
      <text:p text:style-name="Text_20_body">This axiom demands that we take the conditions of personhood seriously — not just as a matter of individual wellbeing but as a fundamental community responsibility.</text:p>
      <text:p text:style-name="Text_20_body">If persons are made by community, then the quality of community is not a private matter. It is not something individuals sort out for themselves through lifestyle choices. It is something communities are responsible for cultivating and protecting. The decision to build a neighborhood without sidewalks, a town without gathering places, an economy that leaves people with no time for association — these are not neutral choices. They are choices about what kind of persons the community will produce.</text:p>
      <text:p text:style-name="Text_20_body">The Resolute Society exists in part as a direct response to this failure. We are not trying to add another organization to people's already overextended lives. We are trying to rebuild the kind of genuine associational life that Tocqueville recognized as the foundation of American self-governance — the kind of community in which persons are actually made, sustained, and capable of the full life that isolation forecloses.</text:p>
      <text:p text:style-name="Text_20_body">Tocqueville warned that the great danger of democratic societies was not tyranny from above but a slow withdrawal of citizens into private life — each person enclosed in the circle of family and a few friends, losing interest in the broader community, leaving public life to whoever wanted it. He called it soft despotism. It is a precise description of where we are. The remedy he identified was the same one we are attempting: the cultivation of genuine association, the rebuilding of the web of mutual obligation, the recovery of the understanding that persons are not prior to community but produced by it.</text:p>
      <text:p text:style-name="Text_20_body">We build accordingly.</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15T21:46:02.689778176</meta:creation-date>
    <meta:generator>LibreOffice/24.2.7.2$Linux_X86_64 LibreOffice_project/420$Build-2</meta:generator>
    <dc:date>2026-06-17T12:08:58.806689778</dc:date>
    <meta:editing-duration>PT9M47S</meta:editing-duration>
    <meta:editing-cycles>3</meta:editing-cycles>
    <meta:document-statistic meta:table-count="0" meta:image-count="0" meta:object-count="0" meta:page-count="5" meta:paragraph-count="49" meta:word-count="2292" meta:character-count="14950" meta:non-whitespace-character-count="12669"/>
  </office:meta>
</office:document-meta>
</file>