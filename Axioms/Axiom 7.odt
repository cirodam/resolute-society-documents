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Emphasis">Beings capable of suffering have genuine moral standing. They are not objects. They are not resources. They are not instruments for human purposes. The capacity to suffer — to experience pain, fear, deprivation, and the frustration of basic needs — is sufficient to generate real moral obligations toward the being that experiences it, regardless of that being's species, intelligence, or utility to humans.</text:span></text:span></text:p>
      <text:p text:style-name="Text_20_body"><text:span text:style-name="Emphasis">This standing is distinct from human dignity. It does not admit of the same unconditional equality — the suffering of a chimpanzee and the suffering of an insect are not equivalent moral claims. But neither is it nothing. The spectrum of sentient experience generates a corresponding spectrum of obligation. Where suffering is deep, complex, and socially experienced — as it is in mammals and birds — the obligations are serious and cannot be dismissed without moral cost.</text:span></text:p>
      <text:p text:style-name="Text_20_body"><text:span text:style-name="Emphasis">We have known this and chosen not to act on it. The industrialization of animal suffering at civilizational scale — factory farming, habitat destruction, the systematic erasure of animal experience from economic and political calculation — represents a moral failure whose consequences extend beyond the animals directly harmed. A community that learns to ignore suffering it finds inconvenient to acknowledge does not confine that capacity for ignorance to animals. The habits of moral perception are not compartmentalized. We build a community that sees clearly.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22:01:15.489148300</meta:creation-date>
    <dc:date>2026-06-17T13:10:14.932509136</dc:date>
    <meta:editing-duration>PT10M1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217" meta:character-count="1443" meta:non-whitespace-character-count="1222"/>
  </office:meta>
</office:document-meta>
</file>