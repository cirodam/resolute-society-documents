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paragraph-properties fo:orphans="1"/>
    </style:style>
    <style:style style:name="P2" style:family="paragraph" style:parent-style-name="Text_20_body">
      <style:paragraph-properties fo:margin-left="0in" fo:margin-right="0in" fo:orphans="1" fo:text-indent="0in" style:auto-text-indent="false"/>
    </style:style>
    <style:style style:name="P3" style:family="paragraph" style:parent-style-name="Text_20_body">
      <style:paragraph-properties fo:orphans="1"/>
    </style:style>
    <style:style style:name="P4" style:family="paragraph" style:parent-style-name="Text_20_body">
      <style:paragraph-properties fo:orphan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ood. Let me draft it.</text:p>
      <text:p text:style-name="P1"/>
      <text:p text:style-name="P3"><text:span text:style-name="Strong_20_Emphasis">On the Sixth Axiom: Legitimacy is distinct from legality and cannot be reduced to it.</text:span></text:p>
      <text:p text:style-name="P3"><text:span text:style-name="Emphasis">Authority is legitimate when it flows from genuine consent, serves those subject to it, and remains accountable to them. Legal correctness guarantees none of this. Law derives its claim on conscience from legitimacy, not the reverse. When that claim is absent, compliance may be compelled but it cannot be owed. We build institutions that earn legitimacy rather than merely assume it.</text:span></text:p>
      <text:p text:style-name="P3"><text:span text:style-name="Emphasis"/></text:p>
      <text:p text:style-name="P3"><text:span text:style-name="Emphasis">------------------------------------------------</text:span></text:p>
      <text:p text:style-name="P3"><text:span text:style-name="Emphasis"><text:span text:style-name="Strong_20_Emphasis">The consent tradition</text:span></text:span></text:p>
      <text:p text:style-name="Text_20_body">Locke argued that political authority derives from the consent of the governed. Not historical consent, not implied consent, not the consent of ancestors — genuine ongoing consent of actual living people. Government exists to serve those who authorize it. When it fails to do so it forfeits its claim on their obedience.</text:p>
      <text:p text:style-name="Text_20_body">This is the tradition that flows directly into the Declaration of Independence. Governments are instituted among men to secure certain rights. When they become destructive of those ends it is the right of the people to alter or abolish them. That's not radical language imported from outside American tradition. It's the founding document.</text:p>
      <text:p text:style-name="Text_20_body"><text:span text:style-name="Strong_20_Emphasis">The accountability tradition</text:span></text:p>
      <text:p text:style-name="Text_20_body">Authority that cannot be held accountable is not legitimate authority — it's just power. The entire architecture of constitutional democracy — separation of powers, judicial review, free press, regular elections — exists to make authority accountable. When those mechanisms are captured or corrupted, the accountability that legitimizes authority disappears even if the legal forms remain intact.</text:p>
      <text:p text:style-name="Text_20_body"><text:span text:style-name="Strong_20_Emphasis">The service tradition</text:span></text:p>
      <text:p text:style-name="Text_20_body">Authority is legitimate when it genuinely serves those subject to it. This is older than liberal democracy — it appears in medieval political theory, in Confucian political philosophy, in virtually every serious tradition of thinking about authority. The ruler who serves only himself is a tyrant regardless of how he came to power. The institution that serves only its own perpetuation has lost its reason for existing.</text:p>
      <text:p text:style-name="Text_20_body">All three traditions converge on the same test. Does this authority flow from genuine consent? Does it serve those subject to it? Can it be held accountable by them?</text:p>
      <text:p text:style-name="Text_20_body">Applied to contemporary democratic governments captured by corporate interests — the answer to all three is increasingly no.</text:p>
      <text:p text:style-name="Text_20_body">Consent is manufactured through sophisticated propaganda, attention manipulation, and the systematic narrowing of political choices to options that don't threaten corporate interests. Genuine consent requires genuine alternatives and genuine information. Neither is reliably available.</text:p>
      <text:p text:style-name="Text_20_body"><text:soft-page-break/>Service has been redirected from citizens to capital in the specific ways you identified. The policy record is documentable. On wages, housing, healthcare, data privacy, attention colonization, financial regulation — governments have consistently chosen corporate interests over citizen welfare when the two conflicted.</text:p>
      <text:p text:style-name="Text_20_body">Accountability mechanisms have been captured. Regulatory agencies are staffed by people from the industries they regulate and return to those industries afterward. Campaign finance systems allow capital to effectively purchase political outcomes. The revolving door between government and corporate lobbying has made accountability largely nominal.</text:p>
      <text:p text:style-name="Text_20_body">Which generates a conclusion the axiom states plainly. Compliance may be compelled — the state retains coercive power regardless of legitimacy — but it cannot be owed. The moral obligation that legitimate authority generates is absent when legitimacy is absent.</text:p>
      <text:p text:style-name="Text_20_body">And this is where the Society's response becomes clear.</text:p>
      <text:p text:style-name="Text_20_body">You cannot restore legitimacy to captured institutions from the outside, at least not quickly or reliably. The capture is too deep, the interests too entrenched, the mechanisms of accountability too compromised.</text:p>
      <text:p text:style-name="Text_20_body">What you can do is build institutions that actually earn legitimacy — that genuinely consent, genuinely serve, genuinely account to their members. Not as a replacement for democratic government in the long run. But as a demonstration that legitimate institutions are possible, and as a base of genuine community that doesn't depend on captured institutions to survive.</text:p>
      <text:p text:style-name="P3"><text:span text:style-name="Emphasis"/></text:p>
      <text:p text:style-name="P3"><text:span text:style-name="Emphasis"/></text:p>
      <text:p text:style-name="P3"><text:span text:style-name="Emphasis"/></text:p>
      <text:p text:style-name="P3"><text:span text:style-name="Emphasis"/></text:p>
      <text:p text:style-name="P3"><text:span text:style-name="Emphasis"/></text:p>
      <text:p text:style-name="P3"><text:span text:style-name="Emphasis"/></text:p>
      <text:p text:style-name="P3"><text:span text:style-name="Emphasis"/></text:p>
      <text:p text:style-name="P3"><text:span text:style-name="Emphasis"/></text:p>
      <text:p text:style-name="P3"><text:span text:style-name="Emphasis"/></text:p>
      <text:p text:style-name="P3"><text:span text:style-name="Emphasis"/></text:p>
      <text:p text:style-name="P3"><text:span text:style-name="Emphasis"/></text:p>
      <text:p text:style-name="P3"><text:span text:style-name="Emphasis"/></text:p>
      <text:p text:style-name="P3"><text:span text:style-name="Emphasis"/></text:p>
      <text:p text:style-name="P1"/>
      <text:p text:style-name="P3"><text:span text:style-name="Strong_20_Emphasis">Why It Is True</text:span></text:p>
      <text:p text:style-name="P3"><text:soft-page-break/>Power and legitimacy are not the same thing. This distinction is simple to state and difficult to live with because it means that legal correctness — the fact that something is permitted or required by law — does not settle the question of whether it is right or whether it deserves our conscience's assent.</text:p>
      <text:p text:style-name="P3">Power compels. A government with sufficient force can make people comply with almost anything. History is full of examples. But compliance extracted by force is categorically different from the willing assent of people who recognize an authority as genuinely theirs — as flowing from their consent, serving their interests, and remaining answerable to them. The first is submission. The second is legitimacy. They look similar from the outside and feel completely different from the inside.</text:p>
      <text:p text:style-name="P3">The test of legitimate authority is not whether it has the power to enforce its commands. It is whether it has earned the right to make them. That right flows from three conditions: genuine consent of those subject to it, genuine service to those subject to it, and genuine accountability to those subject to it. When all three are present authority has a legitimate claim on conscience. When they are absent it has only force. Force can compel behavior. It cannot compel genuine obligation.</text:p>
      <text:p text:style-name="P3">This is not an argument for lawlessness. Laws serve essential functions even when imperfect and even when the institutions that produce them are compromised. The practical wisdom of living in a complex society requires working within legal structures whose legitimacy is incomplete. But practical compliance is different from moral endorsement. We can follow a law without pretending it deserves our conscience's full assent. We can work within institutions without pretending they have earned what they assume.</text:p>
      <text:p text:style-name="P1"/>
      <text:p text:style-name="P3"><text:span text:style-name="Strong_20_Emphasis">An American Tradition</text:span></text:p>
      <text:p text:style-name="P3">The American tradition on this question is unusually rich because the country was founded on a legitimacy argument.</text:p>
      <text:p text:style-name="P3">The Declaration of Independence does not claim that Britain lacks the power to govern the colonies. It claims that Britain has forfeited the legitimate authority to do so. The specific grievances — taxation without representation, the quartering of soldiers, the suspension of representative assemblies — are all legitimacy failures by the standard this axiom names. The crown was not serving those subject to it. It was not accountable to them. Whatever legal correctness it could claim was irrelevant. The colonists were not arguing about law. They were arguing about legitimacy.</text:p>
      <text:p text:style-name="P3">The abolitionist movement made the identical argument about slavery a century later. Slavery was entirely legal. It was protected by the Constitution, enforced by federal law, upheld by the Supreme Court. Its legal correctness was not in dispute. What the abolitionists argued — and what history has confirmed — was that legal correctness meant nothing in the face of a system that treated human beings as property. Frederick Douglass did not argue that slavery was illegal. He argued that it was a moral atrocity that no legal framework could legitimize. The law derived its claim on conscience from justice, not the reverse. Where justice was absent the law's claim was void.</text:p>
      <text:p text:style-name="P3">Martin Luther King Jr. made the same distinction with philosophical precision in his Letter from Birmingham Jail. There are just laws and unjust laws, he wrote, and a person has not only the right but the obligation to disobey unjust ones — provided they do so openly, lovingly, and with willingness to <text:soft-page-break/>accept the legal consequences. King was not arguing against law. He was arguing that law without legitimacy has no claim on conscience, and that the proper response to illegitimate law is not cynical disregard but principled, accountable resistance. The distinction he drew — between laws that uplift human dignity and laws that degrade it — is exactly the distinction this axiom names.</text:p>
      <text:p text:style-name="P1"/>
      <text:p text:style-name="P3"><text:span text:style-name="Strong_20_Emphasis">The Current Moment</text:span></text:p>
      <text:p text:style-name="P3">Something has gone seriously wrong with institutional legitimacy in America and the evidence is everywhere.</text:p>
      <text:p text:style-name="P3">Trust in virtually every major American institution — Congress, the courts, the press, the medical establishment, law enforcement, universities, corporations — has declined sharply and consistently over the past fifty years. This is not a partisan phenomenon. The distrust crosses every demographic and political line. People who disagree about almost everything agree that the institutions nominally serving them are not actually doing so.</text:p>
      <text:p text:style-name="P3">Much of this distrust is earned. Institutions that were supposed to check power have been captured by it. Institutions that were supposed to serve the public have served themselves. Institutions that were supposed to be accountable have insulated themselves from accountability with remarkable ingenuity. The legal correctness of these institutions is not in question. Their legitimacy — by the standard this axiom names — is.</text:p>
      <text:p text:style-name="P3">This creates a genuine danger. When people lose faith in legitimate institutions they do not typically become more rational and self-governing. They become vulnerable to whoever offers the most compelling story about who is responsible for their situation. Illegitimacy creates a vacuum and vacuums get filled. The appropriate response to a legitimacy crisis is not cynicism and not rebellion. It is the patient, difficult work of building institutions that actually earn what they claim.</text:p>
      <text:p text:style-name="P3">That is what the Resolute Society is attempting. We hold this axiom as a commitment about ourselves first. We do not assume our legitimacy. We earn it — through genuine consent of our members, genuine service to those who belong to us, and genuine accountability to the people subject to our decisions. The sortition, the Tribune, the College of Conciliation, the accountability structures — these are not administrative details. They are how we keep the promise this axiom makes.</text:p>
      <text:p text:style-name="P1"/>
      <text:p text:style-name="P3"><text:span text:style-name="Strong_20_Emphasis">The Demand It Makes</text:span></text:p>
      <text:p text:style-name="P3">The demand this axiom makes is double.</text:p>
      <text:p text:style-name="P3">The first demand is honesty — the willingness to look at the institutions we live inside and name clearly which ones have earned their authority and which ones are merely exercising power. That honesty is uncomfortable because it unsettles the convenience of deference. It is easier to comply and call it obligation than to distinguish between the two. The axiom does not allow that comfort.</text:p>
      <text:p text:style-name="P3">The second demand is constructive — if existing institutions have forfeited their legitimacy, the response is not nihilism but building. The Declaration of Independence did not stop at the grievances. It <text:soft-page-break/>established new institutions designed to earn what the old ones had lost. The abolitionist movement did not stop at the critique of slavery. It built the underground railroad, the free black communities, the legal and moral infrastructure of emancipation. The civil rights movement did not stop at naming injustice. It built organizations, coalitions, and ultimately new law.</text:p>
      <text:p text:style-name="P3">We are in that tradition. We name the legitimacy crisis honestly. We do not counsel defiance of institutions whose power remains real and whose collapse would cause genuine harm. And we do the work of building something that earns what it claims. That is the demand. We accept i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5T21:49:18.895743555</meta:creation-date>
    <dc:date>2026-06-17T12:40:59.127451224</dc:date>
    <meta:editing-duration>PT12M29S</meta:editing-duration>
    <meta:editing-cycles>2</meta:editing-cycles>
    <meta:generator>LibreOffice/24.2.7.2$Linux_X86_64 LibreOffice_project/420$Build-2</meta:generator>
    <meta:document-statistic meta:table-count="0" meta:image-count="0" meta:object-count="0" meta:page-count="5" meta:paragraph-count="41" meta:word-count="1738" meta:character-count="11382" meta:non-whitespace-character-count="9657"/>
  </office:meta>
</office:document-meta>
</file>