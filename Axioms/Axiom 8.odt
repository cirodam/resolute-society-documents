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On the Eighth Axiom: Power tends to corrupt and always tends to concentrate.</text:span></text:p>
      <text:p text:style-name="Text_20_body"><text:span text:style-name="Emphasis">This is not cynicism — it is the most consistently documented pattern in human history. Those who hold power tend to use it in ways that serve themselves. Institutions left unchecked tend toward self-service. Concentrated power tends toward more concentrated power regardless of the intentions of those who hold it. The incentive structures that power creates are more powerful than individual virtue. No founding intention however pure protects an institution from these tendencies. Only structure does. We build our institutions with this knowledge at their foundation — not in despair but in clear-eyed determination to resist what power naturally does. Eternal vigilance is not a slogan. It is a structural requirement.</text:span></text:p>
      <text:p text:style-name="Text_20_body"><text:span text:style-name="Emphasis"/></text:p>
      <text:p text:style-name="Text_20_body"><text:span text:style-name="Emphasis"/></text:p>
      <text:p text:style-name="Text_20_body"><text:span text:style-name="Emphasis">Yes. And it's doing something specific — it's the axiom that justifies the entire governance architecture of the Society.</text:span></text:p>
      <text:p text:style-name="Text_20_body">Sortition, term limits, the recall mechanism, the steel-manning requirement, the dissent record, the separation of wealth from governance power, the prohibition on corporate donations, the constitutional permanence of Conciliation — none of these make sense as design choices unless you accept this axiom. They're all structural responses to what power naturally does when left unchecked.</text:p>
      <text:p text:style-name="Text_20_body">But it's also doing something broader than justifying internal governance. It's making a claim about human nature and institutional behavior that has to be grounded carefully because it's the axiom most vulnerable to two opposite misreadings.</text:p>
      <text:p text:style-name="Text_20_body">The first misreading is cynicism — if power always corrupts then nothing is worth building, all institutions are equally bad, and the only honest response is withdrawal or nihilism. The axiom explicitly rejects this but the rejection needs to be grounded not just asserted.</text:p>
      <text:p text:style-name="Text_20_body">The second misreading is naivety — the idea that the right people with the right intentions can overcome these tendencies through virtue alone. This is arguably the more dangerous misreading because it's more seductive. Every authoritarian movement in history has believed it had found the right people with pure enough intentions to be trusted with unchecked power.</text:p>
      <text:p text:style-name="Text_20_body">The axiom is navigating between those two failures. Not despair and not naivety. Clear eyed determination expressed through structure rather than through trust in individuals.</text:p>
      <text:p text:style-name="Text_20_body"><text:span text:style-name="Emphasis"/></text:p>
      <text:p text:style-name="Text_20_body">-------------------------------------------------</text:p>
      <text:p text:style-name="Text_20_body"/>
      <text:p text:style-name="Text_20_body">Every empire. Every church. Every corporation. Every revolutionary movement that became the thing it overthrew. Every institution founded with pure intentions that calcified into self-service over time. The pattern is so consistent across cultures, centuries, and ideological systems that it functions less like a political observation and more like a law of nature.</text:p>
      <text:p text:style-name="Text_20_body"><text:soft-page-break/>Lord Acton's formulation — power tends to corrupt, absolute power corrupts absolutely — is famous precisely because it's immediately recognizable to virtually everyone who encounters it. It matches what people observe in their own lives at every scale. The neighborhood association that becomes a fiefdom. The union leadership that stops serving members. The startup with a mission that becomes indistinguishable from what it disrupted. The church that preaches humility and builds palaces.</text:p>
      <text:p text:style-name="Text_20_body">The mechanism is worth naming precisely though because it's not primarily about moral failure.</text:p>
      <text:p text:style-name="Text_20_body">It's about incentive structures.</text:p>
      <text:p text:style-name="Text_20_body">Power creates incentives that are more powerful than individual virtue in most people most of the time. When holding power benefits you, you unconsciously begin making decisions that preserve and extend that power while genuinely believing you're serving the institution's mission. The self-serving decision and the mission-serving decision start to feel identical because the person making them needs them to be identical. This isn't hypocrisy exactly. It's something more insidious — the genuine corruption of judgment by interest.</text:p>
      <text:p text:style-name="Text_20_body">Which is why the axiom says only structure protects against it. You cannot rely on finding virtuous people and trusting them. You have to build systems that make self-serving behavior difficult and accountable behavior rewarding regardless of who occupies the roles.</text:p>
      <text:p text:style-name="Text_20_body">That's what the entire governance architecture of the Society is doing.</text:p>
      <text:p text:style-name="Text_20_body">And there's a specifically American dimension worth naming.</text:p>
      <text:p text:style-name="Text_20_body">The founders understood this axiom intuitively even if they didn't articulate it in these terms. The entire constitutional architecture — separation of powers, checks and balances, federalism, the bill of rights — is a structural response to what they knew power does when unchecked. They were students of history who had watched republics fail and understood that the failure was almost always the same. Power concentrated, accountability eroded, legitimacy collapsed.</text:p>
      <text:p text:style-name="Text_20_body">What they didn't fully anticipate was corporate power — the emergence of private institutions with resources exceeding those of governments, operating outside the constitutional framework designed to check public power. The Society's explicit prohibitions on corporate influence are filling a gap the founders couldn't have foreseen but would have recognized immediately as the same problem in a new form.</text:p>
      <text:p text:style-name="Text_20_body">So the foundation beneath Axiom VIII is essentially the entire historical record of human institutional life. Which is both its greatest strength and its most important implication — if the pattern is this consistent, then no institution, including the Society itself, is immune. The axiom applies reflexively. The Society must be built to resist what it knows power does, including power held by its own founding members.</text:p>
      <text:p text:style-name="Text_20_body">That's what makes the sortition system, the term limits, the recall mechanism, and the constitutional constraints on amendment so important. They're not just good governance practices. They're the Society taking its own axiom seriously enough to build against its own potential corruption.</text:p>
      <text:p text:style-name="Text_20_body"/>
      <text:p text:style-name="Text_20_body"><text:soft-page-break/><text:span text:style-name="Emphasis"/></text:p>
      <text:p text:style-name="Horizontal_20_Line"/>
      <text:p text:style-name="Text_20_body"><text:span text:style-name="Strong_20_Emphasis">Why It Is True</text:span></text:p>
      <text:p text:style-name="Text_20_body">This axiom does not require elaborate argument because most people already know it is true. They have watched it happen. They have watched institutions that were founded with genuine idealism slowly reorient toward the interests of the people running them. They have watched regulators captured by the industries they regulate, watchdogs defanged by the entities they watch, reformers become the thing they set out to reform. The pattern is so consistent across so many domains that explaining it away as coincidence or bad luck requires more credulity than accepting it.</text:p>
      <text:p text:style-name="Text_20_body">The mechanism is not mysterious. Power creates incentive structures that are more powerful than individual virtue. The person who enters an institution with genuine idealism still needs to survive inside it — to build alliances, to avoid enemies, to accumulate the resources and relationships that allow them to operate. Those survival requirements gradually reshape behavior regardless of intention. The institution selects for people who are good at surviving inside it. People who are good at surviving inside it tend to prioritize the institution's interests and their own position within it. Good people placed inside these structures produce self-serving outcomes with remarkable consistency — not because they are bad but because the structure is more powerful than they are.</text:p>
      <text:p text:style-name="Text_20_body">This is not cynicism. Cynicism says nothing can be done. This axiom says something very specific can be done: structure. The incentive structures that power creates can be countered by deliberately designed structural constraints — term limits, rotation, transparency, accountability mechanisms, genuine separation of powers. Individual virtue is not enough. Structure is what holds.</text:p>
      <text:p text:style-name="Horizontal_20_Line"/>
      <text:p text:style-name="Text_20_body"><text:span text:style-name="Strong_20_Emphasis">An American Tradition</text:span></text:p>
      <text:p text:style-name="Text_20_body">The founders understood this axiom as well as any group of political architects in history and built their response to it into the Constitution.</text:p>
      <text:p text:style-name="Text_20_body">James Madison wrote in Federalist No. 51 words that remain the clearest statement of this principle in American political thought: if men were angels no government would be necessary. If angels were to govern men neither external nor internal controls on government would be necessary. In framing a government which is to be administered by men over men the great difficulty lies in this: you must first enable the government to control the governed and in the next place oblige it to control itself. The entire constitutional architecture — separation of powers, checks and balances, bicameralism, federalism, the Bill of Rights — flows from that recognition. The founders were not optimists about power. They were realists who designed for what power actually does rather than what they hoped it would do.</text:p>
      <text:p text:style-name="Text_20_body">Theodore Roosevelt applied the same realism to economic power a century later. The great trusts of the Gilded Age — Standard Oil, the railroad monopolies, the steel combines — had accumulated power on a scale the founders hadn't anticipated and were using it in exactly the ways this axiom predicts: to eliminate competition, to capture regulators, to shape legislation in their own interest, to convert <text:soft-page-break/>economic dominance into political dominance. Roosevelt's trust busting was not anti-business. It was a structural intervention against the natural tendency of concentrated power to concentrate further. He understood that the question was not whether the men running these enterprises were good or bad. The question was what unchecked power does regardless of who holds it.</text:p>
      <text:p text:style-name="Horizontal_20_Line"/>
      <text:p text:style-name="Text_20_body"><text:span text:style-name="Strong_20_Emphasis">The Current Moment</text:span></text:p>
      <text:p text:style-name="Text_20_body">The checking mechanisms the founders designed have been under sustained pressure for decades and many of them are failing.</text:p>
      <text:p text:style-name="Text_20_body">Economic power has concentrated at a pace and scale not seen since the Gilded Age. In sector after sector — finance, media, agriculture, healthcare, technology, retail — the number of dominant firms has collapsed and the market power of the survivors has grown dramatically. The consequences follow the pattern this axiom predicts. Concentrated economic power purchases political influence. Political influence shapes regulation. Shaped regulation protects concentrated economic power from competition. The cycle is self-reinforcing and largely self-concealing — the entities with the most power to shape the information environment also have the most interest in keeping that process invisible.</text:p>
      <text:p text:style-name="Text_20_body">The regulatory capture that Roosevelt warned against has become endemic. Agencies designed to regulate industries in the public interest are routinely staffed by people from those industries, governed by rules those industries helped write, and led by officials who will return to those industries when their public service ends. The legal correctness of these arrangements — Axiom VI — is not in question. Their legitimacy is.</text:p>
      <text:p text:style-name="Text_20_body">The political institutions designed to check each other have been progressively weakened — not by any single actor or party but by the consistent pressure that power exerts toward removing its own constraints. Oversight mechanisms that were supposed to be permanent have proven contingent. Norms that were supposed to be self-enforcing have proven dependent on the goodwill of the people they were meant to constrain. The founders designed for angels and got humans, which is exactly what Madison said would happen and exactly what the structural constraints were supposed to handle. Where those constraints have weakened the results are what the axiom predicts.</text:p>
      <text:p text:style-name="Horizontal_20_Line"/>
      <text:p text:style-name="Text_20_body"><text:span text:style-name="Strong_20_Emphasis">The Demand It Makes</text:span></text:p>
      <text:p text:style-name="Text_20_body">This axiom makes a demand that is uncomfortable for anyone who has ever believed in an institution or a leader: the demand to distrust your own side.</text:p>
      <text:p text:style-name="Text_20_body">It is easy to apply this axiom to institutions and leaders you already distrust. The difficult application is to the institutions and leaders you believe in — to the cause you support, the organization you helped build, the leader whose intentions you trust. The axiom does not make exceptions for good intentions. It does not make exceptions for your side. The incentive structures that power creates operate regardless of ideology. The history of movements that achieved power and then reproduced the pathologies they set out to defeat is long and consistent.</text:p>
      <text:p text:style-name="Text_20_body"><text:soft-page-break/>This is why the Resolute Society's governance architecture is built the way it is. Sortition removes the self-selection of the ambitious. Rotation prevents entrenchment. The Tribune exists to give voice to those the majority might ignore. The College of Conciliation handles conflict without concentrating adjudicative power. These are not expressions of distrust toward our members. They are expressions of realism about what power does to anyone — including us, including the people who built this organization with the best intentions in the world.</text:p>
      <text:p text:style-name="Text_20_body">Eternal vigilance is not a slogan. It is a structural requirement. We build accordingl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2:06:17.074709524</meta:creation-date>
    <dc:date>2026-06-17T12:50:24.515345337</dc:date>
    <meta:editing-duration>PT6M16S</meta:editing-duration>
    <meta:editing-cycles>4</meta:editing-cycles>
    <meta:generator>LibreOffice/24.2.7.2$Linux_X86_64 LibreOffice_project/420$Build-2</meta:generator>
    <meta:document-statistic meta:table-count="0" meta:image-count="0" meta:object-count="0" meta:page-count="5" meta:paragraph-count="39" meta:word-count="1905" meta:character-count="12699" meta:non-whitespace-character-count="10805"/>
  </office:meta>
</office:document-meta>
</file>