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Third Axiom: Our moral obligations extend beyond the present.</text:span></text:p>
      <text:p text:style-name="Text_20_body"><text:span text:style-name="Emphasis">We do not own the present — we hold it in trust. Our moral obligations extend beyond the present moment to those who will come after us. The future is real. Those who will inhabit it have claims on us now, not to build them a better world than we inherited, but to refrain from degrading what they would otherwise naturally receive. We are not licensed to consume their inheritance.</text:span></text:p>
      <text:p text:style-name="Text_20_body"><text:span text:style-name="Emphasis">Nor do we own the earth. We are temporary inhabitants of a living system four billion years in the making — a system of extraordinary complexity and integrity that exists independently of human valuation and cannot be replaced once destroyed. We did not create it. We cannot recreate it. Our relationship to it is not ownership but occupancy — and occupancy carries obligations. We are obligated to the living world not only because future generations depend on it but because it has an integrity that precedes and exceeds any human claim upon it.</text:span></text:p>
      <text:p text:style-name="Text_20_body"><text:span text:style-name="Emphasis">These two obligations converge. To degrade the living systems of the earth is simultaneously to steal from those who come after us and to violate something whose worth exists independently of what any human generation chooses to recognize.</text:span></text:p>
      <text:p text:style-name="Text_20_body"><text:span text:style-name="Emphasis"/></text:p>
      <text:p text:style-name="Text_20_body"><text:span text:style-name="Emphasis"/></text:p>
      <text:p text:style-name="Text_20_body"><text:span text:style-name="Emphasis">You're separating two very different obligations.</text:span></text:p>
      <text:p text:style-name="Text_20_body"><text:span text:style-name="Strong_20_Emphasis">The positive obligation</text:span> — we must build things, create things, produce things for future generations. This is genuinely contestable. It's hard to argue that future people have a claim on us to make their lives better than they would otherwise be. That slides into an infinite regress of obligation that's impossible to fulfill.</text:p>
      <text:p text:style-name="Text_20_body"><text:span text:style-name="Strong_20_Emphasis">The negative obligation</text:span> — we must not destroy or degrade what future generations would naturally inherit. Don't take what isn't yours to take. This is much more defensible and much harder to argue against.</text:p>
      <text:p text:style-name="Text_20_body">The second case maps onto something most people already accept intuitively. If you're the last person alive in a library you don't own, you don't have the right to burn the books just because you've finished reading them. The books belong to whoever comes next. You're a temporary custodian, not an owner.</text:p>
      <text:p text:style-name="Text_20_body">That's the trust metaphor your axiom is already using. We don't own the present. We hold it in trust.</text:p>
      <text:p text:style-name="Text_20_body">And trust law is actually useful here as an analogy. A trustee has specific obligations. They cannot spend the principal for their own benefit. They cannot make decisions that enrich themselves at the expense of the beneficiaries. They are stewards, not owners.</text:p>
      <text:p text:style-name="Text_20_body">The question of who granted the trust is interesting though. In normal trust law there's a grantor. Here there isn't — or the grantor is something like nature, or the accumulated inheritance of human civilization, or simply the fact of continuity between generations.</text:p>
      <text:p text:style-name="Text_20_body"><text:span text:style-name="Emphasis"/></text:p>
      <text:p text:style-name="Text_20_body"><text:span text:style-name="Emphasis">-----------------------------------------------------------</text:span></text:p>
      <text:p text:style-name="Text_20_body"><text:soft-page-break/><text:span text:style-name="Emphasis"/></text:p>
      <text:p text:style-name="Text_20_body"><text:span text:style-name="Emphasis">The ownership claim is actually remarkably thin when you examine it. What would it even mean to own the earth? Ownership normally implies that you created something, or acquired it through legitimate exchange, or that some authority recognized your claim. None of those apply to the planet itself. We arrived here. We found it. We inherited it from four billion years of biological process that had nothing to do with us.</text:span></text:p>
      <text:p text:style-name="Text_20_body">The indigenous critique of Western property concepts is relevant here and worth taking seriously. The idea that land can be owned — truly owned, as a commodity to be used and disposed of at the owner's discretion — is a historically specific and relatively recent idea. Most human cultures across most of human history understood the relationship between humans and land as reciprocal and custodial rather than proprietary. You belong to the land as much as it belongs to you. You have obligations to it, not just rights over it.</text:p>
      <text:p text:style-name="Text_20_body">That's not romanticism. It's a more accurate description of the actual relationship.</text:p>
      <text:p text:style-name="Text_20_body">Because the earth was here before us and will be here after us. We are a brief passage through something vastly older and larger than ourselves. The idea that we own it in any meaningful sense — that we have the right to degrade it to our satisfaction and hand the consequences to whoever comes next — requires a conception of ownership so absolute that it has no real precedent in serious moral philosophy.</text:p>
      <text:p text:style-name="Text_20_body">Even the most robust private property traditions place limits on what you can do with what you own. You can't use your property in ways that harm your neighbors. The future is the ultimate neighbor — always present, never able to speak for itself, perpetually downstream of every decision we make.</text:p>
      <text:p text:style-name="Text_20_body">So the ownership claim collapsets under examination. What's left is something more like what you said earlier — custodianship. Temporary occupancy. We are here for a while. We depend on systems we didn't create and can't replace. We are obligated to pass them forward intact not because future people have some abstract legal claim but because the alternative is theft from people who can't defend themselves against it.</text:p>
      <text:p text:style-name="Text_20_body">And there's something even more fundamental underneath that.</text:p>
      <text:p text:style-name="Text_20_body">The earth isn't just a collection of resources that humans happen to depend on. It's a living system of extraordinary complexity that took billions of years to achieve its current state. The diversity of life, the stability of climate systems, the fertility of soil, the chemistry of oceans — these aren't just valuable to humans. They have a kind of integrity that exists independently of human valuation.</text:p>
      <text:p text:style-name="Text_20_body">Which connects back to Axiom I. Reality exists independently of our perceptions and preferences. The living systems of the earth don't care whether we value them. They are what they are. And what they are is the condition of possibility for everything we care about.</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text:span text:style-name="Emphasis"/></text:p>
      <text:p text:style-name="Horizontal_20_Line"/>
      <text:p text:style-name="Text_20_body"><text:span text:style-name="Strong_20_Emphasis">Why It Is True</text:span></text:p>
      <text:p text:style-name="Text_20_body">The argument for this axiom begins not with abstraction but with the most concrete fact of human existence: none of us built the world we were born into.</text:p>
      <text:p text:style-name="Text_20_body">The language you think in was given to you. The knowledge you apply was accumulated over centuries by people you will never meet. The roads you drive, the institutions that protect your rights, the agricultural systems that feed you, the medical knowledge that keeps you alive — none of it originated with you. You arrived into an inheritance so vast and so complete that it is nearly invisible, the way water is invisible to a fish. It is simply the world. But it was made, painstakingly, by people who are gone.</text:p>
      <text:p text:style-name="Text_20_body">Those people made a choice — mostly unconsciously, but sometimes deliberately — to do work whose full fruits they would never enjoy. The farmer who planted an orchard he would never harvest. The engineer who designed a bridge meant to last a century. The teacher who invested in students who would go on to do things she would never see. The soldier who died for a country whose future he could only imagine. The chain of people who gave more than they took, who built more than they consumed, who thought beyond their own lifetimes — that chain is the reason civilization exists at all.</text:p>
      <text:p text:style-name="Text_20_body">We are the beneficiaries of that chain. And that fact creates an obligation. Not because anyone can enforce it. Not because future people can hold us accountable — they cannot, they don't exist yet. But because accepting a gift and refusing to pass it forward is a form of theft from people who have no recourse. We did not earn what we inherited. We received it. The only honest response to receiving something you did not earn is to hold it carefully and pass it on.</text:p>
      <text:p text:style-name="Horizontal_20_Line"/>
      <text:p text:style-name="Text_20_body"><text:span text:style-name="Strong_20_Emphasis">An American Tradition</text:span></text:p>
      <text:p text:style-name="Text_20_body">The founders thought in generational terms in ways that contemporary political culture has almost entirely abandoned.</text:p>
      <text:p text:style-name="Text_20_body">Thomas Jefferson wrote that the earth belongs to the living — a provocative claim that has sometimes been read as license for each generation to do as it pleases. But Jefferson's deeper argument was more demanding than that. He believed each generation had both the right and the responsibility to reconsider the institutions it inherited — not to consume them but to renew them, to make them worthy of transmission. The obligation ran forward as much as it ran backward. You had the right to revise what you received. You did not have the right to destroy it.</text:p>
      <text:p text:style-name="Text_20_body">The founders more broadly were acutely conscious that they were building something meant to outlast them. The constitutional architecture — separation of powers, checks and balances, the amendment process — was not designed for the convenience of the people in the room. It was designed for the centuries. They argued bitterly about many things but shared the conviction that what they were doing <text:soft-page-break/>mattered beyond their own lifetimes. That consciousness — that your actions have consequences for people not yet born — is one of the most important things they modeled.</text:p>
      <text:p text:style-name="Text_20_body">Theodore Roosevelt translated that consciousness into one of the most consequential acts of stewardship in American history. Roosevelt looked at the forests being stripped, the land being exhausted, the natural inheritance of the continent being consumed for immediate profit, and he named it for what it was — a betrayal of future Americans. He set aside more than 230 million acres of public land not because it was economically convenient but because he understood that some things belong to everyone, including everyone who hasn't been born yet. His conservation philosophy was not sentimental. It was a rigorous application of the obligation to hold in trust. He called it the greatest good for the greatest number over the longest run. That last phrase — over the longest run — is the operative one.</text:p>
      <text:p text:style-name="Text_20_body">The infrastructure tradition carries the same logic. The people who built the interstate highway system, the rural electrification grid, the public university system — they were not building for themselves. The timelines were too long, the costs too immediate, the benefits too deferred. They were building for people they would never meet. That tradition of doing hard work for a future you won't live to see is deeply American and has been largely abandoned.</text:p>
      <text:p text:style-name="Horizontal_20_Line"/>
      <text:p text:style-name="Text_20_body"><text:span text:style-name="Strong_20_Emphasis">The Current Moment</text:span></text:p>
      <text:p text:style-name="Text_20_body">We are living through one of the most dramatic failures of intergenerational obligation in human history and we have developed an remarkable capacity to not see it.</text:p>
      <text:p text:style-name="Text_20_body">The most visible is the accumulation of financial debt at every level — federal, state, municipal, personal — that transfers the cost of present consumption to future people who had no say in the decision. This is not a partisan observation. It has been true across administrations of both parties for decades. The political incentive structure makes it almost inevitable — the benefits of spending are immediate and visible, the costs are deferred and diffuse, and the people who will bear those costs cannot vote yet. The result is a systematic bias toward consuming the future to fund the present.</text:p>
      <text:p text:style-name="Text_20_body">The deferral of infrastructure maintenance follows the same logic. Roads, bridges, water systems, electrical grids — the accumulated infrastructure of American civilization requires constant investment to remain functional. That investment is consistently deferred because it is expensive now and its absence only becomes catastrophic later. We are living off the capital our predecessors built and not replacing it. Future Americans will inherit the bill.</text:p>
      <text:p text:style-name="Text_20_body">Climate change is the largest and most consequential version of this failure. Whatever one believes about the specific mechanisms and timelines, the basic fact is not seriously contested: the burning of fossil fuels over the past two centuries has altered the atmospheric conditions that future generations will inhabit. The benefits of that burning — the industrialization, the mobility, the material abundance — accrued primarily to the generations that did the burning. The costs — the altered climate, the rising seas, the disrupted agricultural systems, the intensified weather — will fall disproportionately on people not yet born. This is an intergenerational transfer of cost on a civilizational scale. Whatever <text:soft-page-break/>policy conclusions one draws from that fact, the fact itself is a direct violation of the obligation this axiom names.</text:p>
      <text:p text:style-name="Text_20_body">The political and economic systems that produced these failures share a structural feature: they optimize for the short term. Quarterly earnings. Two-year election cycles. Annual budgets. The incentive horizon of every major institution in American life extends about as far as the next reporting period. The future beyond that horizon is effectively invisible to the systems that shape our collective decisions.</text:p>
      <text:p text:style-name="Horizontal_20_Line"/>
      <text:p text:style-name="Text_20_body"><text:span text:style-name="Strong_20_Emphasis">The Demand It Makes</text:span></text:p>
      <text:p text:style-name="Text_20_body">This axiom demands that we extend our moral horizon beyond what our institutions are currently designed to see.</text:p>
      <text:p text:style-name="Text_20_body">That is genuinely difficult. The future is abstract. Present needs are concrete. The person in front of you is real in a way that the person who will live in 2075 is not. Every psychological instinct we have biases us toward the immediate. Asking people to feel genuine obligation toward people who don't exist yet runs against the grain of how human attention naturally works.</text:p>
      <text:p text:style-name="Text_20_body">But the inheritance argument cuts through that difficulty. Future people are not abstractions to us — we are their past. We are the people whose choices will shape the world they inherit exactly the way the choices of people long dead shaped the world we inherited. We know what it means to receive a damaged inheritance. We know what it means to receive a generous one. The question is simply which one we choose to leave.</text:p>
      <text:p text:style-name="Text_20_body">The Resolute Society takes this obligation seriously at every level of its work. The decisions we make about our communities, our resources, our institutions, and our practices are evaluated not only by their immediate effects but by what they will mean for the people who come after us. We did not earn what we received. We are not entitled to consume it. We hold it in trust and we build according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1:14:34.064646541</meta:creation-date>
    <meta:generator>LibreOffice/24.2.7.2$Linux_X86_64 LibreOffice_project/420$Build-2</meta:generator>
    <dc:date>2026-06-17T11:35:56.270120479</dc:date>
    <meta:editing-duration>PT15M54S</meta:editing-duration>
    <meta:editing-cycles>4</meta:editing-cycles>
    <meta:document-statistic meta:table-count="0" meta:image-count="0" meta:object-count="0" meta:page-count="5" meta:paragraph-count="43" meta:word-count="2256" meta:character-count="13784" meta:non-whitespace-character-count="11534"/>
  </office:meta>
</office:document-meta>
</file>