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orphans="1"/>
    </style:style>
    <style:style style:name="P2" style:family="paragraph" style:parent-style-name="Text_20_body">
      <style:paragraph-properties fo:orphans="1"/>
    </style:style>
    <style:style style:name="P3" style:family="paragraph" style:parent-style-name="Text_20_body">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text:span text:style-name="Strong_20_Emphasis">On the First Axiom: Reality exists independently of our perceptions and preferences.</text:span></text:p>
      <text:p text:style-name="P2"><text:span text:style-name="Emphasis">The world is what it is regardless of what we wish it to be. It can be known — not perfectly, not finally, but genuinely. We are obligated to pursue it honestly and to follow where it leads regardless of whether we like the destination.</text:span></text:p>
      <text:p text:style-name="P2"><text:span text:style-name="Emphasis"/></text:p>
      <text:p text:style-name="P2"><text:span text:style-name="Emphasis"/></text:p>
      <text:p text:style-name="P2"><text:span text:style-name="Emphasis"><text:span text:style-name="Strong_20_Emphasis">Pragmatic grounding</text:span></text:span><text:span text:style-name="Emphasis"> — these axioms are true in the sense that communities which act as if they're true tend to flourish, and communities that act as if they're false tend to collapse or become monstrous. You're not making metaphysical claims, you're making claims about what works. This is the most defensible and the most American — it's essentially Dewey.</text:span></text:p>
      <text:p text:style-name="Text_20_body"><text:span text:style-name="Strong_20_Emphasis">Convergence grounding</text:span> — these axioms are what virtually every serious moral tradition arrives at independently, across cultures and centuries. The convergence itself is evidence. This is what the document gestures at in Article XIV when it talks about shared inheritance.</text:p>
      <text:p text:style-name="Text_20_body"><text:span text:style-name="Strong_20_Emphasis">Phenomenological grounding</text:span> — these axioms describe what is undeniable from the inside of human experience. You can deny equal dignity theoretically but you cannot actually live as though your own dignity doesn't matter.</text:p>
      <text:p text:style-name="P2"><text:span text:style-name="Emphasis"/></text:p>
      <text:p text:style-name="P2"><text:span text:style-name="Emphasis"><text:span text:style-name="Strong_20_Emphasis">The performative contradiction argument</text:span></text:span></text:p>
      <text:p text:style-name="Text_20_body">Anyone who asserts that reality is constructed or that truth is preference-relative is making a claim they intend to be actually true — not just true for them, not true because they prefer it. The denial of mind-independent reality defeats itself in the act of assertion. You cannot coherently argue that there is no shared reality without appealing to one. This doesn't prove everything about reality, but it closes off the relativist escape hatch. The person who says "truth is whatever you want it to be" is asking you to believe that as a truth independent of what you want.</text:p>
      <text:p text:style-name="P2"><text:span text:style-name="Emphasis"/></text:p>
      <text:p text:style-name="P2"><text:span text:style-name="Emphasis"><text:span text:style-name="Strong_20_Emphasis">The convergence argument</text:span></text:span></text:p>
      <text:p text:style-name="Text_20_body">Independent inquiry by people with radically different starting points, cultures, and interests keeps arriving at the same things — the germ theory of disease, the age of the universe, the structure of DNA. That convergence is hard to explain if reality is just a construct. Constructs diverge. Reality pushes back.</text:p>
      <text:p text:style-name="P2"><text:span text:style-name="Emphasis"/></text:p>
      <text:p text:style-name="P2"><text:span text:style-name="Emphasis"/></text:p>
      <text:p text:style-name="P2"><text:span text:style-name="Emphasis"><text:span text:style-name="Strong_20_Emphasis">The consequences argument</text:span></text:span></text:p>
      <text:p text:style-name="Text_20_body"><text:soft-page-break/>This is the most pragmatic and probably the most persuasive for your context. Communities that systematically deny inconvenient realities — about their finances, their environment, their health, their governance — pay a price that is indifferent to their preferences. The crop fails whether or not you believe in the drought. The levee breaks whether or not you believe in the flood. Reality's independence from preference is demonstrated continuously by what happens when you ignore it. This is Tainter in one sentence: complexity that denies its own limits eventually meets them.</text:p>
      <text:p text:style-name="P2"><text:span text:style-name="Emphasis"/></text:p>
      <text:p text:style-name="P2"><text:span text:style-name="Emphasis"><text:span text:style-name="Strong_20_Emphasis">The dignity argument</text:span></text:span></text:p>
      <text:p text:style-name="Text_20_body">This one connects Axiom I directly to Axiom II in a way that might not be obvious. Treating persons as worthy of honest engagement — rather than manipulation, propaganda, or managed perception — requires that there be something real to engage them with. The epistemic free-for-all isn't just intellectually lazy, it's a form of domination. When powerful actors can construct reality for others, they can manufacture consent, manufacture enemies, manufacture crises. The assertion that reality is independent of preference is also an assertion that persons deserve truth rather than management.</text:p>
      <text:p text:style-name="Text_20_body">That last one is probably your strongest hook, because it connects the epistemological crisis directly to what people actually feel — that they're being manipulated, that the information environment is weaponized, that they can't trust what they're told. Axiom I isn't abstract philosophy. It's a refusal of that condition.</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2"><text:soft-page-break/><text:span text:style-name="Emphasis"/></text:p>
      <text:p text:style-name="P2"><text:span text:style-name="Emphasis"/></text:p>
      <text:p text:style-name="P2"><text:span text:style-name="Emphasis"/></text:p>
      <text:p text:style-name="P2"><text:span text:style-name="Emphasis"/></text:p>
      <text:p text:style-name="P2"><text:span text:style-name="Emphasis"/></text:p>
      <text:p text:style-name="P1"/>
      <text:p text:style-name="P2"><text:span text:style-name="Strong_20_Emphasis">Why It Is True</text:span></text:p>
      <text:p text:style-name="P2">There is a reason this is the first axiom. Everything else we believe — about dignity, about covenant, about community, about power — rests on the assumption that we are talking about the same world. If that assumption fails, nothing built on top of it holds. You cannot have genuine deliberation with someone who inhabits a different reality. You cannot hold institutions accountable if the facts of their behavior are endlessly contestable. You cannot make good decisions for your community if the information those decisions depend on is treated as a matter of opinion. Shared reality is not one value among many. It is the precondition for all the others.</text:p>
      <text:p text:style-name="P2">We hold this axiom not because it is philosophically sophisticated but because it is obviously true and because its opposite — the idea that reality conforms to our perceptions and preferences — collapses immediately under the weight of ordinary experience. The farmer does not get to decide whether the rain comes. The builder does not get to decide whether the beam holds. The doctor does not get to decide whether the infection responds to treatment. In every domain where consequences are immediate and unavoidable, people behave as if reality is independent of their wishes because it is. The axiom asks nothing more than that we apply that same honesty to domains where consequences are slower and more diffuse.</text:p>
      <text:p text:style-name="P1"/>
      <text:p text:style-name="P2"><text:span text:style-name="Strong_20_Emphasis">An American Tradition</text:span></text:p>
      <text:p text:style-name="P2">This is not a new idea in America. It is in fact one of the oldest American ideas we have.</text:p>
      <text:p text:style-name="P2">Benjamin Franklin was perhaps the purest embodiment of it. Franklin approached the world with a disposition that was essentially this axiom in practice — patient, empirical, unwilling to let preference override evidence, genuinely curious about what was actually true rather than what he hoped was true. His experiments were not the work of a man trying to confirm what he already believed. They were the work of a man trying to find out what was real. When the lightning rod worked it worked because reality is what it is, not because Franklin wished it so. When his findings contradicted received wisdom he followed the evidence. That disposition — humble before facts, rigorous in method, honest about conclusions — was not incidental to Franklin's character. It was central to what he thought it meant to be a responsible person in a self-governing community.</text:p>
      <text:p text:style-name="P2">The founders more broadly were children of the Enlightenment, which meant they believed the world could be known through careful observation and honest reasoning. Jefferson's declaration that certain truths are self-evident was not an appeal to feeling or tradition — it was a claim that reality, including <text:soft-page-break/>moral reality, is accessible to honest inquiry. The American experiment was founded on the belief that human beings, given accurate information and genuine deliberation, could govern themselves wisely. That belief is only coherent if reality can be known. A democracy built on the premise that truth is whatever you want it to be is not a democracy — it is a competition between competing fictions, won by whoever constructs the most compelling one.</text:p>
      <text:p text:style-name="P2">The tradition continued through the great investigative journalists of the late nineteenth and early twentieth centuries — the muckrakers who documented the actual conditions of American industrial life not because they had a theory about what those conditions should be but because they went and looked. Ida Tarbell did not assume what Standard Oil was doing. She documented it. Jacob Riis did not theorize about how the other half lived. He went there and showed people. The tradition of honest empirical inquiry in service of democratic self-governance is as American as anything we have. It is not a foreign import or an elite affectation. It is what serious citizens do in a republic that depends on them.</text:p>
      <text:p text:style-name="P1"/>
      <text:p text:style-name="P2"><text:span text:style-name="Strong_20_Emphasis">The Current Moment</text:span></text:p>
      <text:p text:style-name="P2">We are not living in that tradition right now.</text:p>
      <text:p text:style-name="P2">The forces that have degraded our shared epistemology are not mysterious. The economics of attention — the architecture of social media platforms, the incentive structures of algorithmically curated information, the outrage mechanics that drive engagement — systematically reward the emotionally compelling over the accurate, the tribal over the true, the certain over the honest. A piece of information that confirms what you already believe and makes you angry travels farther and faster than a piece of information that complicates what you believe and asks you to sit with uncertainty. This is not an accident. It is the predictable result of optimizing information systems for engagement rather than accuracy.</text:p>
      <text:p text:style-name="P2">The result is that many Americans now inhabit genuinely different informational worlds — not just different interpretations of shared facts but different facts entirely. This is not a problem of intelligence or education or good faith. It is a structural problem. The architecture of our information environment has made it easier to remain inside a confirming reality than to engage with a challenging one. And it has made the social cost of updating your beliefs — of following evidence where it leads regardless of what your community believes — very high.</text:p>
      <text:p text:style-name="P2">We name this not to assign blame but to be honest about what we are working against. The Resolute Society asks its members to do something that the current information environment actively discourages: to hold their beliefs provisionally, to follow evidence where it leads, to treat being wrong as an opportunity rather than a defeat, and to extend that same good faith to people who reach different conclusions through honest inquiry.</text:p>
      <text:p text:style-name="P1"/>
      <text:p text:style-name="P2"><text:span text:style-name="Strong_20_Emphasis">The Demand It Makes</text:span></text:p>
      <text:p text:style-name="P2">This is not easy. It has never been easy. Franklin himself noted that the natural human tendency is to seek confirmation rather than truth. What made him extraordinary was not that he lacked that tendency <text:soft-page-break/>but that he disciplined it. He built practices and relationships that checked his own conclusions — the Junto, his circle of inquiry-minded friends, was explicitly designed to expose his thinking to challenge. He understood that the individual mind left to itself tends toward self-confirmation and that the remedy is structure.</text:p>
      <text:p text:style-name="P2">That is what we are trying to build. Not a community of people who already agree on everything — that would be useless — but a community structured to pursue truth together honestly. The axiom is the foundation. The practices that build on it are how we actually live it.</text:p>
      <text:p text:style-name="P2">The hardest part of this axiom is the obligation to follow reality where it leads regardless of whether we like the destination. It is easy to pursue truth when it confirms what we hoped. The obligation kicks in when it doesn't — when honest inquiry leads to conclusions that are uncomfortable, that challenge our prior commitments, that require us to change. A community that pursues truth only when it's convenient isn't pursuing truth. It's performing it.</text:p>
      <text:p text:style-name="P2">We are obligated to do better than that. The moment requires i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0:53:50.861652341</meta:creation-date>
    <meta:generator>LibreOffice/24.2.7.2$Linux_X86_64 LibreOffice_project/420$Build-2</meta:generator>
    <dc:date>2026-06-17T10:33:42.431347233</dc:date>
    <meta:editing-duration>PT44M29S</meta:editing-duration>
    <meta:editing-cycles>2</meta:editing-cycles>
    <meta:document-statistic meta:table-count="0" meta:image-count="0" meta:object-count="0" meta:page-count="5" meta:paragraph-count="32" meta:word-count="1693" meta:character-count="10612" meta:non-whitespace-character-count="8920"/>
  </office:meta>
</office:document-meta>
</file>