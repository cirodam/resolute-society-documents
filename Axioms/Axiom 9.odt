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n the Ninth Axiom: Persons are not identical to their worst moments.</text:span></text:p>
      <text:p text:style-name="Text_20_body"><text:span text:style-name="Emphasis">Persons are not identical to their worst moments. Accountability is real — harm done requires acknowledgment, repair where possible, and demonstrated change over time. But accountability is not permanent definition. The capacity for genuine transformation is part of what dignity means. Communities that cannot metabolize failure and extend renewal to those who have earned it will calcify. We are not in the business of permanent judgment. We are in the business of building people and communities capable of genuine change.</text:span></text:p>
      <text:p text:style-name="Text_20_body"><text:span text:style-name="Emphasis"/></text:p>
      <text:p text:style-name="Text_20_body"><text:span text:style-name="Emphasis">--------------------------------------------------------------------------</text:span></text:p>
      <text:p text:style-name="Text_20_body"><text:span text:style-name="Emphasis"/></text:p>
      <text:p text:style-name="Text_20_body"><text:span text:style-name="Emphasis">And it's doing something even more specific than permission to forgive. It's making forgiveness and renewal structural rather than optional. It's not saying you should forgive if you feel like it. It's saying communities that cannot do this calcify — that the inability to metabolize failure and extend renewal is itself an institutional pathology with predictable consequences.</text:span></text:p>
      <text:p text:style-name="Text_20_body">Which is a much stronger claim than a moral exhortation to be more forgiving.</text:p>
      <text:p text:style-name="Text_20_body">But you've identified the hardest thing about this axiom in the American context right now. Because the culture is running in exactly the opposite direction.</text:p>
      <text:p text:style-name="Text_20_body">Cancel culture on the left. Permanent criminalization on the right. The social media environment that makes every worst moment retrievable, searchable, and permanently attached to a person's identity. The political culture that treats opponents not just as wrong but as irredeemably corrupt. The criminal justice system that defines people by their offenses for decades after they've served their sentences. The background check system that follows people for life. The sex offender registry that makes reintegration nearly impossible.</text:p>
      <text:p text:style-name="Text_20_body">All of these are expressions of the same thing — a culture that has lost the capacity to distinguish between accountability and permanent definition. That conflates what a person did with what a person is.</text:p>
      <text:p text:style-name="Text_20_body">And the consequences are exactly what the axiom predicts. Calcification. A culture where no one can afford to be wrong publicly because wrongness is permanent. Where people double down on bad positions rather than update them because updating feels like annihilation. Where political opponents become existential enemies rather than people who got something wrong. Where the criminal justice system produces recidivism rather than rehabilitation because it never stops punishing.</text:p>
      <text:p text:style-name="Text_20_body"><text:span text:style-name="Emphasis"/></text:p>
      <text:p text:style-name="Text_20_body"><text:span text:style-name="Emphasis">---------------------------------------------------------------</text:span></text:p>
      <text:h text:style-name="Heading_20_2" text:outline-level="2"><text:soft-page-break/><text:span text:style-name="Emphasis">Claude responded: Yes.</text:span></text:h>
      <text:p text:style-name="P1">Yes. And it's worth asking how we got here because it wasn't always this way and the shift has specific causes.</text:p>
      <text:p text:style-name="P1">Three things converged to produce the current condition.</text:p>
      <text:p text:style-name="P1"><text:span text:style-name="Strong_20_Emphasis">Social media and permanent record</text:span></text:p>
      <text:p text:style-name="P1">For most of human history your worst moment was witnessed by a limited number of people and faded from collective memory over time. Reputation was local and temporal. You could move, start over, be known differently in a new context. The social infrastructure of forgiveness was partly just the natural forgetting that comes with time and distance.</text:p>
      <text:p text:style-name="P1">Social media eliminated that. Every worst moment is now potentially permanent, searchable, globally visible, and retrievable years or decades later by people with no context for who you were then or who you are now. The infrastructure of forgetting that made renewal socially possible has been destroyed. Not by intention necessarily but as a byproduct of architecture that was designed for engagement rather than human flourishing.</text:p>
      <text:p text:style-name="P1">This connects directly to Article XV of the Definition. The attention economy doesn't just colonize attention. It colonizes identity. It freezes people in their worst moments because outrage is more engaging than redemption and the algorithm optimizes for engagement.</text:p>
      <text:p text:style-name="P1"><text:span text:style-name="Strong_20_Emphasis">The collapse of shared institutions that transmitted forgiveness</text:span></text:p>
      <text:p text:style-name="P1">The traditions that historically carried the technology of forgiveness — religious communities, tight knit neighborhoods, extended family networks, fraternal organizations — have been hollowed out by exactly the atomization Axiom V identifies. These institutions were imperfect. But they had practices, rituals, and social structures for metabolizing failure and extending renewal. Confession and absolution. The prodigal son. The returned veteran welcomed home. The neighbor who made a terrible mistake and was gradually reintegrated through demonstrated change over time.</text:p>
      <text:p text:style-name="P1">When those institutions collapsed the practices collapsed with them. And nothing replaced them. The social technology of forgiveness requires a community to administer it. Atomized individuals don't have the infrastructure.</text:p>
      <text:p text:style-name="P1"><text:span text:style-name="Strong_20_Emphasis">The weaponization of permanent judgment</text:span></text:p>
      <text:p text:style-name="P1">This is the most deliberately constructed cause. Permanent judgment is politically useful. If your opponents can be defined by their worst moments — if no redemption is possible, if every mistake is disqualifying, if the goal is annihilation rather than accountability — then politics becomes total war. Every election is existential. Every opponent is irredeemable. The stakes are always maximum.</text:p>
      <text:p text:style-name="P1">This dynamic benefits the most extreme actors in any political system because it eliminates the middle ground where compromise and renewal are possible. It's been deliberately cultivated by media ecosystems that profit from outrage and political actors who benefit from permanent enemy construction.</text:p>
      <text:p text:style-name="P1"><text:soft-page-break/>The result is a culture where forgiveness feels not just difficult but dangerous. To forgive is to be seen as weak, naive, complicit. To extend renewal is to betray the people who were harmed. The legitimate need to take harm seriously has been weaponized into a prohibition on the possibility of change.</text:p>
      <text:p text:style-name="P1">And the cruelest irony is that this culture of permanent judgment doesn't actually serve the people who were harmed. Genuine accountability — acknowledgment, repair, demonstrated change — serves them far better than permanent definition of the person who caused harm. Restorative justice research consistently shows that survivors of harm want acknowledgment and safety far more than they want permanent punishment. The culture of permanent judgment is performing outrage on behalf of harmed people while denying them what would actually help.</text:p>
      <text:p text:style-name="P1">Which connects the axiom back to the restorative justice framework in the Definition. The Division of Conciliation isn't just a governance structure. It's an institutional expression of the belief that genuine accountability is more demanding than punishment and more useful to everyone involved.</text:p>
      <text:p text:style-name="P1">So how do you make this axiom legible to people who are living inside the permanent judgment culture and have strong reasons to stay there?</text:p>
      <text:p text:style-name="P1">I think the key is separating accountability from permanent definition very precisely. Because most people who participate in cancel culture or permanent criminalization believe they're taking harm seriously. They're not wrong that harm is serious. They're wrong that permanent definition serves accountability better than genuine repair does.</text:p>
      <text:p text:style-name="P1">The axiom doesn't ask people to minimize harm or pretend wrongdoing didn't happen. It asks them to distinguish between what a person did and what a person is. Between consequences that serve repair and consequences that serve punishment. Between accountability that makes the community safer and judgment that makes the community feel righteous.</text:p>
      <text:p text:style-name="P1">That distinction is available to people across political lines if it's made carefully enough.</text:p>
      <text:p text:style-name="Text_20_body"><text:span text:style-name="Emphasis"/></text:p>
      <text:p text:style-name="Text_20_body"><text:span text:style-name="Emphasis"/></text:p>
      <text:p text:style-name="Horizontal_20_Line"/>
      <text:p text:style-name="Text_20_body"><text:span text:style-name="Strong_20_Emphasis">Why It Is True</text:span></text:p>
      <text:p text:style-name="Text_20_body">This axiom is a direct extension of Axiom II. If human dignity is equal, sacred, and inviolable — if it cannot be earned or lost, granted or revoked — then it follows that dignity cannot be forfeited through failure. The person who has done something wrong, even something terrible, retains the fundamental worth that belongs to persons as such. That is not a comfortable claim. It is what the dignity axiom requires.</text:p>
      <text:p text:style-name="Text_20_body">But this axiom goes further than II. It does not merely say that dignity persists through failure. It says that genuine transformation is possible — that persons are not fixed by their worst moments, that the self that failed is not the only self available, that human beings retain throughout their lives the capacity to become something different from what they have been. This capacity for genuine change is not a <text:soft-page-break/>sentimental wish. It is part of what persons are. It is part of what agency means. To deny it is to deny something essential about human nature.</text:p>
      <text:p text:style-name="Text_20_body">The philosophical argument rests on a distinction between what a person has done and what a person is. Actions are events in time. They happened. They cannot be undone. Their consequences are real and the obligations they create — to acknowledge, to repair where possible, to demonstrate change — are real. Accountability is not optional. But a person is not reducible to their actions. A person is a continuing being with a past, a present, and a future. The past is fixed. The present and future are not. To treat a person as permanently and completely defined by what they did at a particular moment in their past is to make a category error — to confuse an event with a person, a moment with a life.</text:p>
      <text:p text:style-name="Text_20_body">This distinction matters enormously for how communities function. A community that treats failure as permanent definition has no mechanism for reintegration. People who have failed — and in any genuine community, over sufficient time, everyone will fail at something — have no path back. The choices become permanent exile or pretending the failure didn't happen. Both are corrosive. Permanent exile wastes the person and poisons the community with the knowledge that failure is unrecoverable. Pretense corrodes the honesty that Axiom I requires and makes genuine accountability impossible. The only workable alternative is what this axiom names: real accountability that opens onto genuine renewal.</text:p>
      <text:p text:style-name="Horizontal_20_Line"/>
      <text:p text:style-name="Text_20_body"><text:span text:style-name="Strong_20_Emphasis">An American Tradition</text:span></text:p>
      <text:p text:style-name="Text_20_body">The deepest American tradition on this question is religious and it runs across every denomination and every region. The theology of redemption — the idea that a person can genuinely change, that the past does not have the final word, that transformation is available to anyone who seeks it sincerely — is arguably the most widely held spiritual conviction in American life. It is not a liberal idea or a conservative idea. It is present in the evangelical revival tradition, in Catholic sacramental theology, in the Black church tradition, in the recovery movement that has touched millions of American families. The belief that people can change is woven into the fabric of American spiritual life in ways that transcend every other cultural division.</text:p>
      <text:p text:style-name="Text_20_body">The legal system has embodied the principle imperfectly but genuinely. Bankruptcy law is built on the explicit recognition that financial failure should not permanently define a person — that the person who has failed economically deserves a path back to productive participation. The parole system, however inadequately realized in practice, rests on the premise that people who have done harmful things retain the capacity for genuine change and that society has an interest in that change rather than in permanent punishment. The juvenile justice tradition draws a sharper version of the same distinction — recognizing that the person who commits a crime at sixteen is not the same person who will exist at thirty and should not be permanently defined by what they did before they were fully formed.</text:p>
      <text:p text:style-name="Text_20_body">The Civil War and its aftermath offer the most instructive and painful American case study in what happens when communities try to navigate this balance at civilizational scale.</text:p>
      <text:p text:style-name="Text_20_body">The question that faced America after Appomattox was one of the hardest any society has ever confronted: what do you do with millions of people who participated in or acquiesced to a system of <text:soft-page-break/>human enslavement, who fought a war to preserve it, who caused catastrophic harm? How do you hold genuine accountability without making reintegration impossible? How do you welcome people back into the national community without excusing what they did or abandoning the people they harmed?</text:p>
      <text:p text:style-name="Text_20_body">Lincoln's answer — with malice toward none, with charity for all — was an attempt to hold both accountability and renewal simultaneously. It was not an erasure of what had happened. It was a recognition that the country could not function if the Confederate states and their populations were treated as permanently expelled from the American community. The nation needed them back. The formerly enslaved people needed the nation to hold together well enough to protect their newly won freedom. The balance was extraordinarily difficult.</text:p>
      <text:p text:style-name="Text_20_body">What followed was a failure that shaped American life for the next century and a half. Reconstruction — the genuine attempt to build a multiracial democracy in the South, to extend real citizenship and economic participation to formerly enslaved people, to hold the Confederate leadership accountable — was abandoned. The accountability was dropped without the renewal being completed. The formerly enslaved people were left without the land, the protection, or the genuine political power that would have made their freedom real. The Confederate leadership was restored to political power without having genuinely reckoned with what they had done. The result was not reconciliation. It was a century of terror, disenfranchisement, and systematic racial violence that constitutes one of the greatest failures of covenant in American history.</text:p>
      <text:p text:style-name="Text_20_body">The lesson is precise: dropping accountability before genuine transformation has occurred is not forgiveness. It is abandonment — of the people harmed and ultimately of the possibility of genuine renewal. Real forgiveness, real renewal, requires that accountability be completed rather than avoided. The Civil War's aftermath failed both the people who had been enslaved and the possibility of genuine national reconciliation because it tried to skip the hard work that genuine renewal requires.</text:p>
      <text:p text:style-name="Horizontal_20_Line"/>
      <text:p text:style-name="Text_20_body"><text:span text:style-name="Strong_20_Emphasis">The Current Moment</text:span></text:p>
      <text:p text:style-name="Text_20_body">We are living through a period of maximum difficulty on this question and minimum wisdom about it.</text:p>
      <text:p text:style-name="Text_20_body">The digital environment has made forgetting structurally impossible in ways that are genuinely new in human history. Every statement, every post, every moment of poor judgment made in public is permanently recorded and permanently retrievable. A person who said something foolish or harmful at twenty-two can have that statement surface at forty-five with full original context stripped away. A person who held views they have since genuinely abandoned can be permanently defined by those views regardless of how thoroughly they have changed. The technical infrastructure of permanent memory has been layered on top of a cultural moment that has decided permanent judgment is justice.</text:p>
      <text:p text:style-name="Text_20_body">The result is a social environment with no offramp. The person who has failed publicly — who has said something harmful, held bad views, behaved badly — has essentially no path to demonstrated change that will be accepted. Any acknowledgment of failure becomes a target. Any claim of growth is treated as performance. The community that has decided someone is beyond redemption will interpret every subsequent action through that lens. This is not accountability. It is a system that produces the appearance of accountability while foreclosing the possibility of genuine change.</text:p>
      <text:p text:style-name="Text_20_body"><text:soft-page-break/>This dynamic operates across the entire political and cultural spectrum. It is not the property of one side. Both the left and the right have developed sophisticated machinery for permanent definition — for taking the worst thing a person has done or said and making it the only thing that person is. The specific targets differ. The mechanism is identical. And the damage it does is identical — to the individuals caught in it, to the communities that lose people who might have contributed genuinely, and to the broader social fabric that requires the possibility of change to function.</text:p>
      <text:p text:style-name="Text_20_body">The deeper damage is to honesty itself. In an environment where admitting error leads to permanent definition by that error, the rational strategy is to never admit error. To double down. To attack the people pointing out the failure rather than acknowledge it. The culture of permanent judgment has produced a culture of permanent defensiveness that makes genuine accountability nearly impossible. People cannot afford to be wrong in public. So they perform certainty they don't feel and refuse correction they need. Axiom I — the honest pursuit of truth wherever it leads — cannot survive in that environment.</text:p>
      <text:p text:style-name="Horizontal_20_Line"/>
      <text:p text:style-name="Text_20_body"><text:span text:style-name="Strong_20_Emphasis">The Demand It Makes</text:span></text:p>
      <text:p text:style-name="Text_20_body">This axiom makes perhaps the most countercultural demand in the document: the demand to extend genuine openness to renewal to people who have failed — including people whose failures we find serious, whose views we find wrong, whose behavior we find harmful.</text:p>
      <text:p text:style-name="Text_20_body">This is not the demand to excuse harm. Accountability is real and this axiom states it explicitly. Harm done requires acknowledgment. It requires repair where possible. It requires demonstrated change over time. These are not optional. The renewal this axiom names is earned, not assumed. The person who has failed does not get to declare themselves changed and demand to be treated as if nothing happened. Genuine change is demonstrated over time through action. The community has both the right and the responsibility to require that demonstration.</text:p>
      <text:p text:style-name="Text_20_body">What the community does not have — what this axiom refuses to grant — is the right to declare the demonstration impossible before it has been attempted. To treat the failure as the final word on the person. To close the door on renewal before the work of accountability has even been completed.</text:p>
      <text:p text:style-name="Text_20_body">In a country this furious, this divided, this practiced at permanent judgment, that refusal is genuinely radical. It goes against the grain of virtually every incentive in the current cultural environment. It will be misunderstood as softness. It is not softness. It is the rigorous application of what dignity requires and what functional communities need.</text:p>
      <text:p text:style-name="Text_20_body">The Resolute Society is not in the business of permanent judgment. We are in the business of building people and communities capable of genuine change. That business requires us to believe — against the current — that genuine change is possible. We do believe it. We build according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2:10:02.380202084</meta:creation-date>
    <dc:date>2026-06-17T12:55:55.322394531</dc:date>
    <meta:editing-duration>PT5M26S</meta:editing-duration>
    <meta:editing-cycles>2</meta:editing-cycles>
    <meta:generator>LibreOffice/24.2.7.2$Linux_X86_64 LibreOffice_project/420$Build-2</meta:generator>
    <meta:document-statistic meta:table-count="0" meta:image-count="0" meta:object-count="0" meta:page-count="6" meta:paragraph-count="55" meta:word-count="2820" meta:character-count="18330" meta:non-whitespace-character-count="15528"/>
  </office:meta>
</office:document-meta>
</file>