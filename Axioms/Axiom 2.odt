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b25d6"/>
    </style:style>
    <style:style style:name="P2" style:family="paragraph" style:parent-style-name="Text_20_body">
      <style:text-properties officeooo:paragraph-rsid="000b25d6"/>
    </style:style>
    <style:style style:name="P3" style:family="paragraph" style:parent-style-name="Text_20_body">
      <style:paragraph-properties fo:orphans="1"/>
    </style:style>
    <style:style style:name="T1" style:family="text">
      <style:text-properties officeooo:rsid="000b25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On the Second Axiom: Human dignity is equal, sacred, and inviolable.</text:span></text:p>
      <text:p text:style-name="Text_20_body"><text:span text:style-name="Emphasis">Every person possesses a worth not contingent on birth, behavior, or belief. What you were born into — your ancestry, your race, your sex, your place — tells us nothing about your worth. Dignity cannot be earned or lost, granted or revoked. That it is violated does not make it less real — violation presupposes it. This is the ground on which everything else stands.</text:span></text:p>
      <text:p text:style-name="Text_20_body"><text:span text:style-name="Emphasis"/></text:p>
      <text:p text:style-name="Text_20_body"><text:span text:style-name="Emphasis">-----------------------------------------------------------------</text:span></text:p>
      <text:p text:style-name="Text_20_body"><text:span text:style-name="Emphasis"/></text:p>
      <text:p text:style-name="Text_20_body"><text:span text:style-name="Emphasis">Human dignity is the irreducible worth that belongs to every person simply by virtue of being human. It is not earned through achievement, intelligence, virtue, or productivity. It is not granted by any authority — political, religious, or social. It cannot be forfeited through behavior, circumstance, or failure. It does not admit of degrees. It is not diminished by violation — when dignity is violated, the violation is real, but the worth that was violated remains.</text:span></text:p>
      <text:p text:style-name="Text_20_body"><text:span text:style-name="Emphasis"/></text:p>
      <text:p text:style-name="Text_20_body"><text:span text:style-name="Emphasis">If a person has irreducible worth, then there are ways of treating them that are inconsistent with that worth. The expression of dignity isn't separate from the worth — it's what the worth demands in practice. Worth without expression is just a metaphysical claim with no consequences. The expression is how the worth becomes real in the world.</text:span></text:p>
      <text:p text:style-name="Text_20_body">You could put it this way: dignity is the fact, and its expressions are the obligations that fact generates. Every person has worth — therefore certain treatment is owed to them, certain treatment is forbidden, certain capacities must be protected.</text:p>
      <text:p text:style-name="Text_20_body"><text:span text:style-name="Emphasis"/></text:p>
      <text:p text:style-name="Text_20_body"><text:span text:style-name="Emphasis">I'd suggest dignity expresses itself in a few distinct registers:</text:span></text:p>
      <text:p text:style-name="Text_20_body"><text:span text:style-name="Emphasis"><text:span text:style-name="Strong_20_Emphasis">In treatment</text:span></text:span><text:span text:style-name="Emphasis"> — certain ways of treating persons are ruled out regardless of who they are or what they've done. Torture, dehumanization, degradation, erasure.</text:span></text:p>
      <text:p text:style-name="Text_20_body"><text:span text:style-name="Strong_20_Emphasis">In voice</text:span> — every person has the standing to speak, to be heard, to have their account of their own experience taken seriously.</text:p>
      <text:p text:style-name="Text_20_body"><text:span text:style-name="Strong_20_Emphasis">In self-determination</text:span> — every person has the standing to be the author of their own life rather than an instrument of someone else's purposes.</text:p>
      <text:p text:style-name="Text_20_body"><text:span text:style-name="Strong_20_Emphasis">In recognition</text:span> — every person has the standing to be seen as fully human by the community around them.</text:p>
      <text:p text:style-name="Text_20_body"><text:span text:style-name="Emphasis"/></text:p>
      <text:p text:style-name="Text_20_body"><text:span text:style-name="Emphasis">-----------------------------------------------------------------</text:span></text:p>
      <text:p text:style-name="Text_20_body"><text:soft-page-break/><text:span text:style-name="Emphasis">What dignity as inherent worth rules out isn't just denial of worth. It's the instrumentalization of persons — treating a person as a means to an end rather than as an end in themselves. That's the Kantian formulation and it's more precise than just "recognizing worth."</text:span></text:p>
      <text:p text:style-name="Text_20_body"><text:span text:style-name="Emphasis"/></text:p>
      <text:p text:style-name="Text_20_body"><text:span text:style-name="Emphasis">Which suggests that the core of dignity isn't just worth in the abstract. It's worth that cannot be subordinated — to the state, to the collective, to the gods, to the market, to any purpose external to the person themselves.</text:span></text:p>
      <text:p text:style-name="Text_20_body"><text:span text:style-name="Emphasis"/></text:p>
      <text:p text:style-name="Text_20_body"><text:span text:style-name="Emphasis">Because it's inherent — because it belongs to you simply by being human, not granted by anyone, not earned by anything — there is no authority that has the standing to spend it. You can't spend what you don't own. And nobody owns your worth.</text:span></text:p>
      <text:p text:style-name="Text_20_body"><text:span text:style-name="Emphasis"/></text:p>
      <text:p text:style-name="Text_20_body"><text:span text:style-name="Emphasis">-------------------------------------------------</text:span></text:p>
      <text:p text:style-name="Text_20_body"><text:span text:style-name="Emphasis">Human dignity is the irreducible worth that belongs to every person simply by virtue of being human. It is not granted by any authority — political, religious, or social — and therefore cannot be revoked by any authority. It is not derived from ancestry, capacity, achievement, or virtue, and therefore cannot be diminished by their absence. It does not admit of degrees — no person has more of it than another. It is not contingent on recognition — failure to recognize it is a wrong committed against it, not evidence of its absence.</text:span></text:p>
      <text:p text:style-name="Text_20_body">Because dignity is inherent it cannot be spent. No purpose — however sacred, however collective, however urgent — has legitimate claim on a person's worth. The person is never raw material. They are never a means to an end. They are always an end in themselves.</text:p>
      <text:p text:style-name="Text_20_body">This rules out every ideology that distributes human worth unequally. Racial hierarchy, caste, eugenics — these are not merely wrong in their conclusions. They are wrong at the root, because they locate worth in something other than the person themselves. When worth is located in ancestry or blood or capacity, it becomes something that can be ranked, revoked, and spent. The inherence claim forecloses that move entirely. There is no common ground between a framework that holds dignity as inherent and one that does not. The premises cannot both be true.</text:p>
      <text:p text:style-name="Text_20_body">The expressions of dignity — voice, self-determination, recognition, protection from degradation — are not a separate list of goods. They are entailments. They follow necessarily from what dignity is. To honor dignity is to refuse to spend it in any of its forms.</text:p>
      <text:p text:style-name="Text_20_body"><text:span text:style-name="Emphasis"/></text:p>
      <text:p text:style-name="Text_20_body"><text:span text:style-name="Emphasis">--------------------------------------------------------</text:span></text:p>
      <text:p text:style-name="P2"><text:span text:style-name="Emphasis"><text:span text:style-name="T1">abortion</text:span></text:span></text:p>
      <text:p text:style-name="P2"><text:soft-page-break/><text:span text:style-name="Emphasis">If we accept that a developing fetus at some point becomes a person with inherent dignity, then the framework generates a genuine collision — not a simple answer. Because you now have two persons, each with inherent dignity, each of whose worth cannot be spent for the other's purposes.</text:span></text:p>
      <text:p text:style-name="Text_20_body">The pregnant person's dignity means their body cannot be instrumentalized — cannot be spent — without their consent. That follows directly from what we just wrote.</text:p>
      <text:p text:style-name="Text_20_body">The fetus's dignity, if it is a person, means its life cannot be spent for another's purposes either.</text:p>
      <text:p text:style-name="Text_20_body">These are both real claims within the framework. And the framework doesn't resolve the collision automatically — it just clarifies what's actually at stake. It's not a question of a person versus a non-person, or rights versus life. It's dignity versus dignity. Worth versus worth.</text:p>
      <text:p text:style-name="Text_20_body">Which means anyone who tells you this question has a simple answer is either not taking one of the dignities seriously, or is smashing the collision flat with a claim the framework doesn't support.</text:p>
      <text:p text:style-name="P2"><text:span text:style-name="Emphasis">-----------------------------------------------------------------</text:span></text:p>
      <text:h text:style-name="P1" text:outline-level="2"><text:span text:style-name="Emphasis">The tradition behind Axiom II is long and comes from several distinct streams that converge on the same place.</text:span></text:h>
      <text:p text:style-name="P3">The tradition behind Axiom II is long and comes from several distinct streams that converge on the same place.</text:p>
      <text:p text:style-name="P3"><text:span text:style-name="Strong_20_Emphasis">The Kantian tradition</text:span></text:p>
      <text:p text:style-name="P3">This is the most direct philosophical ancestor. Kant argued that rational beings have an unconditional worth — dignity — that sets them apart from everything else in the world. Everything else has a price — it can be exchanged, substituted, spent. Persons have dignity instead of price, which means they cannot be exchanged or substituted or spent. His formulation — always treat persons as ends in themselves, never merely as means — is essentially what we just built, stated more tersely.</text:p>
      <text:p text:style-name="P3">Kant grounded this in rational capacity, which creates the problem we identified — it opens the door to arguing about who qualifies as sufficiently rational. But the structure of his argument, the distinction between price and dignity, between means and ends, is foundational to everything that followed.</text:p>
      <text:p text:style-name="P3"><text:span text:style-name="Strong_20_Emphasis">The natural rights tradition</text:span></text:p>
      <text:p text:style-name="P3">Locke, and before him the Stoics, argued that persons have rights and worth that precede any political arrangement. You don't get dignity from the state. You bring it with you. The state's job is to protect what you already have, not to grant what it controls.</text:p>
      <text:p text:style-name="P3">This is the tradition that flows directly into the Declaration of Independence — self-evident truths, unalienable rights, worth that no government created and therefore none can revoke. It's the most American expression of the dignity claim and probably your most important lineage given what you're trying to build.</text:p>
      <text:p text:style-name="P3"><text:span text:style-name="Strong_20_Emphasis">The religious traditions</text:span></text:p>
      <text:p text:style-name="P3">Across Christianity, Judaism, and Islam, the concept of humans made in the image of God — imago dei <text:soft-page-break/>in the Christian formulation — grounds dignity in something that precedes and exceeds any human authority. Every person carries something sacred by virtue of being human. This tradition reaches the same conclusion through a different route — inherent worth, unconditional, not grantable or revocable by human authority.</text:p>
      <text:p text:style-name="P3">You don't have to make a religious argument to use this tradition. The convergence itself is evidence — when independent traditions arriving from radically different premises reach the same conclusion, that convergence is worth noting.</text:p>
      <text:p text:style-name="P3"><text:span text:style-name="Strong_20_Emphasis">The abolitionist and civil rights traditions</text:span></text:p>
      <text:p text:style-name="P3">This is where the dignity claim gets tested against actual practice rather than just asserted philosophically. Frederick Douglass, Harriet Tubman, Sojourner Truth, Martin Luther King — these are people who took the dignity claim seriously enough to organize their lives around it when the cost of doing so was enormous.</text:p>
      <text:p text:style-name="P3">King's letter from Birmingham Jail is probably the most powerful single document in the American tradition on this question. He's not making a new philosophical argument — he's holding American institutions accountable to premises they already claimed to accept. The dignity of every person is your own founding premise, he's saying. We are simply asking you to mean it.</text:p>
      <text:p text:style-name="P3">That's a powerful rhetorical and moral structure for the Society too. You're not importing foreign values. You're holding America to what it said it believed.</text:p>
      <text:p text:style-name="P3"><text:span text:style-name="Strong_20_Emphasis">The phenomenological tradition</text:span></text:p>
      <text:p text:style-name="P3">Simone Weil argued that the clearest evidence of human dignity is what she called the cry of the afflicted — the particular quality of suffering that occurs when a person is treated as though they don't matter. That suffering isn't just pain. It's a specific kind of wrong that the person recognizes as wrong even when they have no framework to articulate why. The recognition of the violation is itself evidence of the worth that was violated.</text:p>
      <text:p text:style-name="P3">This connects to what we said earlier — dignity is presupposed by its violation. You can't meaningfully wrong something that has no worth.</text:p>
      <text:p text:style-name="P3"><text:span text:style-name="Strong_20_Emphasis">Where they converge</text:span></text:p>
      <text:p text:style-name="P3">What's striking is that these traditions — rationalist, natural rights, religious, activist, phenomenological — arrive at essentially the same place through entirely different routes. That convergence is your strongest argument. You're not making a sectarian claim. You're pointing at something that human moral reasoning keeps finding independently across centuries and cultures.</text:p>
      <text:p text:style-name="P2"><text:span text:style-name="Emphasis"/></text:p>
      <text:p text:style-name="Text_20_body"><text:span text:style-name="Emphasis">-----------------------------------------------------</text:span></text:p>
      <text:p text:style-name="Text_20_body"><text:span text:style-name="Emphasis">Persons — human beings — have inherent dignity. Their worth cannot be spent. They cannot be instrumentalized. Full stop.</text:span></text:p>
      <text:p text:style-name="Text_20_body"><text:soft-page-break/>Sentient beings — animals capable of suffering — have genuine moral standing. Not the same as human dignity, but not nothing. Their suffering is a real wrong. Their interests matter. They cannot be treated as pure objects.</text:p>
      <text:p text:style-name="Text_20_body"><text:span text:style-name="Emphasis"/></text:p>
      <text:p text:style-name="Text_20_body"><text:span text:style-name="Emphasis">---------------------------------------------------------</text:span></text:p>
      <text:p text:style-name="Text_20_body"><text:span text:style-name="Emphasis"/></text:p>
      <text:p text:style-name="Text_20_body"><text:span text:style-name="Emphasis"><text:span text:style-name="Strong_20_Emphasis">Animals preying on other animals</text:span></text:span></text:p>
      <text:p text:style-name="Text_20_body">This one is actually straightforward within the framework. Moral obligation requires moral agency — the capacity to recognize a wrong and choose otherwise. A lion killing a zebra isn't committing a wrong because the lion has no capacity to do otherwise, no ability to recognize the zebra's suffering as a moral claim on its behavior. Morality doesn't apply where agency doesn't exist.</text:p>
      <text:p text:style-name="Text_20_body">Nature isn't a moral domain. It's just what happens. The framework doesn't need to account for it.</text:p>
      <text:p text:style-name="Text_20_body"><text:span text:style-name="Emphasis"/></text:p>
      <text:p text:style-name="Text_20_body"><text:span text:style-name="Emphasis">----------------------------------------------------------------</text:span></text:p>
      <text:p text:style-name="Text_20_body"><text:span text:style-name="Emphasis"/></text:p>
      <text:h text:style-name="Heading_20_2" text:outline-level="2"><text:span text:style-name="Emphasis">Claude responded: That's a really important distinction you're drawing and I think it's doing real philosophical work.</text:span></text:h>
      <text:p text:style-name="P3">That's a really important distinction you're drawing and I think it's doing real philosophical work.</text:p>
      <text:p text:style-name="P3">The argument that humans are part of nature, not separate from it, cuts in an interesting direction. If we accept that a lion killing a zebra is not a moral wrong because it's simply what lions do as part of the natural order — then the question becomes whether human omnivory is in the same category. Is eating meat something humans do as biological creatures embedded in natural systems, or is it something we do as moral agents who could choose otherwise?</text:p>
      <text:p text:style-name="P3">And I think the honest answer is that it's both. Which is what makes it genuinely complicated.</text:p>
      <text:p text:style-name="P3">We are biological creatures. We evolved as omnivores. We have digestive systems, nutritional dependencies, and a several million year history of consuming animals. In that sense eating meat is as natural for humans as it is for a bear or a wolf.</text:p>
      <text:p text:style-name="P3">But we are also moral agents in a way that bears and wolves are not. We can recognize the suffering of the animal. We can choose otherwise, at least in conditions of material abundance. The capacity for moral reflection that makes us persons is the same capacity that makes us responsible for our choices in a way animals aren't.</text:p>
      <text:p text:style-name="P3">So the framework might generate something like this.</text:p>
      <text:p text:style-name="P3">The act of killing and consuming an animal, causing no gratuitous suffering, in a context where genuine need exists — nutritional, cultural, economic — sits in a morally different category than <text:soft-page-break/>factory farming. It may not be a wrong at all, or it may be a tragedy so minor relative to the need it serves that it doesn't register as a significant moral claim.</text:p>
      <text:p text:style-name="P3">Factory farming is categorically different. It's not just killing. It's the systematic instrumentalization of sentient beings on an industrial scale — treating them as pure production units, deliberately ignoring their capacity to suffer because acknowledging it would be economically inconvenient. That maps directly onto the dignity violation structure we built for humans. Not because cattle have human dignity, but because they have sentience that generates real moral obligations, and factory farming violates those obligations comprehensively and deliberately.</text:p>
      <text:p text:style-name="P3">The distinction you're drawing — gratuitous suffering versus killing with minimal suffering in a context of genuine need — is probably the right place to plant the flag. It's honest, it's consistent with the framework, and it doesn't require people to accept a conclusion most aren't ready for while still ruling out what is clearly wrong.</text:p>
      <text:p text:style-name="P3">There's also something worth naming about the relationship between humans and the animals they consume that exists in almost every traditional culture. Hunting traditions, farming traditions, indigenous food practices — most of them contain some acknowledgment of the moral weight of taking an animal's life. A gratitude, a ritual, a recognition that something real was lost even if the killing was justified. That's not mere sentiment. It's the same moral perception that grounds animal cruelty laws. The taking of a life matters even when it's necessary.</text:p>
      <text:p text:style-name="P3">The Society's framework might simply be that sentient beings cannot be made to suffer gratuitously, that their lives have genuine worth even if not the unconditional worth of persons, and that humans who consume animals do so with awareness of that weight rather than pretending it doesn't exist.</text:p>
      <text:p text:style-name="Text_20_body"><text:span text:style-name="Emphasis"/></text:p>
      <text:p text:style-name="Text_20_body"><text:span text:style-name="Emphasis">------------------------------------------------------------------</text:span></text:p>
      <text:p text:style-name="Text_20_body"><text:span text:style-name="Emphasis"/></text:p>
      <text:h text:style-name="Heading_20_2" text:outline-level="2"><text:span text:style-name="Emphasis">Claude responded: Right.</text:span></text:h>
      <text:p text:style-name="P3">Right. So we've removed the necessity argument and we're left with: a person kills and eats an animal with minimal suffering, but they could have chosen not to.</text:p>
      <text:p text:style-name="P3">I think the honest answer within the framework is that it's a minor moral wrong, or at minimum a moral cost — but one that exists on a spectrum far removed from factory farming or gratuitous cruelty.</text:p>
      <text:p text:style-name="P3">Here's why I think that's the honest position rather than saying it's fine entirely.</text:p>
      <text:p text:style-name="P3">If sentient beings have genuine moral standing — if their suffering and their lives have real worth even if not the unconditional worth of persons — then ending a life that didn't need to end is not costless. It's not zero. Something real was lost. The framework we built doesn't let you say otherwise without undermining the sentience claim.</text:p>
      <text:p text:style-name="P3">But.</text:p>
      <text:p text:style-name="P3"><text:soft-page-break/>Moral costs exist on a spectrum and have to be weighed against other real things. Cultural meaning. Community. The pleasure of food which is not trivial — it's bound up with family, memory, identity, celebration. The difficulty of perfectly optimizing every choice in a complex world. The cognitive and economic cost of dietary restriction.</text:p>
      <text:p text:style-name="P3">A framework that generates the conclusion that every person who eats a chicken sandwich is committing a meaningful moral wrong is a framework that has lost proportion. And lost proportion is a form of miscalibration — the same epistemic failure we identified earlier but applied to ethics.</text:p>
      <text:p text:style-name="P3">So maybe the most honest thing the framework can say is this.</text:p>
      <text:p text:style-name="P3">The life of a sentient being has real worth. Taking it when unnecessary carries a genuine moral cost that honest people should acknowledge rather than pretend away. That cost is minor relative to other moral claims in most ordinary circumstances. It is not minor when scaled to billions of animals under conditions of deliberate cruelty. The scale and the suffering are what transform an individual moral cost into a systemic moral catastrophe.</text:p>
      <text:p text:style-name="P3">Which means the Society's position isn't that meat eating is wrong. It's that the industrialized erasure of animal suffering from moral consideration is wrong. And that honest people who consume animals do so with some awareness of what they're doing rather than pretending the animal was just an object.</text:p>
      <text:p text:style-name="Text_20_body"><text:span text:style-name="Emphasis"/></text:p>
      <text:p text:style-name="Text_20_body"><text:span text:style-name="Emphasis">-----------------------------------------------------------------------------------------</text:span></text:p>
      <text:p text:style-name="Text_20_body"><text:span text:style-name="Emphasis"/></text:p>
      <text:p text:style-name="Text_20_body"><text:span text:style-name="Emphasis"><text:span text:style-name="Strong_20_Emphasis">What dairy actually involves at industrial scale</text:span></text:span></text:p>
      <text:p text:style-name="Text_20_body">Cows must be pregnant to produce milk. That means continuous forced pregnancy. The male calves born from that process have no value to the dairy industry and are almost universally killed shortly after birth or sold into veal production. The female calves are separated from their mothers — often within hours — which causes documented distress in both the cow and the calf. Cows are highly social animals with strong maternal bonds. The separation is not incidental to dairy production. It is constitutive of it.</text:p>
      <text:p text:style-name="Text_20_body">So dairy at industrial scale involves continuous reproductive instrumentalization, the routine killing of male offspring, and the systematic severing of maternal bonds. The suffering isn't incidental. It's structural.</text:p>
      <text:p text:style-name="Text_20_body"><text:span text:style-name="Strong_20_Emphasis">Small scale and traditional dairy</text:span></text:p>
      <text:p text:style-name="Text_20_body">This is genuinely different. A family cow or goat that is well treated, not continuously pregnant, whose calves are raised rather than killed, who lives something resembling a natural life — the moral calculus here is much closer to the minimal suffering meat case. The relationship between humans and dairy animals in traditional contexts was often genuinely reciprocal in a way that industrial production entirely eliminates.</text:p>
      <text:p text:style-name="Text_20_body"><text:span text:style-name="Strong_20_Emphasis">The honest framework position</text:span></text:p>
      <text:p text:style-name="Text_20_body"><text:soft-page-break/>Industrial dairy has the same problem as factory farming — it systematically instrumentalizes sentient beings and deliberately ignores their suffering because acknowledging it is economically inconvenient. The suffering is arguably more sustained than in meat production because the animal lives longer under those conditions.</text:p>
      <text:p text:style-name="Text_20_body">Small scale dairy with genuine animal welfare considerations sits in a different moral category — still carrying some cost, still involving some instrumentalization, but not the systematic erasure of animal experience that industrial production requires.</text:p>
      <text:p text:style-name="Text_20_body">Which suggests the Society's position would be consistent with what we said about meat. The line isn't drawn at consumption. It's drawn at gratuitous and systematic suffering — at the industrial erasure of animal experience from moral consideration.</text:p>
      <text:p text:style-name="Text_20_body">Though there's something worth naming here that goes beyond the individual moral calculation. The entire structure of industrial animal agriculture — dairy, meat, eggs — exists because we collectively decided that the sentience of animals was economically inconvenient to acknowledge. That's not individual moral failure. That's a systemic choice with enormous consequences that most people participate in without fully seeing what they're participating in.</text:p>
      <text:p text:style-name="Text_20_body">Which connects back to Axiom I actually. Part of the epistemological crisis is that the systems we live inside are specifically designed to make certain realities invisible. Factory farming depends on that invisibility. So does a lot else.</text:p>
      <text:p text:style-name="Text_20_body"><text:span text:style-name="Emphasis"/></text:p>
      <text:p text:style-name="Text_20_body"><text:span text:style-name="Emphasis">--------------------------------------------------------------------</text:span></text:p>
      <text:p text:style-name="Text_20_body"><text:span text:style-name="Emphasis">Eggs are the most defensible animal product within the framework, but with a significant caveat.</text:span></text:p>
      <text:p text:style-name="P3"><text:span text:style-name="Strong_20_Emphasis">The basic case</text:span></text:p>
      <text:p text:style-name="P3">A hen lays eggs regardless of whether humans collect them. In natural conditions she'd lay far fewer — the domestic chicken has been bred over centuries to produce at a rate no wild bird approaches — but the act of laying itself isn't inherently harmful. Collecting unfertilized eggs doesn't end a life. It doesn't require pregnancy. It doesn't require separation of mother and offspring in the way dairy does.</text:p>
      <text:p text:style-name="P3">A genuinely well kept hen — space to move, natural behaviors, proper nutrition, protection from predators, a normal social environment — can produce eggs without obvious suffering. The transaction is more reciprocal than almost any other form of animal agriculture. Shelter, food, protection in exchange for eggs.</text:p>
      <text:p text:style-name="P3">In that context eggs are probably the closest thing to a morally clean animal product that exists.</text:p>
      <text:p text:style-name="P3"><text:span text:style-name="Strong_20_Emphasis">The caveat</text:span></text:p>
      <text:p text:style-name="P3">Industrial egg production is as bad as anything else in the system. Battery cages. Debeaking. Male chicks killed at birth by the billions because they can't lay eggs and aren't the breed used for meat. Hens producing at rates that damage their bodies. Lifespans a fraction of what the animal would naturally live.</text:p>
      <text:p text:style-name="P3"><text:soft-page-break/>The same structure as dairy. The product itself isn't inherently problematic. The industrial system producing it at scale is a moral catastrophe.</text:p>
      <text:p text:style-name="P3"><text:span text:style-name="Strong_20_Emphasis">What this suggests</text:span></text:p>
      <text:p text:style-name="P3">There's actually a coherent and honest position that falls out of the framework here. The problem was never really about which specific animal products humans consume. It was always about the systematic industrial erasure of animal experience from moral consideration.</text:p>
      <text:p text:style-name="P3">A backyard flock of hens kept well is almost entirely defensible within the framework. It's also exactly the kind of thing a Resolute Society in Franklin County, Georgia might actually do.</text:p>
      <text:p text:style-name="P3">Which brings something into focus that feels important. The Society's relationship with food production — gardens, small flocks, maybe dairy animals kept properly — isn't just about resilience or self-sufficiency. It's about maintaining moral visibility. Knowing your animals. Seeing them as individuals. Making their wellbeing a genuine consideration rather than an externality.</text:p>
      <text:p text:style-name="P3">That's a completely different relationship with food than the industrial system produces. And it's available to ordinary people in a way that resolving the broader systemic problem isn't.</text:p>
      <text:p text:style-name="Text_20_body"><text:span text:style-name="Emphasis">--------------------------------------------------</text:span></text:p>
      <text:p text:style-name="Text_20_body"><text:span text:style-name="Emphasis">Yes. And it follows directly from the framework without needing any new premises.</text:span></text:p>
      <text:p text:style-name="P3">We've established two things that generate this conclusion together.</text:p>
      <text:p text:style-name="P3">Sentient beings have genuine moral standing. Their suffering matters. Their lives have real worth even if not the unconditional worth of persons.</text:p>
      <text:p text:style-name="P3">And Axiom X — we live in a world of real limits and pretending otherwise has consequences.</text:p>
      <text:p text:style-name="P3">Habitat destruction is where these two converge with full force. It's not just that you're killing individual animals whose suffering you can see and acknowledge. You're systematically eliminating the conditions under which entire populations of sentient beings can exist at all. It's suffering and death at a scale that makes factory farming look contained.</text:p>
      <text:p text:style-name="P3">But it goes further than animal habitat.</text:p>
      <text:p text:style-name="P3">If you take seriously that humans are part of nature rather than separate from it — which we established earlier as important — then degrading the planet isn't just bad for animals. It's self-destructive in the most literal sense. You are degrading the system you depend on for your own existence. The carrying capacity Axiom X references isn't just a social or political limit. It's biological and ecological. The planet has a set of living systems that make human life possible. Treating those systems as expendable is not just morally wrong toward other species. It's a form of collective suicide conducted slowly enough that no single generation has to fully reckon with what it's doing.</text:p>
      <text:p text:style-name="P3">And there's something else worth naming.</text:p>
      <text:p text:style-name="P3">The same structure that makes factory farming possible — the externalization of costs, the erasure of consequences from the balance sheet, the invisibility of suffering at scale — is operating in habitat destruction and climate change. The mechanism is identical. Future generations and non-human species <text:soft-page-break/>are the perfect victims for externalization because they have no voice in current decision making. They can't organize, can't vote, can't sue. Their interests are simply not counted because counting them would be economically inconvenient.</text:p>
      <text:p text:style-name="P3">Which connects directly to Axiom III. Our moral obligations extend beyond the present. Those who will inhabit the future have claims on us now. That axiom was written with future humans in mind but the framework we've built suggests it applies more broadly. Future sentient beings — human and non-human — have claims on how we treat the systems that will determine whether they can exist at all.</text:p>
      <text:p text:style-name="P3">So yes. The framework generates a strong position on habitat destruction and planetary degradation. Not as an add-on or a political preference. As a direct entailment of what we've already built.</text:p>
      <text:p text:style-name="Text_20_body"><text:span text:style-name="Emphasis"/></text:p>
      <text:p text:style-name="Text_20_body"><text:span text:style-name="Emphasis"/></text:p>
      <text:p text:style-name="Text_20_body"><text:span text:style-name="Emphasis"/></text:p>
      <text:p text:style-name="Horizontal_20_Line"/>
      <text:p text:style-name="Text_20_body"><text:span text:style-name="Strong_20_Emphasis">Why It Is True</text:span></text:p>
      <text:p text:style-name="Text_20_body">The claim that every person possesses equal and inviolable worth is not self-evident in the sense of requiring no argument. History suggests the opposite — that hierarchies of human worth are in fact the default condition of organized societies, and that the idea of universal dignity is a hard-won achievement that requires constant defense. So why do we hold it?</text:p>
      <text:p text:style-name="Text_20_body">The most rigorous answer comes from the philosopher Immanuel Kant, whose argument does not rest on sentiment or tradition but on the logic of what it means to be a person at all. Kant observed that persons are fundamentally different from objects. Objects have a price — they can be exchanged, replaced, valued instrumentally for what they produce or provide. Persons have dignity — a worth that is not exchangeable, not replaceable, not contingent on what they produce or provide. To treat a person as merely a means to your ends — as an instrument for your purposes rather than as an end in themselves — is to make a category error as fundamental as treating a living creature as a stone. It misidentifies what the thing actually is.</text:p>
      <text:p text:style-name="Text_20_body">This argument does not depend on religious belief or cultural tradition. It depends only on taking seriously what persons are. And once you take it seriously the implications are radical. If dignity is intrinsic to personhood rather than contingent on birth or behavior or belief, then no hierarchy of human worth can be justified. Not racial hierarchy. Not class hierarchy. Not hierarchy based on sex or origin or capability. The person who was born into poverty has the same worth as the person born into wealth. The person who has done terrible things retains the same fundamental worth as the person who has done admirable ones — which is not to say their actions are equivalent, but that their personhood is.</text:p>
      <text:p text:style-name="Text_20_body">This is genuinely demanding. Most people accept universal dignity in the abstract and then quietly install exceptions for the people they find contemptible. The axiom does not allow exceptions. That is not a flaw in the reasoning. It is the point.</text:p>
      <text:p text:style-name="Horizontal_20_Line"/>
      <text:p text:style-name="Text_20_body"><text:soft-page-break/><text:span text:style-name="Strong_20_Emphasis">An American Tradition</text:span></text:p>
      <text:p text:style-name="Text_20_body">America's relationship with this axiom is the central drama of its history — and it is a drama defined as much by betrayal as by aspiration.</text:p>
      <text:p text:style-name="Text_20_body">The Declaration of Independence announced it to the world: we hold these truths to be self-evident, that all men are created equal, that they are endowed with certain unalienable rights. As a statement of principle it remains one of the most powerful ever committed to paper. As a description of the society that produced it, it was immediately and obviously false. The men who signed it owned other human beings. The society they were founding would spend the next century and a half systematically violating the principle they had proclaimed.</text:p>
      <text:p text:style-name="Text_20_body">This is not a reason to dismiss the principle. It is a reason to take it more seriously than they did. The abolitionists understood this — they took the founders at their word and demanded the country live up to its own stated beliefs. Frederick Douglass, who had more reason than most to dismiss American ideals as hypocritical fiction, instead weaponized them. He held America to the standard it claimed for itself and refused to let it look away. The civil rights movement did the same a century later. The tradition of demanding that America actually mean what it says about human dignity is as authentically American as the original declaration.</text:p>
      <text:p text:style-name="Text_20_body">What that history reveals is something important: the axiom is not a description of what America has been. It is a standard that Americans have repeatedly invoked to demand that America become something better. It has survived every betrayal not because Americans have been consistently faithful to it but because the betrayals have consistently produced people willing to fight for it. That is a tradition worth inheriting.</text:p>
      <text:p text:style-name="Text_20_body">The darker lesson is also worth naming. Every systematic violation of human dignity in American history has followed the same pattern: first, the targeted group is defined as something less than fully human. Less intelligent. Less civilized. Less capable of self-governance. More dangerous. More threatening to the social order. The dehumanization always precedes the violation — it is the mechanism that makes the violation possible. People who recognize each other's full humanity find it very difficult to do to each other what history records. The axiom exists in part as a structural defense against that mechanism.</text:p>
      <text:p text:style-name="Horizontal_20_Line"/>
      <text:p text:style-name="Text_20_body"><text:span text:style-name="Strong_20_Emphasis">The Current Moment</text:span></text:p>
      <text:p text:style-name="Text_20_body">The pressure on human dignity in the current moment is real and comes from multiple directions simultaneously.</text:p>
      <text:p text:style-name="Text_20_body">The most visible is the dehumanization mechanics of the attention economy. Social media platforms optimize for engagement, and nothing drives engagement like outrage. Outrage requires an enemy. And enemies are most effectively constructed by stripping away their complexity — their particular circumstances, their inner lives, their capacity for growth and change — and reducing them to a symbol of what you fear or hate. The person disappears. The category remains. This is not a bug in the system. It is a feature of how outrage mechanics work. And it operates across the entire political spectrum with equal efficiency.</text:p>
      <text:p text:style-name="Text_20_body"><text:soft-page-break/>A subtler pressure comes from the reduction of persons to demographic categories. When people are addressed primarily as members of a group — defined by their race, their politics, their religion, their region — their individual personhood recedes. They become representatives of something rather than someone in particular. This happens on all sides and in all directions. It is a form of dignity violation that feels innocuous because it doesn't look like hatred. But it is the same category error Kant identified — treating persons as instances of a type rather than as ends in themselves.</text:p>
      <text:p text:style-name="Text_20_body">A third pressure is the treatment of certain populations as problems to be managed rather than people to be served. This shows up in how institutions talk about the communities they nominally exist to help — in the language of caseloads and interventions and outcomes, in the absence of genuine listening, in the design of systems that process people rather than serve them. When institutions stop seeing the persons in front of them they have already violated the axiom regardless of their stated intentions.</text:p>
      <text:p text:style-name="Horizontal_20_Line"/>
      <text:p text:style-name="Text_20_body"><text:span text:style-name="Strong_20_Emphasis">The Demand It Makes</text:span></text:p>
      <text:p text:style-name="Text_20_body">The demand this axiom makes is the most uncomfortable one in the document because it has no exceptions.</text:p>
      <text:p text:style-name="Text_20_body">It is easy to affirm the dignity of people we admire, people we agree with, people whose circumstances evoke our sympathy. The axiom is tested by the people we find contemptible — the person whose beliefs we consider dangerous, whose behavior we find reprehensible, whose choices we cannot understand or excuse. The axiom says: their worth is not contingent on our assessment of them. They remain persons. They remain ends in themselves.</text:p>
      <text:p text:style-name="Text_20_body">This does not mean all beliefs are equally valid — Axiom I addresses that. It does not mean all behavior is equally acceptable — Axiom IX addresses accountability directly. It means that the fundamental recognition we owe to persons cannot be withdrawn on the basis of what we think of them. The moment we allow ourselves to treat someone's dignity as conditional — as something they have forfeited through wrong belief or bad behavior — we have opened the door to exactly the mechanism that has produced every atrocity in human history.</text:p>
      <text:p text:style-name="Text_20_body">The Resolute Society holds this axiom as the ground on which everything else stands because it is. Remove it and every other commitment becomes negotiable. Keep it and you have something that can hold even under the pressure of genuine disagreement, genuine conflict, and genuine human failure. That is what we need it to do.</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1:06:30.427142172</meta:creation-date>
    <meta:generator>LibreOffice/24.2.7.2$Linux_X86_64 LibreOffice_project/420$Build-2</meta:generator>
    <dc:date>2026-06-17T11:23:01.014932253</dc:date>
    <meta:editing-duration>PT30M25S</meta:editing-duration>
    <meta:editing-cycles>8</meta:editing-cycles>
    <meta:document-statistic meta:table-count="0" meta:image-count="0" meta:object-count="0" meta:page-count="12" meta:paragraph-count="139" meta:word-count="5095" meta:character-count="32683" meta:non-whitespace-character-count="27624"/>
  </office:meta>
</office:document-meta>
</file>