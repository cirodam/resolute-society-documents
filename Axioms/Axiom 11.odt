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Emphasis">The living systems of the earth have integrity that exists independently of human valuation. They are not resources awaiting use. They are not assets to be managed. They are communities of extraordinary complexity, evolved over timescales that make human history invisible, whose logic and worth exist whether or not any human generation chooses to recognize them.</text:span></text:p>
      <text:p text:style-name="Text_20_body"><text:span text:style-name="Emphasis">We did not create these systems. We cannot recreate them once destroyed. We are not their managers — we are their inhabitants. We are biological creatures embedded in living processes we depend on absolutely and cannot exit. The pretense that we stand above nature, managing it for our purposes from outside, is not just philosophically wrong — it is the pretense that has made the current crisis possible.</text:span></text:p>
      <text:p text:style-name="Text_20_body"><text:span text:style-name="Emphasis">Our tenure here is brief. The earth is four and a half billion years old. What we call civilization is three hundred years old. The living systems we are degrading operated for timescales that dwarf our entire existence as a species. We are passing through something vastly older and larger than ourselves.</text:span></text:p>
      <text:p text:style-name="Text_20_body"><text:span text:style-name="Emphasis">This changes the burden of justification. The default is non-interference. The obligation falls on those who would extract, develop, or destroy — to demonstrate that what will be lost can be restored, that the use is worth the irreversible cost, and that those who come after have been considered. We do not ask why we should restrain ourselves. We ask why this use is worth what cannot be recovered.</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4:00:04.077914861</meta:creation-date>
    <dc:date>2026-06-17T14:03:12.178102997</dc:date>
    <meta:editing-duration>PT3M8S</meta:editing-duration>
    <meta:editing-cycles>1</meta:editing-cycles>
    <meta:document-statistic meta:table-count="0" meta:image-count="0" meta:object-count="0" meta:page-count="1" meta:paragraph-count="4" meta:word-count="242" meta:character-count="1476" meta:non-whitespace-character-count="1235"/>
    <meta:generator>LibreOffice/24.2.7.2$Linux_X86_64 LibreOffice_project/420$Build-2</meta:generator>
  </office:meta>
</office:document-meta>
</file>