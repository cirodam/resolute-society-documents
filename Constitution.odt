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P2" style:family="paragraph" style:parent-style-name="Text_20_body">
      <style:paragraph-properties fo:text-indent="0in" style:auto-text-indent="false"/>
      <style:text-properties fo:color="#1e3a5f" loext:opacity="100%" officeooo:rsid="003a8d3b" officeooo:paragraph-rsid="003a8d3b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IM FELL English SC" fo:font-size="10.5pt" fo:font-weight="bold" officeooo:paragraph-rsid="001f52f8" fo:background-color="transparent"/>
    </style:style>
    <style:style style:name="P4" style:family="paragraph" style:parent-style-name="First_20_Paragraph">
      <style:text-properties fo:color="#2c2c2c" loext:opacity="100%"/>
    </style:style>
    <style:style style:name="P5" style:family="paragraph" style:parent-style-name="Standard">
      <style:paragraph-properties style:line-height-at-least="0.198in"/>
      <style:text-properties fo:color="#2c2c2c" loext:opacity="100%" style:font-name="IM FELL English SC" fo:font-size="10.5pt" fo:font-weight="bold" fo:background-color="transparent"/>
    </style:style>
    <style:style style:name="P6" style:family="paragraph" style:parent-style-name="Standard">
      <style:paragraph-properties style:line-height-at-least="0.198in"/>
      <style:text-properties fo:color="#2c2c2c" loext:opacity="100%" style:font-name="IM FELL English SC" fo:background-color="transparent"/>
    </style:style>
    <style:style style:name="P7" style:family="paragraph" style:parent-style-name="First_20_Paragraph">
      <style:text-properties fo:color="#2c2c2c" loext:opacity="100%" officeooo:rsid="003fbffb" officeooo:paragraph-rsid="003fbffb"/>
    </style:style>
    <style:style style:name="P8" style:family="paragraph" style:parent-style-name="First_20_Paragraph">
      <style:text-properties fo:color="#2c2c2c" loext:opacity="100%" officeooo:rsid="00409c18" officeooo:paragraph-rsid="00409c18"/>
    </style:style>
    <style:style style:name="P9" style:family="paragraph" style:parent-style-name="First_20_Paragraph">
      <style:text-properties officeooo:rsid="00382684" officeooo:paragraph-rsid="00382684"/>
    </style:style>
    <style:style style:name="P10" style:family="paragraph" style:parent-style-name="First_20_Paragraph">
      <style:text-properties officeooo:rsid="003a2d9a" officeooo:paragraph-rsid="003a2d9a"/>
    </style:style>
    <style:style style:name="P11" style:family="paragraph" style:parent-style-name="First_20_Paragraph">
      <style:text-properties officeooo:paragraph-rsid="003a2d9a"/>
    </style:style>
    <style:style style:name="P12" style:family="paragraph" style:parent-style-name="First_20_Paragraph">
      <style:text-properties officeooo:rsid="003a8d3b" officeooo:paragraph-rsid="003a8d3b"/>
    </style:style>
    <style:style style:name="P13" style:family="paragraph" style:parent-style-name="First_20_Paragraph">
      <style:text-properties officeooo:rsid="003c30f6" officeooo:paragraph-rsid="003c30f6"/>
    </style:style>
    <style:style style:name="P14" style:family="paragraph" style:parent-style-name="First_20_Paragraph">
      <style:text-properties officeooo:rsid="003cb56f" officeooo:paragraph-rsid="003cb56f"/>
    </style:style>
    <style:style style:name="P15" style:family="paragraph" style:parent-style-name="First_20_Paragraph">
      <style:text-properties officeooo:rsid="003cb56f" officeooo:paragraph-rsid="003df6f0"/>
    </style:style>
    <style:style style:name="P16" style:family="paragraph" style:parent-style-name="First_20_Paragraph">
      <style:text-properties officeooo:rsid="003df6f0" officeooo:paragraph-rsid="003df6f0"/>
    </style:style>
    <style:style style:name="P17" style:family="paragraph" style:parent-style-name="First_20_Paragraph">
      <style:text-properties officeooo:rsid="003f5120" officeooo:paragraph-rsid="003f5120"/>
    </style:style>
    <style:style style:name="P18" style:family="paragraph" style:parent-style-name="Text_20_body">
      <style:paragraph-properties fo:text-indent="0in" style:auto-text-indent="false"/>
      <style:text-properties fo:color="#000000" loext:opacity="100%" officeooo:rsid="003a8d3b" officeooo:paragraph-rsid="003a8d3b"/>
    </style:style>
    <style:style style:name="P19" style:family="paragraph" style:parent-style-name="Text_20_body">
      <style:paragraph-properties fo:text-indent="0in" style:auto-text-indent="false"/>
      <style:text-properties fo:color="#1e3a5f" loext:opacity="100%" officeooo:rsid="003a8d3b" officeooo:paragraph-rsid="003a8d3b"/>
    </style:style>
    <style:style style:name="P20" style:family="paragraph" style:parent-style-name="Title">
      <style:text-properties fo:color="#1e3a5f" loext:opacity="100%" officeooo:rsid="00361d73" officeooo:paragraph-rsid="00361d73"/>
    </style:style>
    <style:style style:name="P21" style:family="paragraph" style:parent-style-name="Article">
      <style:paragraph-properties fo:text-indent="0in" style:auto-text-indent="false"/>
      <style:text-properties fo:color="#1e3a5f" loext:opacity="100%"/>
    </style:style>
    <style:style style:name="P22" style:family="paragraph" style:parent-style-name="Section">
      <style:paragraph-properties fo:text-indent="0in" style:auto-text-indent="false"/>
    </style:style>
    <style:style style:name="P23" style:family="paragraph" style:parent-style-name="Section">
      <style:paragraph-properties fo:text-indent="0in" style:auto-text-indent="false"/>
      <style:text-properties fo:color="#1e3a5f" loext:opacity="100%"/>
    </style:style>
    <style:style style:name="P24" style:family="paragraph" style:parent-style-name="Heading_20_1">
      <style:text-properties fo:color="#1e3a5f" loext:opacity="100%"/>
    </style:style>
    <style:style style:name="T1" style:family="text">
      <style:text-properties officeooo:rsid="0026ccf4"/>
    </style:style>
    <style:style style:name="T2" style:family="text">
      <style:text-properties fo:color="#1e3a5f" loext:opacity="100%"/>
    </style:style>
    <style:style style:name="T3" style:family="text">
      <style:text-properties fo:color="#1e3a5f" loext:opacity="100%" officeooo:rsid="00361d73"/>
    </style:style>
    <style:style style:name="T4" style:family="text">
      <style:text-properties fo:color="#1e3a5f" loext:opacity="100%" officeooo:rsid="003a2d9a"/>
    </style:style>
    <style:style style:name="T5" style:family="text">
      <style:text-properties officeooo:rsid="003a2d9a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3a8d3b"/>
    </style:style>
    <style:style style:name="T8" style:family="text">
      <style:text-properties officeooo:rsid="003a8d3b"/>
    </style:style>
    <style:style style:name="T9" style:family="text">
      <style:text-properties officeooo:rsid="003c30f6"/>
    </style:style>
    <style:style style:name="T10" style:family="text">
      <style:text-properties officeooo:rsid="00409c18"/>
    </style:style>
    <style:style style:name="T11" style:family="text">
      <style:text-properties officeooo:rsid="00426c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0">The Constitution of the Resolute Society of Athens, Georgia</text:p>
      <text:p text:style-name="P5"/>
      <text:p text:style-name="P6"/>
      <text:h text:style-name="P24" text:outline-level="1">Preamble</text:h>
      <text:p text:style-name="P6"/>
      <text:p text:style-name="P4">There are moments in history that test the character of a nation, that demand more than ordinary times prepare <text:span text:style-name="T1">any person</text:span> for. We believe we are living in such a moment. We do not take that lightly. We resolve to meet it together.</text:p>
      <text:p text:style-name="P6"/>
      <text:h text:style-name="P21" text:outline-level="1">I. <text:span text:style-name="T5">General Assembly</text:span></text:h>
      <text:h text:style-name="P22" text:outline-level="2"><text:span text:style-name="T3">S</text:span><text:span text:style-name="T2">ection 1</text:span></text:h>
      <text:p text:style-name="P10">The society’s chief decision-making body shall be a general assembly of 16 full society members.</text:p>
      <text:h text:style-name="P23" text:outline-level="2">Section 2</text:h>
      <text:p text:style-name="P10">General Assembly members shall be drawn via sortition for 1-year terms. The annual draw shall be conducted annually on November 11<text:span text:style-name="T6">th</text:span>. Members will be drawn for a term spanning from January 1<text:span text:style-name="T6">st</text:span> until December 31<text:span text:style-name="T6">st</text:span> of the following year.</text:p>
      <text:h text:style-name="P23" text:outline-level="2">Section 3</text:h>
      <text:p text:style-name="P14">Society members may not serve consecutive terms in the General Assembly.</text:p>
      <text:h text:style-name="P23" text:outline-level="2">Section 3</text:h>
      <text:p text:style-name="P11"><text:span text:style-name="T5">The General Assembly has no inherent power except that which the society’s membership delegates to it. At any time the society may </text:span><text:span text:style-name="T8">exercise its authority to dissolve the General Assembly and command an immediate redraw.</text:span></text:p>
      <text:h text:style-name="P22" text:outline-level="2"><text:soft-page-break/>Section 4</text:h>
      <text:p text:style-name="P16">While the General Assembly members are the final decision-makers on any matter before them, they’re expected to hear the views of society members when proffered.</text:p>
      <text:p text:style-name="P9"/>
      <text:h text:style-name="Heading_20_1" text:outline-level="1"><text:span text:style-name="T2">II. </text:span><text:span text:style-name="T4">Petitions and Referenda</text:span></text:h>
      <text:h text:style-name="P23" text:outline-level="2">Section <text:span text:style-name="T8">4</text:span></text:h>
      <text:p text:style-name="P10">The <text:span text:style-name="T8">Society shall conduct an annual referendum on November 10</text:span><text:span text:style-name="T7">th</text:span><text:span text:style-name="T8">. The General Assembly is responsible for creating the ballot for this purpose.</text:span></text:p>
      <text:h text:style-name="P23" text:outline-level="2">Section 5</text:h>
      <text:p text:style-name="P12">The Society shall convey its interests and desires to the General Assembly via petitions. It is the responsibility of that body to give language to these desires.</text:p>
      <text:h text:style-name="P24" text:outline-level="1">III. Colleges</text:h>
      <text:p text:style-name="P2">Section 6</text:p>
      <text:p text:style-name="P18">The Society may establish colleges, recognized groups of peers with a common purpose.</text:p>
      <text:p text:style-name="P2">Section 7</text:p>
      <text:p text:style-name="P18">Colleges may govern their internal affairs and establish their own entrance criteria for prospective members. These criteria are primarily in order to assess competence.</text:p>
      <text:p text:style-name="P2">Section 8</text:p>
      <text:p text:style-name="P18">In the event that a person is denied admission to a college, they may appeal their denial to the General Assembly, which will then judge if the colleges rules are a fair judge of competency and if they college correctly and fairly applied their rules.</text:p>
      <text:h text:style-name="P24" text:outline-level="1">IV. Committees</text:h>
      <text:p text:style-name="P2">Section 9</text:p>
      <text:p text:style-name="P18">The General Assembly may delegate its authority to permanent and ad hoc committees at its discretion.</text:p>
      <text:p text:style-name="P2"><text:soft-page-break/>Section 10</text:p>
      <text:p text:style-name="P18">Committees shall be drawn via sortition. They may be drawn from a college only when subject matter expertise is required.</text:p>
      <text:p text:style-name="P18"/>
      <text:h text:style-name="P21" text:outline-level="1">V. Executive Officers</text:h>
      <text:h text:style-name="P23" text:outline-level="2">Section 11</text:h>
      <text:p text:style-name="First_20_Paragraph">The <text:span text:style-name="T9">day-to-day function of the society shall be the responsibility of its officer corps. Each member of this corps being responsible for one division of function.</text:span></text:p>
      <text:h text:style-name="P23" text:outline-level="2">Section 12</text:h>
      <text:p text:style-name="First_20_Paragraph">The society may establish services under the responsibility as it determines serves its needs.</text:p>
      <text:h text:style-name="P23" text:outline-level="2">Section 13</text:h>
      <text:p text:style-name="P13">Executive Officers serve a term of one year.</text:p>
      <text:h text:style-name="P23" text:outline-level="2">Section 14</text:h>
      <text:p text:style-name="P13">Executive Officers are the primary decision-makers in the area of control, especially in cases of emergency. However they are ultimately responsible to the General Assembly which may dismiss them</text:p>
      <text:h text:style-name="P23" text:outline-level="2">Section 15</text:h>
      <text:p text:style-name="P17">Officers are expected to lead divisions that can function in extreme stress while remaining faithful and responsive to the desires of the people in their charge.</text:p>
      <text:p text:style-name="First_20_Paragraph"/>
      <text:h text:style-name="P21" text:outline-level="1">VI. Sortition</text:h>
      <text:h text:style-name="P23" text:outline-level="2">Section 15</text:h>
      <text:p text:style-name="P15">For the purpose of sortition every eligible society member must be assigned a sortition number.</text:p>
      <text:h text:style-name="P23" text:outline-level="2">Section 16</text:h>
      <text:p text:style-name="P14">Sortition numbers must be consecutive</text:p>
      <text:h text:style-name="P23" text:outline-level="2"><text:soft-page-break/>Section 17</text:h>
      <text:p text:style-name="P14">In order to conduct sortition, 4 10-sided dice are required. On person roles a die for each decimal place. A number is then constructed from the rolled dice. The person whose name corresponds to that number has been selected to serve.</text:p>
      <text:p text:style-name="P4"/>
      <text:p text:style-name="P7">VII. General Provisions</text:p>
      <text:p text:style-name="P7"/>
      <text:p text:style-name="P7">Section 18. </text:p>
      <text:p text:style-name="P7">General Assembly members, committee members, and executive officers must exclusively serve the interests of the societies members.</text:p>
      <text:p text:style-name="P7"/>
      <text:p text:style-name="P7">Section 19. </text:p>
      <text:p text:style-name="P7">Any General Assembly member, committee member, or executive officer that violates their oath shall be summarily removed from their position and subject to disciplinary action.</text:p>
      <text:p text:style-name="P7"/>
      <text:p text:style-name="P7">VIII. Named Executive Officers</text:p>
      <text:p text:style-name="P7"/>
      <text:p text:style-name="P7">Section 20. </text:p>
      <text:p text:style-name="P7">Parliamentarian. Responsible for <text:span text:style-name="T10">assisting the General Assembly with making decisions</text:span></text:p>
      <text:p text:style-name="P7"/>
      <text:p text:style-name="P8">Section 21. </text:p>
      <text:p text:style-name="P8">Ledger Keeper. Responsible for tracking mutual obligation among society membership</text:p>
      <text:p text:style-name="P8"/>
      <text:p text:style-name="P8">Section 22.</text:p>
      <text:p text:style-name="P8">Treasurer. Responsible for tracking obligation from the society to its members.</text:p>
      <text:p text:style-name="P8"/>
      <text:p text:style-name="P8">Section 23.</text:p>
      <text:p text:style-name="P8">Food security Officer. Responsible for finding food, cooking it, and getting it in mouths.</text:p>
      <text:p text:style-name="P8"/>
      <text:p text:style-name="P8">Section 24.</text:p>
      <text:p text:style-name="P8">Housing Security Officer. Responsible for identifying housing insecure members and making sure that no one sleeps at night without a roof over their head.</text:p>
      <text:p text:style-name="P8"/>
      <text:p text:style-name="P8">Section 25.</text:p>
      <text:p text:style-name="P8">Chief Medical Officer. Responsible for community health worker program as well as attaining medical supplies.</text:p>
      <text:p text:style-name="P8"/>
      <text:p text:style-name="P8">Section 26.</text:p>
      <text:p text:style-name="P8"><text:soft-page-break/>Liquid Fuels Officer. Responsible for sourcing and storing liquid fuels.</text:p>
      <text:p text:style-name="P8"/>
      <text:p text:style-name="P8">Section 27.</text:p>
      <text:p text:style-name="P8">Chief machinist. Responsible for metal-shaping and manufacturing.</text:p>
      <text:p text:style-name="P8"/>
      <text:p text:style-name="P8">Section 28.</text:p>
      <text:p text:style-name="P8">Chief Mediator. Responsible for addressing disputes between memb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M FELL English SC" svg:font-family="'IM FELL English SC'" style:font-pitch="variable"/>
    <style:font-face style:name="IM FELL English SC1" svg:font-family="'IM FELL English SC'" style:font-adornments="Bold" style:font-pitch="variable"/>
    <style:font-face style:name="IM FELL English SC2" svg:font-family="'IM FELL English SC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adornments="Regular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indent="0.2in" style:auto-text-indent="false"/>
      <style:text-properties style:font-name="Libre Baskerville" fo:font-family="'Libre Baskerville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M FELL English SC1" fo:font-family="'IM FELL English SC'" style:font-style-name="Bold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IM FELL English SC1" fo:font-family="'IM FELL English SC'" style:font-style-name="Bold" style:font-pitch="variable" fo:font-size="11pt" fo:font-weight="normal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1701in" fo:margin-bottom="0.1799in" style:contextual-spacing="false" fo:text-align="center" style:justify-single-word="false"/>
      <style:text-properties style:font-name="IM FELL English SC2" fo:font-family="'IM FELL English SC'" style:font-style-name="Regular" style:font-pitch="variable" fo:font-size="2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IM FELL English SC2" fo:font-family="'IM FELL English SC'" style:font-style-name="Regular" style:font-pitch="variable" fo:font-size="13pt" style:font-size-asian="18pt" style:font-size-complex="18pt"/>
    </style:style>
    <style:style style:name="First_20_Paragraph" style:display-name="First Paragraph" style:family="paragraph" style:parent-style-name="Standard" style:master-page-name="">
      <style:paragraph-properties fo:text-indent="0in" style:auto-text-indent="false" style:page-number="auto"/>
    </style:style>
    <style:style style:name="Article" style:family="paragraph" style:parent-style-name="Heading_20_1" style:default-outline-level="" style:list-style-name="" style:master-page-name="">
      <style:paragraph-properties fo:margin-top="0.1701in" fo:margin-bottom="0in" style:contextual-spacing="false" style:page-number="auto"/>
    </style:style>
    <style:style style:name="Section" style:family="paragraph" style:parent-style-name="Heading_20_2" style:default-outline-level="" style:list-style-name="" style:master-page-name="">
      <style:paragraph-properties fo:margin-top="0.1402in" fo:margin-bottom="0.1in" style:contextual-spacing="false" style:page-number="auto"/>
      <style:text-properties fo:font-size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="0.0201in" fo:border-left="none" fo:border-right="none" fo:border-top="none" fo:border-bottom="0.06pt solid #000000"/>
      <style:text-properties fo:color="#1e3a5f" loext:opacity="100%" officeooo:rsid="00207e9d" officeooo:paragraph-rsid="00207e9d"/>
    </style:style>
    <style:style style:name="MT1" style:family="text">
      <style:text-properties officeooo:rsid="00426cbc"/>
    </style:style>
    <style:page-layout style:name="Mpm1">
      <style:page-layout-properties fo:page-width="8.5in" fo:page-height="11in" style:num-format="1" style:print-orientation="portrait" fo:margin-top="1.25in" fo:margin-bottom="1.2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Resolute Societies of <text:span text:style-name="MT1">Athens, Georgi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3:48:24.763225727</meta:creation-date>
    <dc:date>2026-06-08T22:34:22.186470105</dc:date>
    <meta:editing-duration>PT2H22M30S</meta:editing-duration>
    <meta:editing-cycles>27</meta:editing-cycles>
    <meta:generator>LibreOffice/24.2.7.2$Linux_X86_64 LibreOffice_project/420$Build-2</meta:generator>
    <meta:document-statistic meta:table-count="0" meta:image-count="0" meta:object-count="0" meta:page-count="5" meta:paragraph-count="74" meta:word-count="751" meta:character-count="4757" meta:non-whitespace-character-count="4076"/>
  </office:meta>
</office:document-meta>
</file>