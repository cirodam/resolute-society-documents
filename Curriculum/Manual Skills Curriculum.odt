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style style:name="P2" style:family="paragraph" style:parent-style-name="Subtitle">
      <style:text-properties fo:color="#1e3a5f" loext:opacity="100%"/>
    </style:style>
    <style:style style:name="P3" style:family="paragraph" style:parent-style-name="Standard">
      <style:paragraph-properties fo:margin-left="0in" fo:margin-right="0in" style:line-height-at-least="0.198in" fo:text-indent="0in" style:auto-text-indent="false"/>
      <style:text-properties fo:color="#111111" loext:opacity="100%" style:font-name="IM FELL English SC" fo:font-size="10.5pt" fo:font-weight="bold" officeooo:paragraph-rsid="001f52f8" fo:background-color="transparent"/>
    </style:style>
    <style:style style:name="P4" style:family="paragraph" style:parent-style-name="First_20_Paragraph">
      <style:text-properties fo:color="#2c2c2c" loext:opacity="100%"/>
    </style:style>
    <style:style style:name="P5" style:family="paragraph" style:parent-style-name="Standard">
      <style:paragraph-properties style:line-height-at-least="0.198in"/>
      <style:text-properties fo:color="#2c2c2c" loext:opacity="100%" style:font-name="IM FELL English SC" fo:font-size="10.5pt" fo:font-weight="bold" fo:background-color="transparent"/>
    </style:style>
    <style:style style:name="P6" style:family="paragraph" style:parent-style-name="Standard">
      <style:paragraph-properties style:line-height-at-least="0.198in"/>
      <style:text-properties fo:color="#2c2c2c" loext:opacity="100%" style:font-name="IM FELL English SC" fo:background-color="transparent"/>
    </style:style>
    <style:style style:name="P7" style:family="paragraph" style:parent-style-name="Standard">
      <style:text-properties fo:color="#2c2c2c" loext:opacity="100%"/>
    </style:style>
    <style:style style:name="P8" style:family="paragraph" style:parent-style-name="First_20_Paragraph">
      <style:text-properties fo:color="#2c2c2c" loext:opacity="100%" officeooo:paragraph-rsid="003a82d1"/>
    </style:style>
    <style:style style:name="P9" style:family="paragraph" style:parent-style-name="First_20_Paragraph">
      <style:text-properties fo:color="#2c2c2c" loext:opacity="100%" officeooo:paragraph-rsid="003afd50"/>
    </style:style>
    <style:style style:name="P10" style:family="paragraph" style:parent-style-name="Title">
      <style:text-properties fo:color="#1e3a5f" loext:opacity="100%" officeooo:rsid="003fa145" officeooo:paragraph-rsid="003fa145"/>
    </style:style>
    <style:style style:name="P11" style:family="paragraph" style:parent-style-name="Heading_20_1">
      <style:text-properties fo:color="#1e3a5f" loext:opacity="100%"/>
    </style:style>
    <style:style style:name="P12" style:family="paragraph" style:parent-style-name="Heading_20_2">
      <style:text-properties fo:color="#1e3a5f" loext:opacity="100%"/>
    </style:style>
    <style:style style:name="P13" style:family="paragraph" style:parent-style-name="Heading_20_2">
      <style:paragraph-properties style:line-height-at-least="0.198in" fo:text-indent="0in" style:auto-text-indent="false"/>
      <style:text-properties fo:color="#2c2c2c" loext:opacity="100%"/>
    </style:style>
    <style:style style:name="P14" style:family="paragraph" style:parent-style-name="Heading_20_4">
      <style:text-properties fo:color="#2c2c2c" loext:opacity="100%"/>
    </style:style>
    <style:style style:name="P15" style:family="paragraph" style:parent-style-name="Text_20_body">
      <style:text-properties fo:color="#2c2c2c" loext:opacity="100%"/>
    </style:style>
    <style:style style:name="P16" style:family="paragraph" style:parent-style-name="Text_20_body">
      <style:paragraph-properties style:line-height-at-least="0.198in" fo:text-indent="0in" style:auto-text-indent="false"/>
      <style:text-properties fo:color="#2c2c2c" loext:opacity="100%"/>
    </style:style>
    <style:style style:name="P17" style:family="paragraph" style:parent-style-name="Text_20_body" style:list-style-name="L1"/>
    <style:style style:name="P18" style:family="paragraph" style:parent-style-name="Text_20_body" style:list-style-name="L1">
      <style:paragraph-properties fo:margin-top="0in" fo:margin-bottom="0in" style:contextual-spacing="false"/>
    </style:style>
    <style:style style:name="T1" style:family="text">
      <style:text-properties officeooo:rsid="00207e9d"/>
    </style:style>
    <style:style style:name="T2" style:family="text">
      <style:text-properties officeooo:rsid="0024f617"/>
    </style:style>
    <style:style style:name="T3" style:family="text">
      <style:text-properties officeooo:rsid="0026ccf4"/>
    </style:style>
    <style:style style:name="T4" style:family="text">
      <style:text-properties officeooo:rsid="0027efd4"/>
    </style:style>
    <style:style style:name="T5" style:family="text">
      <style:text-properties officeooo:rsid="00297856"/>
    </style:style>
    <style:style style:name="T6" style:family="text">
      <style:text-properties officeooo:rsid="002a39be"/>
    </style:style>
    <style:style style:name="T7" style:family="text">
      <style:text-properties officeooo:rsid="002b7d10"/>
    </style:style>
    <style:style style:name="T8" style:family="text">
      <style:text-properties officeooo:rsid="002cc6bf"/>
    </style:style>
    <style:style style:name="T9" style:family="text">
      <style:text-properties officeooo:rsid="002cf6af"/>
    </style:style>
    <style:style style:name="T10" style:family="text">
      <style:text-properties officeooo:rsid="002ec032"/>
    </style:style>
    <style:style style:name="T11" style:family="text">
      <style:text-properties officeooo:rsid="002f17f7"/>
    </style:style>
    <style:style style:name="T12" style:family="text">
      <style:text-properties officeooo:rsid="00310cfc"/>
    </style:style>
    <style:style style:name="T13" style:family="text">
      <style:text-properties officeooo:rsid="003210b5"/>
    </style:style>
    <style:style style:name="T14" style:family="text">
      <style:text-properties officeooo:rsid="003732d9"/>
    </style:style>
    <style:style style:name="T15" style:family="text">
      <style:text-properties officeooo:rsid="003783fc"/>
    </style:style>
    <style:style style:name="T16" style:family="text">
      <style:text-properties officeooo:rsid="003a82d1"/>
    </style:style>
    <style:style style:name="T17" style:family="text">
      <style:text-properties officeooo:rsid="00438421"/>
    </style:style>
    <style:style style:name="T18" style:family="text">
      <style:text-properties officeooo:rsid="0045f162"/>
    </style:style>
    <style:style style:name="T19" style:family="text">
      <style:text-properties officeooo:rsid="00541d4b"/>
    </style:style>
    <style:style style:name="T20" style:family="text">
      <style:text-properties officeooo:rsid="005801d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0"><text:span text:style-name="T20">Manual Skills </text:span>Program</text:p>
      <text:p text:style-name="P2"/>
      <text:p text:style-name="P5"/>
      <text:p text:style-name="P6"/>
      <text:h text:style-name="P11" text:outline-level="1">Preamble</text:h>
      <text:p text:style-name="P6"/>
      <text:p text:style-name="P4">There are moments in history that test the character of a nation, that demand more than ordinary times prepare <text:span text:style-name="T3">any person</text:span> for. We believe we are living in such a moment. We do not take that lightly. We resolve to meet it together.</text:p>
      <text:p text:style-name="P6"/>
      <text:h text:style-name="P11" text:outline-level="1">Foundational Principles</text:h>
      <text:h text:style-name="P13" text:outline-level="2"><text:span text:style-name="Strong_20_Emphasis">Course A: The Manual Skills</text:span></text:h>
      <text:h text:style-name="Heading_20_3" text:outline-level="3">A Working Society Course in Household Capability Without Infrastructure</text:h>
      <text:p text:style-name="Text_20_body"><text:span text:style-name="Strong_20_Emphasis">Format:</text:span> Workshop — hands-on, not seminar. Skills are practiced, not just explained. <text:span text:style-name="Strong_20_Emphasis">Session length:</text:span> 2–3 hours <text:span text:style-name="Strong_20_Emphasis">Frequency:</text:span> Weekly or biweekly <text:span text:style-name="Strong_20_Emphasis">Duration:</text:span> 10 core sessions plus optional deepening sessions <text:span text:style-name="Strong_20_Emphasis">Setting:</text:span> Wherever the skill lives — kitchen, yard, Craft Commons, member property <text:span text:style-name="Strong_20_Emphasis">Group size:</text:span> 6–12. Larger than the cognitive courses because hands-on work scales better and more people means more practice iterations</text:p>
      <text:p text:style-name="Horizontal_20_Line"/>
      <text:h text:style-name="Heading_20_3" text:outline-level="3">The Spine of the Course</text:h>
      <text:p text:style-name="Text_20_body">Every session follows the same structure:</text:p>
      <text:p text:style-name="Text_20_body"><text:span text:style-name="Strong_20_Emphasis">What the machine does</text:span> — the actual physical or chemical process the appliance is performing. Not how the machine works mechanically — what it accomplishes for the food, the clothes, the body, the house.</text:p>
      <text:p text:style-name="Text_20_body"><text:soft-page-break/><text:span text:style-name="Strong_20_Emphasis">What you need to replicate it</text:span> — the inputs: heat, agitation, time, cold, airflow, whatever the process requires. What you have available. What substitutes work and why.</text:p>
      <text:p text:style-name="Text_20_body"><text:span text:style-name="Strong_20_Emphasis">How to do it</text:span> — the actual practice. Done in the session, not described.</text:p>
      <text:p text:style-name="Text_20_body"><text:span text:style-name="Strong_20_Emphasis">How to know it worked</text:span> — the judgment layer. What does success look and feel like? What are the signs something went wrong?</text:p>
      <text:p text:style-name="Text_20_body"><text:span text:style-name="Strong_20_Emphasis">What the actual risks are</text:span> — honest, specific, not alarming. Which mistakes are recoverable and which aren't.</text:p>
      <text:p text:style-name="Horizontal_20_Line"/>
      <text:h text:style-name="Heading_20_3" text:outline-level="3">The Safety Tier</text:h>
      <text:p text:style-name="Text_20_body">Stated once clearly at the start of the course and referenced when relevant:</text:p>
      <text:p text:style-name="Text_20_body"><text:span text:style-name="Strong_20_Emphasis">Tier 1 — Comfort and inconvenience.</text:span> Getting it wrong makes life harder or less pleasant. Clothes don't get fully clean. Food tastes worse. These are recoverable mistakes.</text:p>
      <text:p text:style-name="Text_20_body"><text:span text:style-name="Strong_20_Emphasis">Tier 2 — Genuine safety risk.</text:span> Getting it wrong can make someone seriously ill or worse. Food temperature management. Heat and cold exposure. Medication storage. These are not alarming — they are honest. The course treats adults as capable of handling accurate information about actual risk.</text:p>
      <text:p text:style-name="Horizontal_20_Line"/>
      <text:h text:style-name="Heading_20_3" text:outline-level="3">Session 1 — Food Safety: The Temperature Story</text:h>
      <text:p text:style-name="Text_20_body"><text:span text:style-name="Strong_20_Emphasis">What the refrigerator does</text:span> Controls temperature to slow bacterial reproduction. That's it. Bacteria that cause foodborne illness reproduce rapidly between 40°F and 140°F — the danger zone. Below 40°F reproduction slows to near-zero. Above 140°F bacteria are killed. The refrigerator keeps food below 40°F. Everything else follows from that.</text:p>
      <text:p text:style-name="Text_20_body"><text:span text:style-name="Strong_20_Emphasis">The numbers that matter</text:span> 40°F — the safe upper limit for refrigerated food 140°F — the lower limit of the kill zone 4 hours — the cumulative time food can spend in the danger zone before risk becomes significant 2 hours — the limit in ambient temperatures above 90°F</text:p>
      <text:p text:style-name="Text_20_body"><text:span text:style-name="Strong_20_Emphasis">The power outage scenario</text:span> A full refrigerator holds temperature for approximately 4 hours without power. A full freezer holds for 24–48 hours. Half-<text:soft-page-break/>full: roughly half those times. Keep the doors closed — every opening loses 20–30 minutes of safe time.</text:p>
      <text:p text:style-name="Text_20_body">What to assess: does the food feel refrigerator-cold or room-temperature? Has it been in the danger zone for more than 4 hours cumulatively? When in doubt about meat, poultry, fish, eggs, and cut produce — discard. When in doubt about hard cheeses, whole fruits, vegetables, condiments — probably fine.</text:p>
      <text:p text:style-name="Text_20_body"><text:span text:style-name="Strong_20_Emphasis">The foods people don't know are safe at room temperature</text:span> Hard cheeses. Whole uncut fruits and vegetables. Bread. Butter for short periods. Vinegar-based condiments. Most commercially canned goods once unopened. Dried goods. This is a longer list than most people realize — and knowing it prevents unnecessary food loss during a crisis.</text:p>
      <text:p text:style-name="Text_20_body"><text:span text:style-name="Strong_20_Emphasis">The foods people don't know are dangerous</text:span> Cooked rice left at room temperature — one of the most common sources of food poisoning. Cooked potatoes. Any cooked starch. Cut melon. These feel innocuous and aren't.</text:p>
      <text:p text:style-name="Text_20_body"><text:span text:style-name="Strong_20_Emphasis">Hands-on</text:span> Members bring various food items. Group works through them: safe at room temperature or not, and why. Temperature assessment without a thermometer — what does food that has been in the danger zone too long look, smell, and feel like? And critically: when those signals are absent but time has elapsed, what do you do?</text:p>
      <text:p text:style-name="Horizontal_20_Line"/>
      <text:h text:style-name="Heading_20_3" text:outline-level="3">Session 2 — Food Storage Without Refrigeration</text:h>
      <text:p text:style-name="Text_20_body"><text:span text:style-name="Strong_20_Emphasis">What refrigeration replaced</text:span> Every technique in this session is older than electricity. Humans stored food safely for millennia before mechanical refrigeration. The methods work because they address the same underlying problem: preventing bacterial reproduction and enzymatic degradation.</text:p>
      <text:p text:style-name="Text_20_body"><text:span text:style-name="Strong_20_Emphasis">The methods and their underlying logic</text:span></text:p>
      <text:p text:style-name="Text_20_body"><text:span text:style-name="Emphasis">Drying/dehydration</text:span> — bacteria need water to reproduce. Remove the water, reproduction stops. Applies to fruit, vegetables, meat, beans, grains. The process: sufficient heat or airflow to remove moisture faster than spoilage can occur. Sun drying works in Georgia summer. A low oven works year-round. A dehydrator is the machine version.</text:p>
      <text:p text:style-name="Text_20_body"><text:span text:style-name="Emphasis">Salt curing</text:span> — salt draws water out of food through osmosis, and high salt concentration directly inhibits bacterial growth. The principle behind jerky, salt <text:soft-page-break/>pork, cured fish, sauerkraut. Also the principle behind why salted butter keeps longer than unsalted.</text:p>
      <text:p text:style-name="Text_20_body"><text:span text:style-name="Emphasis">Fermentation</text:span> — controlled bacterial growth that produces an acidic environment hostile to harmful bacteria. Sauerkraut, kimchi, pickles, yogurt, sourdough. The useful bacteria outcompete the dangerous ones. This is not preservation by elimination — it's preservation by competition.</text:p>
      <text:p text:style-name="Text_20_body"><text:span text:style-name="Emphasis">Acid preservation</text:span> — harmful bacteria generally cannot survive in high-acid environments. Vinegar pickling. Lemon juice on cut fruit. The science behind why pickled foods keep.</text:p>
      <text:p text:style-name="Text_20_body"><text:span text:style-name="Emphasis">Fat sealing</text:span> — confit, lard-sealed meat, oil-packed vegetables. Fat creates a barrier against oxygen and moisture. Works in combination with other methods.</text:p>
      <text:p text:style-name="Text_20_body"><text:span text:style-name="Emphasis">Sugar</text:span> — high sugar concentration draws water out of bacteria through osmosis, the same mechanism as salt. Jams, preserves, honey-packed fruit.</text:p>
      <text:p text:style-name="Text_20_body"><text:span text:style-name="Emphasis">Root cellaring</text:span> — cool, dark, humid storage for root vegetables, apples, squash, potatoes. The machine version is the refrigerator crisper drawer. The original version is a hole in the ground or an unheated basement.</text:p>
      <text:p text:style-name="Text_20_body"><text:span text:style-name="Strong_20_Emphasis">What keeps at room temperature in Georgia and for how long</text:span> Honey — indefinitely. Hard grains — years in sealed containers. Dried beans and legumes — years. Whole spices — years. Vinegar — indefinitely. Commercially canned goods — 2–5 years typically. Home-canned goods properly processed — 1 year recommended. Hard cheeses waxed or vacuum sealed — weeks to months.</text:p>
      <text:p text:style-name="Text_20_body"><text:span text:style-name="Strong_20_Emphasis">What doesn't keep and why</text:span> High-moisture, high-protein, low-acid foods. Fresh meat, dairy, cooked starches, cut produce. These are the refrigerator's primary job. When refrigeration is absent these require immediate use or preservation.</text:p>
      <text:p text:style-name="Text_20_body"><text:span text:style-name="Strong_20_Emphasis">Hands-on</text:span> Start a fermentation — sauerkraut or simple pickles. Examine and taste examples of preserved foods. Practice assessing whether preserved food is still safe — what does spoilage look like in fermented food versus in fresh food?</text:p>
      <text:p text:style-name="Horizontal_20_Line"/>
      <text:h text:style-name="Heading_20_3" text:outline-level="3">Session 3 — Cooking Without Electricity</text:h>
      <text:p text:style-name="Text_20_body"><text:span text:style-name="Strong_20_Emphasis">What the electric stove and oven do</text:span> Deliver controlled heat to food. That's the entire function. The source of the heat is completely interchangeable as long as it delivers the right temperature for the right duration.</text:p>
      <text:p text:style-name="Text_20_body"><text:soft-page-break/><text:span text:style-name="Strong_20_Emphasis">The heat sources available without electricity</text:span></text:p>
      <text:p text:style-name="Text_20_body"><text:span text:style-name="Emphasis">Propane camp stove</text:span> — the most practical immediate substitute. Behaves almost identically to a gas burner. Fuel is cheap and stores well. Two-burner stove runs a household kitchen adequately. Limitations: must be used outdoors or with serious ventilation — carbon monoxide risk indoors is real and serious. This is the Tier 2 risk in this session.</text:p>
      <text:p text:style-name="Text_20_body"><text:span text:style-name="Emphasis">Single-burner butane stove</text:span> — smaller, cheaper, good for one-pot cooking. Same ventilation requirement.</text:p>
      <text:p text:style-name="Text_20_body"><text:span text:style-name="Emphasis">Rocket stove</text:span> — burns small-diameter wood extremely efficiently through a specific geometry that creates a powerful draft. Produces intense focused heat from twigs and small branches. Can be built from cinder blocks in twenty minutes or purchased. Outdoors only. Remarkable fuel efficiency — a handful of sticks boils a pot of water.</text:p>
      <text:p text:style-name="Text_20_body"><text:span text:style-name="Emphasis">Open fire</text:span> — the oldest method. Less controllable than the others. Works. Requires more skill to regulate heat and takes longer. The coals matter more than the flame — cooking over coals rather than flame gives more consistent heat.</text:p>
      <text:p text:style-name="Text_20_body"><text:span text:style-name="Emphasis">Solar cooker</text:span> — works in Georgia summer without any fuel. A reflective box or parabolic dish focuses sunlight to cooking temperatures. Slow but real. Appropriate for long-cook items — beans, grains, stews.</text:p>
      <text:p text:style-name="Text_20_body"><text:span text:style-name="Strong_20_Emphasis">The techniques that matter most without electricity</text:span></text:p>
      <text:p text:style-name="Text_20_body"><text:span text:style-name="Emphasis">One-pot cooking</text:span> — the discipline of the single heat source. Soups, stews, beans, rice, porridge. Nutritionally complete, fuel-efficient, minimal dishes.</text:p>
      <text:p text:style-name="Text_20_body"><text:span text:style-name="Emphasis">retained heat cooking</text:span> — bring food to a full boil, then wrap the pot heavily in blankets or place in an insulated box. The retained heat continues cooking for hours without fuel. A pot of beans brought to boil for 15 minutes and wrapped well will be fully cooked in 2–3 hours. This is the principle behind hay boxes, fireless cookers, and modern thermal cookers. Massively fuel-efficient.</text:p>
      <text:p text:style-name="Text_20_body"><text:span text:style-name="Emphasis">Pressure cooking over flame</text:span> — a manual pressure cooker over a camp stove cuts cooking times for beans and tough cuts dramatically. Important for fuel conservation.</text:p>
      <text:p text:style-name="Text_20_body"><text:span text:style-name="Emphasis">Baking without an oven</text:span> — dutch oven baking over coals. Cast iron skillet bread on a burner. The principle: enclose the food, apply heat from below and above, control the temperature by coal quantity and distance.</text:p>
      <text:p text:style-name="Text_20_body"><text:soft-page-break/><text:span text:style-name="Strong_20_Emphasis">Carbon monoxide — the one non-negotiable</text:span> Any combustion appliance used indoors without adequate ventilation produces carbon monoxide. It is colorless, odorless, and lethal. Propane stoves, gas grills, charcoal — none of these indoors, ever, regardless of how cold or desperate the situation is. This kills people in exactly the circumstances this course is preparing for. It is the single most important safety fact in this session.</text:p>
      <text:p text:style-name="Text_20_body"><text:span text:style-name="Strong_20_Emphasis">Hands-on</text:span> Cook a complete meal on a camp stove outdoors. Practice retained heat cooking — start a pot of grains, wrap it, check it an hour later. If facilities allow, use a rocket stove. The session ends with eating what was made.</text:p>
      <text:p text:style-name="Horizontal_20_Line"/>
      <text:h text:style-name="Heading_20_3" text:outline-level="3">Session 4 — Staying Warm Without Heat</text:h>
      <text:p text:style-name="Text_20_body"><text:span text:style-name="Strong_20_Emphasis">What the heating system does</text:span> Maintains air temperature above a threshold. That's the function. The body does the rest — it generates heat constantly and needs only to retain enough of it to maintain core temperature.</text:p>
      <text:p text:style-name="Text_20_body"><text:span text:style-name="Strong_20_Emphasis">The physiology that matters</text:span> Core temperature below 95°F is hypothermia. Mild hypothermia begins with shivering, confusion, clumsiness. Severe hypothermia is a medical emergency. The path from a cold house to dangerous hypothermia is slower than most people fear — but it is real, and it is faster for the elderly, infants, and people with certain medical conditions.</text:p>
      <text:p text:style-name="Text_20_body">The body loses heat through five mechanisms: radiation, conduction, convection, evaporation, and respiration. Every warming strategy addresses one or more of these.</text:p>
      <text:p text:style-name="Text_20_body"><text:span text:style-name="Strong_20_Emphasis">The strategies in order of importance</text:span></text:p>
      <text:p text:style-name="Text_20_body"><text:span text:style-name="Emphasis">Clothing and layering</text:span> — the most immediate and most underestimated intervention. The principle: trap warm air against the body. Multiple thin layers trap more air than one thick layer. Wool and synthetic fleece retain warmth when wet — cotton does not. Cover the head — significant heat loss happens there. Wool socks matter more than most people realize.</text:p>
      <text:p text:style-name="Text_20_body"><text:span text:style-name="Emphasis">Room consolidation</text:span> — stop trying to heat the whole house. One room, ideally interior, small, with the fewest exterior walls. Close all doors. Hang blankets over windows and doorways. A room with six people in it will warm measurably from body heat alone. This is how humans lived through winter for most of history — in one room, together.</text:p>
      <text:p text:style-name="Text_20_body"><text:soft-page-break/><text:span text:style-name="Emphasis">Thermal mass of water</text:span> — water holds heat longer than air. Fill containers with hot water — bottles, jugs, pots. Place them in the consolidated room and in beds. A gallon jug of hot water under the covers is a low-tech bed warmer that stays warm for hours. This is not a folk remedy — it is physics.</text:p>
      <text:p text:style-name="Text_20_body"><text:span text:style-name="Emphasis">Insulation of the sleeping space</text:span> — a tent inside the room, a sleeping bag, multiple blankets. Sleeping cold is where hypothermia risk is real. The sleeping space should be the most insulated space in the house.</text:p>
      <text:p text:style-name="Text_20_body"><text:span text:style-name="Emphasis">Safe supplemental heat sources</text:span> — propane heaters rated for indoor use exist and are legitimate. Kerosene heaters exist. Wood stoves exist. Each has specific ventilation requirements. Each is safer than a gas oven being used for heat — which people do and which kills people. Carbon monoxide again: the same principle as Session 3.</text:p>
      <text:p text:style-name="Text_20_body"><text:span text:style-name="Strong_20_Emphasis">What is uncomfortable versus what is dangerous</text:span> A house at 55°F with properly dressed, active people in a consolidated room is uncomfortable. It is not dangerous for healthy adults. A house at 40°F with elderly or infant occupants is a medical concern. Below 32°F indoors is a genuine emergency requiring immediate action — evacuation to a warming center, a neighbor's house, a community space.</text:p>
      <text:p text:style-name="Text_20_body"><text:span text:style-name="Strong_20_Emphasis">Georgia-specific</text:span> Georgia winters are rarely severe enough to create life-threatening indoor cold for healthy adults. The risk is real for the elderly, infants, and medically compromised. The bigger Georgia risk is the other direction — covered in the next session.</text:p>
      <text:p text:style-name="Text_20_body"><text:span text:style-name="Strong_20_Emphasis">Hands-on</text:span> Practice layering assessment — what are members currently wearing and what would they add? Build a sleeping insulation setup from available materials. Assess the thermal properties of different room configurations in the space being used.</text:p>
      <text:p text:style-name="Horizontal_20_Line"/>
      <text:h text:style-name="Heading_20_3" text:outline-level="3">Session 5 — Staying Cool Without Air Conditioning</text:h>
      <text:p text:style-name="Text_20_body"><text:span text:style-name="Strong_20_Emphasis">This session is Tier 2 throughout</text:span> Georgia summer heat is not a comfort issue. Heat stroke kills. It kills faster than most people expect, it can occur indoors, and it disproportionately kills the elderly, the very young, people on certain medications, and people doing physical work. This session is the most medically serious in the course.</text:p>
      <text:p text:style-name="Text_20_body"><text:soft-page-break/><text:span text:style-name="Strong_20_Emphasis">The physiology that matters</text:span> The body cools itself primarily through sweat evaporation. When ambient humidity is high, sweat doesn't evaporate efficiently and cooling fails. When core temperature exceeds 104°F, heat stroke occurs — a medical emergency. Heat exhaustion precedes it: heavy sweating, weakness, cold pale clammy skin, weak pulse, nausea. Heat stroke: high body temperature, hot dry skin, rapid strong pulse, possible unconsciousness. The difference matters because the treatment is different.</text:p>
      <text:p text:style-name="Text_20_body">Heat exhaustion: move to cool place, hydrate, apply cool wet cloths, rest. Heat stroke: call 911, cool the person rapidly by any means available — cool water immersion, ice packs to neck, armpits, groin, fan with wet skin. Do not give fluids to an unconscious person.</text:p>
      <text:p text:style-name="Text_20_body"><text:span text:style-name="Strong_20_Emphasis">The strategies</text:span></text:p>
      <text:p text:style-name="Text_20_body"><text:span text:style-name="Emphasis">Nighttime ventilation</text:span> — Georgia nights are cooler than days. Open windows at night to flush the house with cooler air. Close everything and block sunlight before temperatures rise in the morning. The house becomes a thermal battery — cool air stored in the thermal mass of walls and floors, released through the day.</text:p>
      <text:p text:style-name="Text_20_body"><text:span text:style-name="Emphasis">Blocking solar gain</text:span> — the sun coming through windows is a significant heat source. Block it. Heavy curtains, blankets over windows, exterior shading if possible. The south and west-facing windows matter most in afternoon.</text:p>
      <text:p text:style-name="Text_20_body"><text:span text:style-name="Emphasis">Evaporative cooling</text:span> — hang wet sheets in doorways with airflow moving through them. Wet a bandana and wear it around the neck. The same principle as sweat — evaporation removes heat. Works better in lower humidity but provides some relief even in humid conditions.</text:p>
      <text:p text:style-name="Text_20_body"><text:span text:style-name="Emphasis">The lowest floor</text:span> — heat rises. The coolest place in a house without AC is the lowest floor or basement. In extreme heat, sleep on the floor.</text:p>
      <text:p text:style-name="Text_20_body"><text:span text:style-name="Emphasis">Hydration</text:span> — the body cannot sweat without water. Thirst is a lagging indicator — by the time you feel thirsty you are already mildly dehydrated. In high heat, drink water before you feel thirsty. Avoid alcohol and caffeine which accelerate dehydration.</text:p>
      <text:p text:style-name="Text_20_body"><text:span text:style-name="Emphasis">Community cooling</text:span> — the most important strategy and the most underused. Libraries, community centers, churches, neighbors with power. A few hours in a cool environment per day dramatically reduces cumulative heat load. This is not defeat — it is intelligent resource use. The Working Society's chapter space should be a designated cooling center.</text:p>
      <text:p text:style-name="Text_20_body"><text:soft-page-break/><text:span text:style-name="Emphasis">The vulnerable people in the household</text:span> — elderly adults, infants, people on diuretics, beta blockers, antipsychotics, and several other medications are at dramatically elevated risk. Know who in your household or community is in this category. Check on them. This is a community responsibility.</text:p>
      <text:p text:style-name="Text_20_body"><text:span text:style-name="Strong_20_Emphasis">The specific temperatures that matter</text:span> Above 80°F indoors — uncomfortable, monitor vulnerable people. Above 90°F indoors — risk for vulnerable people, action required. Above 95°F indoors — risk for healthy adults engaged in activity, evacuate vulnerable people. Heat index above 103°F outdoors — limit outdoor activity, stay hydrated. Heat index above 125°F outdoors — extreme danger, outdoor activity genuinely dangerous.</text:p>
      <text:p text:style-name="Text_20_body"><text:span text:style-name="Strong_20_Emphasis">Hands-on</text:span> Build a simple evaporative cooling setup. Practice temperature assessment — how to gauge indoor heat without a thermometer. Walk through heat illness recognition and first response. Identify the cooling resources within walking distance of the chapter space.</text:p>
      <text:p text:style-name="Horizontal_20_Line"/>
      <text:h text:style-name="Heading_20_3" text:outline-level="3">Session 6 — Water, Washing, and Sanitation</text:h>
      <text:p text:style-name="Text_20_body"><text:span text:style-name="Strong_20_Emphasis">What running hot water does</text:span> Delivers water at volume and temperature sufficient to remove contaminants from surfaces, objects, and bodies. The cleaning is done by the water and soap — not by the hot water specifically for most purposes. Hot water matters for sanitization — killing pathogens — but not for basic cleaning. This distinction is the foundation of the session.</text:p>
      <text:p text:style-name="Text_20_body"><text:span text:style-name="Strong_20_Emphasis">Cleaning versus sanitizing</text:span> Cleaning removes dirt, grease, and most contaminants. Soap and water do this at any temperature. Sanitizing kills pathogens. Requires either high heat — above 170°F — or chemical sanitizer — dilute bleach solution, 1 tablespoon per gallon of water.</text:p>
      <text:p text:style-name="Text_20_body">Most household tasks require cleaning, not sanitizing. Dishes that will be used by healthy adults need to be clean. Dishes used by or for ill people, infants, or immunocompromised people should be sanitized. Surfaces where raw meat was prepared should be sanitized. Most other surfaces need cleaning.</text:p>
      <text:p text:style-name="Text_20_body">This distinction matters because it defines what the absence of hot running water actually affects — which is less than most people assume.</text:p>
      <text:p text:style-name="Text_20_body"><text:span text:style-name="Strong_20_Emphasis">Dishwashing without running hot water</text:span> The two-basin method: one basin with warm soapy water for washing, one with clean water for rinsing. Heat water <text:soft-page-break/>on the camp stove if available. If not, cold water with soap cleans adequately for most purposes. Air dry — dish towels spread bacteria.</text:p>
      <text:p text:style-name="Text_20_body">For sanitizing: a third basin or final rinse with dilute bleach solution. Let air dry without rinsing — the dilution is safe and the residue sanitizes as it dries.</text:p>
      <text:p text:style-name="Text_20_body"><text:span text:style-name="Strong_20_Emphasis">Laundry without a washing machine</text:span> The washing machine performs: agitation, water, soap, and time. All four are replicable.</text:p>
      <text:p text:style-name="Text_20_body">The plunger method: a five-gallon bucket with a lid and a toilet plunger with holes drilled in it. Add clothes, water, and soap. Plunge vigorously for 5–10 minutes. Drain, refill with clean water, agitate to rinse. Wring or roll in a towel to remove water. Hang to dry.</text:p>
      <text:p text:style-name="Text_20_body">For larger loads: a second bucket or a clean trash can. The physical effort is real — this is genuinely labor. It's also faster than most people expect.</text:p>
      <text:p text:style-name="Text_20_body">What needs washing and how often: this is where assumptions diverge from reality. Underwear and socks — after each use, always. Shirts — after one to two wears depending on sweat. Pants and outer layers — after several wears unless soiled. Sheets — weekly in normal circumstances, more frequently if someone is ill.</text:p>
      <text:p text:style-name="Text_20_body"><text:span text:style-name="Strong_20_Emphasis">The clothesline</text:span> String a line between two fixed points. High enough that clothes don't drag. Tension matters — a sagging line means wet clothes touching each other and not drying properly. Wooden clothespins grip better than plastic. Hang shirts from the hem, not the shoulders — prevents stretching. In Georgia sun, most clothes dry in two to four hours in summer. Longer in winter or humidity. Items dry faster in airflow — position the line to catch prevailing breeze.</text:p>
      <text:p text:style-name="Text_20_body">What doesn't dry well on a line: very thick items, denim, towels in high humidity. These may need to be rotated or dried in stages.</text:p>
      <text:p text:style-name="Text_20_body"><text:span text:style-name="Strong_20_Emphasis">Bathing without running water</text:span> The sponge bath: basin, water, washcloth, soap. Effectively clean with a quart of water. Priority: face, underarms, groin, feet — where bacteria accumulate fastest and where hygiene matters most for health and comfort.</text:p>
      <text:p text:style-name="Text_20_body">Hair: dry shampoo as a short-term substitute. Longer term: a pitcher pour over a basin. Baking soda as a scalp cleaner, apple cider vinegar as a conditioner — both functional, both old.</text:p>
      <text:p text:style-name="Text_20_body"><text:soft-page-break/><text:span text:style-name="Strong_20_Emphasis">Hands-on</text:span> Wash a load of laundry using the plunger bucket method. Hang it to dry. Wash dishes using the two-basin method. Practice the sponge bath protocol — not demonstrated on bodies but discussed and understood. Set up a clothesline if space allows.</text:p>
      <text:p text:style-name="Horizontal_20_Line"/>
      <text:h text:style-name="Heading_20_3" text:outline-level="3">Session 7 — Medications and Medical Equipment Without Power</text:h>
      <text:p text:style-name="Text_20_body"><text:span text:style-name="Strong_20_Emphasis">This session is Tier 2 throughout</text:span></text:p>
      <text:p text:style-name="Text_20_body"><text:span text:style-name="Strong_20_Emphasis">The medications that require refrigeration</text:span> Insulin — the most common and most urgent. Unopened insulin keeps at room temperature for 28 days for most formulations. Open insulin in use keeps at room temperature for 28 days. Above 86°F degrades faster — in Georgia summer, 28 days may become significantly less. Check the specific formulation.</text:p>
      <text:p text:style-name="Text_20_body">GLP-1 medications — semaglutide, tirzepatide. Similar requirements to insulin. Certain liquid antibiotics — require refrigeration after reconstitution. Some biologic medications — require strict cold chain. These are less common but more critical — degradation may not be visible. Certain eye drops and topical medications. Vaccines — not a household medication issue typically but relevant for community health.</text:p>
      <text:p text:style-name="Text_20_body"><text:span text:style-name="Strong_20_Emphasis">Keeping medications cold without power</text:span> The cooler method: a quality cooler with ice maintains safe temperature for 24–48 hours. Do not place insulin directly on ice — freezing destroys it. Wrap in a cloth and place near but not touching ice.</text:p>
      <text:p text:style-name="Text_20_body">Evaporative cooling: a pot-in-pot cooler — one clay pot inside a larger clay pot, gap filled with wet sand. Evaporation from the wet sand cools the interior by 20–40°F below ambient in low humidity. Less effective in high Georgia humidity but provides some cooling.</text:p>
      <text:p text:style-name="Text_20_body">Community refrigeration: a neighbor with power, a pharmacy, a community space. This is the most reliable solution and should be the first option, not the last.</text:p>
      <text:p text:style-name="Text_20_body"><text:span text:style-name="Strong_20_Emphasis">The conversation to have before the crisis</text:span> Members who take medications requiring refrigeration should know: how long their specific medication is stable at room temperature, what temperature degrades it, what degraded medication looks like if visible changes occur, and where their nearest community refrigeration resource is.</text:p>
      <text:p text:style-name="Text_20_body"><text:soft-page-break/>This conversation is much easier to have before the power goes out than during.</text:p>
      <text:p text:style-name="Text_20_body"><text:span text:style-name="Strong_20_Emphasis">Medical equipment requiring power</text:span> CPAP machines — battery backup units exist and are available. A full night of CPAP requires significant battery capacity. Know the options before the crisis. Home oxygen concentrators — require power. Backup oxygen tanks should be arranged in advance with the supplier. This is a medical necessity conversation with the prescribing provider. Nebulizers — battery-powered versions exist. Metered dose inhalers are an alternative for many conditions — discuss with provider. Electric wheelchairs and mobility equipment — know the battery life and charging requirements.</text:p>
      <text:p text:style-name="Text_20_body"><text:span text:style-name="Strong_20_Emphasis">The working society's role</text:span> A chapter should know which members have power-dependent medical needs. This is not surveillance — it is mutual aid. The community that knows about the diabetic member and the CPAP user can prioritize getting them power during an outage. The community that doesn't know cannot help.</text:p>
      <text:p text:style-name="Text_20_body"><text:span text:style-name="Strong_20_Emphasis">Hands-on</text:span> Build a pot-in-pot cooler and measure its effect. Assemble a medication emergency kit checklist. Practice the temperature assessment for a cooler — how long before it warms to the danger zone for insulin?</text:p>
      <text:p text:style-name="Horizontal_20_Line"/>
      <text:h text:style-name="Heading_20_3" text:outline-level="3">Session 8 — Light, Communication, and Orientation Without Power</text:h>
      <text:p text:style-name="Text_20_body"><text:span text:style-name="Strong_20_Emphasis">Shorter than the other sessions — these skills are more widely known</text:span></text:p>
      <text:p text:style-name="Text_20_body"><text:span text:style-name="Strong_20_Emphasis">Light</text:span> Candles work. Open flame is a fire risk — never leave unattended, keep away from flammable materials, have a way to extinguish immediately. One candle produces roughly as much light as a 4-watt bulb — adequate for tasks if you bring the work to the light rather than trying to illuminate a room.</text:p>
      <text:p text:style-name="Text_20_body">Battery lanterns — LED technology means a modern lantern on four AA batteries lasts 50–100 hours. The most practical immediate lighting solution.</text:p>
      <text:p text:style-name="Text_20_body">Headlamps — hands-free, efficient, essential for any task requiring both hands. Every household should have one per person. This is not a luxury.</text:p>
      <text:p text:style-name="Text_20_body">Oil lamps — longer term, refillable. Lamp oil stores for years. More light than a candle, less fire risk than an open flame if properly designed.</text:p>
      <text:p text:style-name="Text_20_body">Solar lanterns — charge during the day, use at night. Appropriate for Georgia sun. Useful for extended outages.</text:p>
      <text:p text:style-name="Text_20_body"><text:soft-page-break/><text:span text:style-name="Strong_20_Emphasis">Communication</text:span> Cell phones work during power outages as long as the towers have backup power — typically 4–8 hours for most towers, longer for some. Prioritize keeping phones charged. A car charger works as long as there's fuel. A small solar panel charger is a meaningful investment.</text:p>
      <text:p text:style-name="Text_20_body">Battery or hand-crank radio — the most reliable way to receive emergency information when cell and internet infrastructure is degraded. NOAA weather radio specifically. This is a real piece of emergency equipment, not nostalgia.</text:p>
      <text:p text:style-name="Text_20_body">The community communication plan: the Working Society chapter should have an agreed protocol for how members communicate during infrastructure disruption. Who checks on whom. Where to gather. What the signal is that someone needs help.</text:p>
      <text:p text:style-name="Text_20_body"><text:span text:style-name="Strong_20_Emphasis">Orientation</text:span> When digital maps and GPS are unavailable: know your physical neighborhood. Know the routes to resources on foot. Know where the nearest water, food, medical, and community resources are without looking them up. This is a practice, not a one-time acquisition.</text:p>
      <text:p text:style-name="Text_20_body"><text:span text:style-name="Strong_20_Emphasis">Hands-on</text:span> Assess the current lighting resources in members' households — what do they actually have? Build a communication plan for the chapter. Walk or describe the route to the three nearest community resources on foot.</text:p>
      <text:p text:style-name="Horizontal_20_Line"/>
      <text:h text:style-name="Heading_20_3" text:outline-level="3">Session 9 — Water Without Infrastructure</text:h>
      <text:p text:style-name="Text_20_body"><text:span text:style-name="Strong_20_Emphasis">The most critical resource</text:span></text:p>
      <text:p text:style-name="Text_20_body">Water is more immediately critical than food — the human body begins to degrade rapidly without it in a way that takes weeks with food. Three days is the conventional figure for survival without water. In Georgia summer heat with physical activity, that timeline compresses significantly.</text:p>
      <text:p text:style-name="Text_20_body"><text:span text:style-name="Strong_20_Emphasis">What the water system does</text:span> Treats and pressurizes water from a municipal source. When it fails, the two functions separate: pressure loss is immediate, treatment failure may take longer but is less visible.</text:p>
      <text:p text:style-name="Text_20_body"><text:span text:style-name="Strong_20_Emphasis">Storage</text:span> The minimum recommendation is one gallon per person per day for drinking and basic sanitation. For Georgia summer, more.</text:p>
      <text:p text:style-name="Text_20_body">Commercial water storage containers — 5 to 7 gallon jugs with spigots. Practical and stackable. 55-gallon barrels — for longer-term storage. Require a hand pump or siphon. Bathtub storage — filling the bathtub at the onset of a <text:soft-page-break/>known emergency provides 80–100 gallons. A WaterBOB liner makes this more sanitary and extends storage life.</text:p>
      <text:p text:style-name="Text_20_body">Water stores safely for 6–12 months in clean sealed containers in a cool dark place.</text:p>
      <text:p text:style-name="Text_20_body"><text:span text:style-name="Strong_20_Emphasis">Purification</text:span> When the source is uncertain: boiling is the most reliable method. A rolling boil for one minute kills all biological pathogens. At higher elevation — not relevant in Georgia — three minutes.</text:p>
      <text:p text:style-name="Text_20_body">Chemical treatment: unscented household bleach at 8 drops per gallon for clear water, 16 for cloudy. Wait 30 minutes before drinking. Taste and smell the chlorine — if you can't, treat again.</text:p>
      <text:p text:style-name="Text_20_body">Filtration: removes particles and most biological contaminants. Does not remove chemical contaminants or viruses without additional treatment. Gravity filters — Berkey type — are practical for household use.</text:p>
      <text:p text:style-name="Text_20_body"><text:span text:style-name="Strong_20_Emphasis">Collection</text:span> Rainwater collection is legal in Georgia with some restrictions. A clean barrel under a downspout collects significant water in a Georgia rainstorm. This water requires treatment before drinking but is fine for washing, sanitation, and gardening.</text:p>
      <text:p text:style-name="Text_20_body"><text:span text:style-name="Strong_20_Emphasis">Sanitation without running water</text:span> Human waste requires management. A flush toilet without water pressure can be manually flushed with a bucket — pour water directly into the bowl, not the tank. This works until the municipal system backs up.</text:p>
      <text:p text:style-name="Text_20_body">For extended outages: a composting toilet setup, an outhouse, or a cat-hole latrine at appropriate distance from water sources. Human waste management is not optional — it is a disease prevention necessity.</text:p>
      <text:p text:style-name="Text_20_body"><text:span text:style-name="Strong_20_Emphasis">Hands-on</text:span> Calculate the water storage requirement for members' households. Practice water treatment — treat a sample with bleach, verify with smell and taste. Examine and discuss water storage options. Practice the bucket flush.</text:p>
      <text:p text:style-name="Horizontal_20_Line"/>
      <text:h text:style-name="Heading_20_3" text:outline-level="3">Session 10 — Putting It Together</text:h>
      <text:p text:style-name="Text_20_body"><text:span text:style-name="Strong_20_Emphasis">The integrated household assessment</text:span></text:p>
      <text:p text:style-name="Text_20_body">The final session is not a new skill. It is the application of all previous sessions to each member's actual household situation.</text:p>
      <text:p text:style-name="Text_20_body"><text:soft-page-break/>Members work through a structured assessment of their household:</text:p>
      <text:p text:style-name="Text_20_body"><text:span text:style-name="Strong_20_Emphasis">Food</text:span> — what do they currently have that keeps without refrigeration? What is their actual vulnerability if the refrigerator goes down today?</text:p>
      <text:p text:style-name="Text_20_body"><text:span text:style-name="Strong_20_Emphasis">Water</text:span> — what is their current storage? How long does it last? What is their purification capability?</text:p>
      <text:p text:style-name="Text_20_body"><text:span text:style-name="Strong_20_Emphasis">Heat and cold</text:span> — what is their actual risk in summer and winter given their specific household — age of occupants, medical conditions, building characteristics?</text:p>
      <text:p text:style-name="Text_20_body"><text:span text:style-name="Strong_20_Emphasis">Cooking</text:span> — what is their actual capacity to cook without electricity? What do they need?</text:p>
      <text:p text:style-name="Text_20_body"><text:span text:style-name="Strong_20_Emphasis">Washing</text:span> — what is the minimum equipment needed to maintain household hygiene without running hot water?</text:p>
      <text:p text:style-name="Text_20_body"><text:span text:style-name="Strong_20_Emphasis">Medications and medical equipment</text:span> — what in their household requires power or refrigeration? What is the plan?</text:p>
      <text:p text:style-name="Text_20_body"><text:span text:style-name="Strong_20_Emphasis">Light and communication</text:span> — what do they actually have? What are the gaps?</text:p>
      <text:p text:style-name="Text_20_body"><text:span text:style-name="Strong_20_Emphasis">Community resources</text:span> — where are the nearest resources for water, food, cooling, warming, and communication? Who in their community knows their situation and could help?</text:p>
      <text:p text:style-name="Text_20_body">The output of this session is a one-page household resilience assessment — not a preppers checklist, but an honest picture of where each member is capable and where they are vulnerable. The Working Society chapter can aggregate these to understand the community's collective vulnerabilities and resources.</text:p>
      <text:p text:style-name="Horizontal_20_Line"/>
      <text:h text:style-name="Heading_20_3" text:outline-level="3">Beyond the Core Sessions</text:h>
      <text:p text:style-name="Text_20_body"><text:span text:style-name="Strong_20_Emphasis">Deepening sessions for members who want to go further:</text:span></text:p>
      <text:p text:style-name="Text_20_body">Food preservation hands-on — canning, dehydrating, fermenting as sustained practices rather than single demonstrations.</text:p>
      <text:p text:style-name="Text_20_body">Fire and rocket stove building — construct a rocket stove from cinder blocks. Practice fire starting without modern accelerants.</text:p>
      <text:p text:style-name="Text_20_body">Basic home weatherization — insulation, draft sealing, window coverings. Making the house itself more thermally resilient.</text:p>
      <text:p text:style-name="Text_20_body"><text:soft-page-break/>Garden and food production basics — not a full gardening course but the minimum to produce some food from a small plot. Connects to the Working Society's agricultural infrastructure.</text:p>
      <text:p text:style-name="Text_20_body">Basic first aid and wound care — the medical complement to this course, connecting to the Community Health Worker program.</text:p>
      <text:p text:style-name="Horizontal_20_Line"/>
      <text:h text:style-name="Heading_20_3" text:outline-level="3">What This Course Produces</text:h>
      <text:p text:style-name="Text_20_body">A member who completes the core ten sessions should be able to:</text:p>
      <text:p text:style-name="Text_20_body">Keep their household safe during a power outage of at least two weeks in Georgia summer or winter. Assess food safety accurately without throwing away food they could have kept or keeping food that has gone dangerous. Cook a nutritionally adequate meal without electricity. Maintain household hygiene without running hot water. Know which of their household members are medically vulnerable to heat, cold, or power loss — and have a plan for them. Know what is a discomfort and what is a genuine safety risk, and respond appropriately to each.</text:p>
      <text:p text:style-name="Text_20_body">These are not survival skills in the dramatic sense. They are the ordinary practical knowledge that most humans possessed for most of human history and that two or three generations of infrastructure dependence have made rare. The course is about making them ordinary again.</text:p>
      <text:p text:style-name="P16"><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indent="0.2in" style:auto-text-indent="false"/>
      <style:text-properties style:font-name="Libre Baskerville" fo:font-family="'Libre Baskerville'" style:font-style-name="Regular" style:font-pitch="variable"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IM FELL English SC1" fo:font-family="'IM FELL English SC'" style:font-style-name="Bold" style:font-pitch="variable" fo:font-size="16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IM FELL English SC1" fo:font-family="'IM FELL English SC'" style:font-style-name="Bold" style:font-pitch="variable" fo:font-size="11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1799in" style:contextual-spacing="false" fo:text-align="center" style:justify-single-word="false"/>
      <style:text-properties style:font-name="IM FELL English SC2" fo:font-family="'IM FELL English SC'" style:font-style-name="Regular" style:font-pitch="variable" fo:font-size="2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IM FELL English SC2" fo:font-family="'IM FELL English SC'" style:font-style-name="Regular" style:font-pitch="variable" fo:font-size="13pt" style:font-size-asian="18pt" style:font-size-complex="18pt"/>
    </style:style>
    <style:style style:name="First_20_Paragraph" style:display-name="First Paragraph" style:family="paragraph" style:parent-style-name="Standard" style:master-page-name="">
      <style:paragraph-properties fo:text-indent="0in" style:auto-text-indent="false" style:page-number="auto"/>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page-layout style:name="Mpm1">
      <style:page-layout-properties fo:page-width="8.5in" fo:page-height="11in" style:num-format="1" style:print-orientation="portrait" fo:margin-top="1.25in" fo:margin-bottom="1.2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e Resolute Societies of Americ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3:48:24.763225727</meta:creation-date>
    <dc:date>2026-06-09T19:38:31.493063706</dc:date>
    <meta:editing-duration>PT8H33M45S</meta:editing-duration>
    <meta:editing-cycles>33</meta:editing-cycles>
    <meta:generator>LibreOffice/24.2.7.2$Linux_X86_64 LibreOffice_project/420$Build-2</meta:generator>
    <meta:document-statistic meta:table-count="0" meta:image-count="0" meta:object-count="0" meta:page-count="16" meta:paragraph-count="160" meta:word-count="4893" meta:character-count="31829" meta:non-whitespace-character-count="26934"/>
  </office:meta>
</office:document-meta>
</file>