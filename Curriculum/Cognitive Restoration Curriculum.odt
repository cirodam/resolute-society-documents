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style style:name="P2" style:family="paragraph" style:parent-style-name="Subtitle">
      <style:text-properties fo:color="#1e3a5f" loext:opacity="100%"/>
    </style:style>
    <style:style style:name="P3" style:family="paragraph" style:parent-style-name="Standard">
      <style:paragraph-properties fo:margin-left="0in" fo:margin-right="0in" style:line-height-at-least="0.198in" fo:text-indent="0in" style:auto-text-indent="false"/>
      <style:text-properties fo:color="#111111" loext:opacity="100%" style:font-name="IM FELL English SC" fo:font-size="10.5pt" fo:font-weight="bold" officeooo:paragraph-rsid="001f52f8" fo:background-color="transparent"/>
    </style:style>
    <style:style style:name="P4" style:family="paragraph" style:parent-style-name="First_20_Paragraph">
      <style:text-properties fo:color="#2c2c2c" loext:opacity="100%"/>
    </style:style>
    <style:style style:name="P5" style:family="paragraph" style:parent-style-name="Standard">
      <style:paragraph-properties style:line-height-at-least="0.198in"/>
      <style:text-properties fo:color="#2c2c2c" loext:opacity="100%" style:font-name="IM FELL English SC" fo:font-size="10.5pt" fo:font-weight="bold" fo:background-color="transparent"/>
    </style:style>
    <style:style style:name="P6" style:family="paragraph" style:parent-style-name="Standard">
      <style:paragraph-properties style:line-height-at-least="0.198in"/>
      <style:text-properties fo:color="#2c2c2c" loext:opacity="100%" style:font-name="IM FELL English SC" fo:background-color="transparent"/>
    </style:style>
    <style:style style:name="P7" style:family="paragraph" style:parent-style-name="Standard">
      <style:text-properties fo:color="#2c2c2c" loext:opacity="100%"/>
    </style:style>
    <style:style style:name="P8" style:family="paragraph" style:parent-style-name="First_20_Paragraph">
      <style:text-properties fo:color="#2c2c2c" loext:opacity="100%" officeooo:paragraph-rsid="003a82d1"/>
    </style:style>
    <style:style style:name="P9" style:family="paragraph" style:parent-style-name="First_20_Paragraph">
      <style:text-properties fo:color="#2c2c2c" loext:opacity="100%" officeooo:paragraph-rsid="003afd50"/>
    </style:style>
    <style:style style:name="P10" style:family="paragraph" style:parent-style-name="Title">
      <style:text-properties fo:color="#1e3a5f" loext:opacity="100%" officeooo:rsid="003fa145" officeooo:paragraph-rsid="003fa145"/>
    </style:style>
    <style:style style:name="P11" style:family="paragraph" style:parent-style-name="Heading_20_1">
      <style:text-properties fo:color="#1e3a5f" loext:opacity="100%"/>
    </style:style>
    <style:style style:name="P12" style:family="paragraph" style:parent-style-name="Heading_20_2">
      <style:text-properties fo:color="#1e3a5f" loext:opacity="100%"/>
    </style:style>
    <style:style style:name="P13" style:family="paragraph" style:parent-style-name="Heading_20_3">
      <style:paragraph-properties style:line-height-at-least="0.198in" fo:text-indent="0in" style:auto-text-indent="false"/>
      <style:text-properties fo:color="#2c2c2c" loext:opacity="100%"/>
    </style:style>
    <style:style style:name="P14" style:family="paragraph" style:parent-style-name="Heading_20_4">
      <style:text-properties fo:color="#2c2c2c" loext:opacity="100%"/>
    </style:style>
    <style:style style:name="P15" style:family="paragraph" style:parent-style-name="Standard">
      <style:paragraph-properties style:line-height-at-least="0.198in" fo:text-indent="0in" style:auto-text-indent="false"/>
      <style:text-properties fo:color="#2c2c2c" loext:opacity="100%"/>
    </style:style>
    <style:style style:name="P16" style:family="paragraph" style:parent-style-name="Text_20_body">
      <style:text-properties fo:color="#2c2c2c" loext:opacity="100%"/>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T1" style:family="text">
      <style:text-properties officeooo:rsid="00207e9d"/>
    </style:style>
    <style:style style:name="T2" style:family="text">
      <style:text-properties officeooo:rsid="0024f617"/>
    </style:style>
    <style:style style:name="T3" style:family="text">
      <style:text-properties officeooo:rsid="0026ccf4"/>
    </style:style>
    <style:style style:name="T4" style:family="text">
      <style:text-properties officeooo:rsid="0027efd4"/>
    </style:style>
    <style:style style:name="T5" style:family="text">
      <style:text-properties officeooo:rsid="00297856"/>
    </style:style>
    <style:style style:name="T6" style:family="text">
      <style:text-properties officeooo:rsid="002a39be"/>
    </style:style>
    <style:style style:name="T7" style:family="text">
      <style:text-properties officeooo:rsid="002b7d10"/>
    </style:style>
    <style:style style:name="T8" style:family="text">
      <style:text-properties officeooo:rsid="002cc6bf"/>
    </style:style>
    <style:style style:name="T9" style:family="text">
      <style:text-properties officeooo:rsid="002cf6af"/>
    </style:style>
    <style:style style:name="T10" style:family="text">
      <style:text-properties officeooo:rsid="002ec032"/>
    </style:style>
    <style:style style:name="T11" style:family="text">
      <style:text-properties officeooo:rsid="002f17f7"/>
    </style:style>
    <style:style style:name="T12" style:family="text">
      <style:text-properties officeooo:rsid="00310cfc"/>
    </style:style>
    <style:style style:name="T13" style:family="text">
      <style:text-properties officeooo:rsid="003210b5"/>
    </style:style>
    <style:style style:name="T14" style:family="text">
      <style:text-properties officeooo:rsid="003732d9"/>
    </style:style>
    <style:style style:name="T15" style:family="text">
      <style:text-properties officeooo:rsid="003783fc"/>
    </style:style>
    <style:style style:name="T16" style:family="text">
      <style:text-properties officeooo:rsid="003a82d1"/>
    </style:style>
    <style:style style:name="T17" style:family="text">
      <style:text-properties officeooo:rsid="00438421"/>
    </style:style>
    <style:style style:name="T18" style:family="text">
      <style:text-properties officeooo:rsid="0045f16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text:span text:style-name="T18">Cognitive Restoration</text:span> Program</text:p>
      <text:p text:style-name="P2"/>
      <text:p text:style-name="P5"/>
      <text:p text:style-name="P6"/>
      <text:h text:style-name="P11" text:outline-level="1">Preamble</text:h>
      <text:p text:style-name="P6"/>
      <text:p text:style-name="P4">There are moments in history that test the character of a nation, that demand more than ordinary times prepare <text:span text:style-name="T3">any person</text:span> for. We believe we are living in such a moment. We do not take that lightly. We resolve to meet it together.</text:p>
      <text:p text:style-name="P6"/>
      <text:h text:style-name="P11" text:outline-level="1">Foundational Principles</text:h>
      <text:h text:style-name="P13" text:outline-level="3"><text:span text:style-name="Strong_20_Emphasis">A Working Society Course in Cognitive Restoration</text:span></text:h>
      <text:p text:style-name="Text_20_body"><text:span text:style-name="Strong_20_Emphasis">Format:</text:span> Small group, approximately 6 members plus one guide <text:span text:style-name="Strong_20_Emphasis">Session length:</text:span> 90 minutes <text:span text:style-name="Strong_20_Emphasis">Frequency:</text:span> Weekly <text:span text:style-name="Strong_20_Emphasis">Duration:</text:span> Open-ended — structured phase of approximately 12 sessions, then ongoing practice group <text:span text:style-name="Strong_20_Emphasis">Setting:</text:span> In person, no devices in the room</text:p>
      <text:p text:style-name="Horizontal_20_Line"/>
      <text:h text:style-name="Heading_20_3" text:outline-level="3">What This Course Is</text:h>
      <text:p text:style-name="Text_20_body">An honest reckoning with what the attention economy did to our minds, followed by systematic rebuilding of the attentional capacities it degraded. Not self-help. Not digital detox as lifestyle brand. A collective practice of reclaiming something that was taken.</text:p>
      <text:p text:style-name="Text_20_body">The method is practice — structured exercises that rebuild attentional capacity the way physical therapy rebuilds a damaged muscle. Understanding provides the motivation. Practice does the actual work. Community makes it stick.</text:p>
      <text:p text:style-name="Horizontal_20_Line"/>
      <text:h text:style-name="Heading_20_3" text:outline-level="3"><text:soft-page-break/>The Guide's Role</text:h>
      <text:p text:style-name="Text_20_body">Hold the structure. Introduce practices. Ask questions that open rather than close. Witness the group's progress honestly. Bring your own experience with this work — you are not outside it.</text:p>
      <text:p text:style-name="Text_20_body">Do not lecture. Do not moralize. Do not position yourself as having solved what the group is working on.</text:p>
      <text:p text:style-name="Horizontal_20_Line"/>
      <text:h text:style-name="Heading_20_3" text:outline-level="3">Phase 1: Understanding</text:h>
      <text:p text:style-name="Text_20_body"><text:span text:style-name="Emphasis">Sessions 1–3</text:span> <text:span text:style-name="Emphasis">Goal: Build a shared accurate account of what happened and why</text:span></text:p>
      <text:p text:style-name="Text_20_body"><text:span text:style-name="Strong_20_Emphasis">Session 1 — The Hijacked Mind</text:span> What attention is and why it matters. The attention economy as a designed system — not an accident, not individual weakness. The specific mechanisms: variable reward, infinite scroll, social comparison, notification architecture. The neuroscience in plain language: what dopamine actually does, what happened to the reward system, why boredom became intolerable.</text:p>
      <text:p text:style-name="Text_20_body">Practice introduced: The Notice. Between sessions, members simply observe their own attention without trying to change it. When do you reach for the phone? What were you feeling ten seconds before? No judgment. Just observation.</text:p>
      <text:p text:style-name="Text_20_body"><text:span text:style-name="Strong_20_Emphasis">Session 2 — What We Lost</text:span> Sustained attention. Deep reading. The experience of following a single thought to its conclusion. Productive boredom — the state from which internally generated thought, creativity, and genuine rest emerge. What working memory under load feels like and why it matters. The group shares what they noticed from The Notice practice.</text:p>
      <text:p text:style-name="Text_20_body">Practice introduced: The Single Thing. Once per day, do one thing with full attention for twenty minutes. Not a hard thing — cooking, walking, reading, a conversation. No devices. Notice what arises.</text:p>
      <text:p text:style-name="Text_20_body"><text:span text:style-name="Strong_20_Emphasis">Session 3 — The Full Picture</text:span> Connecting attention to everything else. Why attentional damage makes learning harder, relationships shallower, decisions worse, emotions more volatile. The relationship between attention and identity — the performed self versus the experienced self. Introduction of the course arc: we are going to rebuild this, systematically, together. Discussion: what does each member actually want to be able to do that they currently can't?</text:p>
      <text:p text:style-name="Text_20_body"><text:soft-page-break/>Practice introduced: The Reading Practice. Fifteen minutes of uninterrupted reading per day. Physical book or printed page — not a screen. Start a log: what did you read, how long did you sustain, what did you notice.</text:p>
      <text:p text:style-name="Horizontal_20_Line"/>
      <text:h text:style-name="Heading_20_3" text:outline-level="3">Phase 2: Rebuilding</text:h>
      <text:p text:style-name="Text_20_body"><text:span text:style-name="Emphasis">Sessions 4–9</text:span> <text:span text:style-name="Emphasis">Goal: Systematic practice of attentional capacities with increasing duration and difficulty</text:span></text:p>
      <text:p text:style-name="Text_20_body"><text:span text:style-name="Strong_20_Emphasis">Session 4 — Sustained Attention</text:span> The mechanics of attention training: why starting is easier than sustaining, why the mind wanders, what to do when it does. Introduction of formal attention practice — not meditation as spirituality but attention as a trainable physical capacity. Seated, timed, structured. Group does a practice together in session.</text:p>
      <text:p text:style-name="Text_20_body">Practice: Daily attention practice, starting at ten minutes. Reading log continues, target increases to twenty minutes.</text:p>
      <text:p text:style-name="Text_20_body"><text:span text:style-name="Strong_20_Emphasis">Session 5 — Boredom and What Lives There</text:span> Boredom as a gateway, not a problem. What happens when you don't immediately resolve discomfort with stimulation. Internally generated thought — daydreaming, planning, memory consolidation, creativity — all require unstructured mental time. The group reports on their experience of resisting the reach for the phone. What came up? What was underneath the discomfort?</text:p>
      <text:p text:style-name="Text_20_body">Practice: One thirty-minute period per week of deliberate unstructured time. No task, no device, no agenda. Sit. Walk. Exist. Report back.</text:p>
      <text:p text:style-name="Text_20_body"><text:span text:style-name="Strong_20_Emphasis">Session 6 — Working Memory and Complexity</text:span> What working memory is and how it degrades under constant context-switching. The cost of multitasking — not just productivity but comprehension, emotional regulation, and decision quality. Introduction of complexity practice: holding a problem in mind without immediately resolving it. Group works through a genuinely difficult question together without looking anything up.</text:p>
      <text:p text:style-name="Text_20_body">Practice: One slow conversation per week — a real topic, with one other person, no devices, no time pressure. Notice when you want to escape or reach for your phone.</text:p>
      <text:p text:style-name="Text_20_body"><text:span text:style-name="Strong_20_Emphasis">Session 7 — Deep Reading</text:span> Maryanne Wolf's reading brain in plain language. The difference between scanning and reading. How to slow down. Annotation as <text:soft-page-break/>a tool — not highlighting but genuine dialogue with a text. Group reads a short difficult passage together and discusses it. What did you have to reread? Where did your mind go?</text:p>
      <text:p text:style-name="Text_20_body">Practice: Reading log target increases to thirty minutes. Try one difficult text — something that requires rereading. Annotate.</text:p>
      <text:p text:style-name="Text_20_body"><text:span text:style-name="Strong_20_Emphasis">Session 8 — Attention and Relationship</text:span> What distracted presence does to relationships. The experience of being with someone who is also somewhere else. Listening as an attentional practice — full presence, not just waiting to speak. The group practices structured listening: one person speaks for three minutes without interruption, the listener reflects back what they heard before responding.</text:p>
      <text:p text:style-name="Text_20_body">Practice: One conversation per week with full presence — phone away, not just face-down. Notice the difference.</text:p>
      <text:p text:style-name="Text_20_body"><text:span text:style-name="Strong_20_Emphasis">Session 9 — The Environment</text:span> Attention is not purely internal. The environment either supports or undermines it. Notification architecture, phone placement, the design of your physical space, the social norms of the people around you. You cannot outwork a hostile environment through willpower alone. Members map their own environments: where does attention fail, and why? What could change?</text:p>
      <text:p text:style-name="Text_20_body">Practice: One environmental change. Remove one thing that reliably hijacks attention. Report back.</text:p>
      <text:p text:style-name="Horizontal_20_Line"/>
      <text:h text:style-name="Heading_20_3" text:outline-level="3">Phase 3: Integration</text:h>
      <text:p text:style-name="Text_20_body"><text:span text:style-name="Emphasis">Sessions 10–12</text:span> <text:span text:style-name="Emphasis">Goal: Build durable practice into the structure of daily life and community membership</text:span></text:p>
      <text:p text:style-name="Text_20_body"><text:span text:style-name="Strong_20_Emphasis">Session 10 — Stocktaking</text:span> Honest assessment. What changed? What didn't? Where is each member's attentional capacity now compared to Session 1? Reading logs reviewed. Not performance — genuine reckoning. What practices stuck and why? What failed and why?</text:p>
      <text:p text:style-name="Text_20_body"><text:span text:style-name="Strong_20_Emphasis">Session 11 — Personal Practice Architecture</text:span> Each member designs their own ongoing practice: what they will do, when, how they will know it's working. Not a resolution — a structure. Guide facilitates. Group offers honest feedback on each other's plans.</text:p>
      <text:p text:style-name="Text_20_body"><text:soft-page-break/><text:span text:style-name="Strong_20_Emphasis">Session 12 — The Ongoing Group</text:span> Transition from structured course to ongoing practice group. What does this look like going forward? How often do we meet? What do we bring? How do we hold each other accountable without becoming a shame exercise? Establish the norms of the continuing group together.</text:p>
      <text:p text:style-name="Horizontal_20_Line"/>
      <text:h text:style-name="Heading_20_3" text:outline-level="3">Ongoing Practice Group</text:h>
      <text:p text:style-name="Text_20_body"><text:span text:style-name="Emphasis">No terminus</text:span></text:p>
      <text:p text:style-name="Text_20_body">Meets regularly — monthly or biweekly suggested. Each session: brief check-in on individual practices, one shared practice or discussion topic, honest reporting on what's working and what isn't. The guide may rotate over time. New members can join after completing the structured phase.</text:p>
      <text:p text:style-name="Text_20_body">This is not a support group. It is a community of practice. The distinction matters.</text:p>
      <text:p text:style-name="Horizontal_20_Line"/>
      <text:h text:style-name="Heading_20_3" text:outline-level="3">Running Themes Throughout</text:h>
      <text:p text:style-name="Text_20_body"><text:span text:style-name="Strong_20_Emphasis">Structural, not moral.</text:span> This was engineered. You didn't fail to resist it through weakness of character.</text:p>
      <text:p text:style-name="Text_20_body"><text:span text:style-name="Strong_20_Emphasis">Practice, not information.</text:span> Understanding why attention was damaged is necessary but not sufficient. The work is in the doing.</text:p>
      <text:p text:style-name="Text_20_body"><text:span text:style-name="Strong_20_Emphasis">Collective, not individual.</text:span> Willpower alone doesn't rebuild this. The community context is not incidental — it is the mechanism.</text:p>
      <text:p text:style-name="Text_20_body"><text:span text:style-name="Strong_20_Emphasis">Honest, not optimistic.</text:span> This is hard. It takes longer than people expect. Some practices will fail. The group reports truthfully.</text:p>
      <text:p text:style-name="Horizontal_20_Line"/>
      <text:h text:style-name="Heading_20_3" text:outline-level="3">What Success Looks Like</text:h>
      <text:p text:style-name="Text_20_body">Not the absence of phone use. Not a romanticized pre-digital state. A member who completes the structured phase and continues the practice group should be able to:</text:p>
      <text:p text:style-name="Text_20_body"><text:soft-page-break/>Sustain focused attention on a single task for at least thirty minutes. Read a genuinely difficult text and follow its argument. Sit in unstructured time without significant anxiety. Have a real conversation with full presence. Notice when their attention is being hijacked and have a repertoire of responses. Hold a complex problem in mind without immediately reaching for resolution.</text:p>
      <text:p text:style-name="Text_20_body">These are not extraordinary capacities. They are what human cognition is supposed to be able to do. The course is about getting back to baseline — and then building from there.</text:p>
      <text:p text:style-name="P15"><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indent="0.2in" style:auto-text-indent="false"/>
      <style:text-properties style:font-name="Libre Baskerville" fo:font-family="'Libre Baskervill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IM FELL English SC1" fo:font-family="'IM FELL English SC'" style:font-style-name="Bold"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IM FELL English SC1" fo:font-family="'IM FELL English SC'" style:font-style-name="Bold" style:font-pitch="variable" fo:font-size="11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1799in" style:contextual-spacing="false" fo:text-align="center" style:justify-single-word="false"/>
      <style:text-properties style:font-name="IM FELL English SC2" fo:font-family="'IM FELL English SC'" style:font-style-name="Regular" style:font-pitch="variable" fo:font-size="2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IM FELL English SC2" fo:font-family="'IM FELL English SC'" style:font-style-name="Regular" style:font-pitch="variable" fo:font-size="13pt" style:font-size-asian="18pt" style:font-size-complex="18pt"/>
    </style:style>
    <style:style style:name="First_20_Paragraph" style:display-name="First Paragraph" style:family="paragraph" style:parent-style-name="Standard" style:master-page-name="">
      <style:paragraph-properties fo:text-indent="0in" style:auto-text-indent="false" style:page-number="auto"/>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page-layout style:name="Mpm1">
      <style:page-layout-properties fo:page-width="8.5in" fo:page-height="11in" style:num-format="1" style:print-orientation="portrait" fo:margin-top="1.25in" fo:margin-bottom="1.2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Resolute Societies of Americ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3:48:24.763225727</meta:creation-date>
    <dc:date>2026-06-09T19:07:54.135669547</dc:date>
    <meta:editing-duration>PT8H3M12S</meta:editing-duration>
    <meta:editing-cycles>26</meta:editing-cycles>
    <meta:generator>LibreOffice/24.2.7.2$Linux_X86_64 LibreOffice_project/420$Build-2</meta:generator>
    <meta:document-statistic meta:table-count="0" meta:image-count="0" meta:object-count="0" meta:page-count="6" meta:paragraph-count="53" meta:word-count="1375" meta:character-count="9127" meta:non-whitespace-character-count="7774"/>
  </office:meta>
</office:document-meta>
</file>