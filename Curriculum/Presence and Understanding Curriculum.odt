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style style:name="P2" style:family="paragraph" style:parent-style-name="Subtitle">
      <style:text-properties fo:color="#1e3a5f" loext:opacity="100%"/>
    </style:style>
    <style:style style:name="P3" style:family="paragraph" style:parent-style-name="Standard">
      <style:paragraph-properties fo:margin-left="0in" fo:margin-right="0in" style:line-height-at-least="0.198in" fo:text-indent="0in" style:auto-text-indent="false"/>
      <style:text-properties fo:color="#111111" loext:opacity="100%" style:font-name="IM FELL English SC" fo:font-size="10.5pt" fo:font-weight="bold" officeooo:paragraph-rsid="001f52f8" fo:background-color="transparent"/>
    </style:style>
    <style:style style:name="P4" style:family="paragraph" style:parent-style-name="First_20_Paragraph">
      <style:text-properties fo:color="#2c2c2c" loext:opacity="100%"/>
    </style:style>
    <style:style style:name="P5" style:family="paragraph" style:parent-style-name="Standard">
      <style:paragraph-properties style:line-height-at-least="0.198in"/>
      <style:text-properties fo:color="#2c2c2c" loext:opacity="100%" style:font-name="IM FELL English SC" fo:font-size="10.5pt" fo:font-weight="bold" fo:background-color="transparent"/>
    </style:style>
    <style:style style:name="P6" style:family="paragraph" style:parent-style-name="Standard">
      <style:paragraph-properties style:line-height-at-least="0.198in"/>
      <style:text-properties fo:color="#2c2c2c" loext:opacity="100%" style:font-name="IM FELL English SC" fo:background-color="transparent"/>
    </style:style>
    <style:style style:name="P7" style:family="paragraph" style:parent-style-name="Standard">
      <style:text-properties fo:color="#2c2c2c" loext:opacity="100%"/>
    </style:style>
    <style:style style:name="P8" style:family="paragraph" style:parent-style-name="First_20_Paragraph">
      <style:text-properties fo:color="#2c2c2c" loext:opacity="100%" officeooo:paragraph-rsid="003a82d1"/>
    </style:style>
    <style:style style:name="P9" style:family="paragraph" style:parent-style-name="First_20_Paragraph">
      <style:text-properties fo:color="#2c2c2c" loext:opacity="100%" officeooo:paragraph-rsid="003afd50"/>
    </style:style>
    <style:style style:name="P10" style:family="paragraph" style:parent-style-name="Title">
      <style:text-properties fo:color="#1e3a5f" loext:opacity="100%" officeooo:rsid="003fa145" officeooo:paragraph-rsid="003fa145"/>
    </style:style>
    <style:style style:name="P11" style:family="paragraph" style:parent-style-name="Heading_20_1">
      <style:text-properties fo:color="#1e3a5f" loext:opacity="100%"/>
    </style:style>
    <style:style style:name="P12" style:family="paragraph" style:parent-style-name="Heading_20_2">
      <style:text-properties fo:color="#1e3a5f" loext:opacity="100%"/>
    </style:style>
    <style:style style:name="P13" style:family="paragraph" style:parent-style-name="Heading_20_3">
      <style:paragraph-properties style:line-height-at-least="0.198in" fo:text-indent="0in" style:auto-text-indent="false"/>
      <style:text-properties fo:color="#2c2c2c" loext:opacity="100%"/>
    </style:style>
    <style:style style:name="P14" style:family="paragraph" style:parent-style-name="Heading_20_4">
      <style:text-properties fo:color="#2c2c2c" loext:opacity="100%"/>
    </style:style>
    <style:style style:name="P15" style:family="paragraph" style:parent-style-name="Text_20_body">
      <style:text-properties fo:color="#2c2c2c" loext:opacity="100%"/>
    </style:style>
    <style:style style:name="P16" style:family="paragraph" style:parent-style-name="Text_20_body">
      <style:paragraph-properties style:line-height-at-least="0.198in" fo:text-indent="0in" style:auto-text-indent="false"/>
      <style:text-properties fo:color="#2c2c2c" loext:opacity="100%"/>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T1" style:family="text">
      <style:text-properties officeooo:rsid="00207e9d"/>
    </style:style>
    <style:style style:name="T2" style:family="text">
      <style:text-properties officeooo:rsid="0024f617"/>
    </style:style>
    <style:style style:name="T3" style:family="text">
      <style:text-properties officeooo:rsid="0026ccf4"/>
    </style:style>
    <style:style style:name="T4" style:family="text">
      <style:text-properties officeooo:rsid="0027efd4"/>
    </style:style>
    <style:style style:name="T5" style:family="text">
      <style:text-properties officeooo:rsid="00297856"/>
    </style:style>
    <style:style style:name="T6" style:family="text">
      <style:text-properties officeooo:rsid="002a39be"/>
    </style:style>
    <style:style style:name="T7" style:family="text">
      <style:text-properties officeooo:rsid="002b7d10"/>
    </style:style>
    <style:style style:name="T8" style:family="text">
      <style:text-properties officeooo:rsid="002cc6bf"/>
    </style:style>
    <style:style style:name="T9" style:family="text">
      <style:text-properties officeooo:rsid="002cf6af"/>
    </style:style>
    <style:style style:name="T10" style:family="text">
      <style:text-properties officeooo:rsid="002ec032"/>
    </style:style>
    <style:style style:name="T11" style:family="text">
      <style:text-properties officeooo:rsid="002f17f7"/>
    </style:style>
    <style:style style:name="T12" style:family="text">
      <style:text-properties officeooo:rsid="00310cfc"/>
    </style:style>
    <style:style style:name="T13" style:family="text">
      <style:text-properties officeooo:rsid="003210b5"/>
    </style:style>
    <style:style style:name="T14" style:family="text">
      <style:text-properties officeooo:rsid="003732d9"/>
    </style:style>
    <style:style style:name="T15" style:family="text">
      <style:text-properties officeooo:rsid="003783fc"/>
    </style:style>
    <style:style style:name="T16" style:family="text">
      <style:text-properties officeooo:rsid="003a82d1"/>
    </style:style>
    <style:style style:name="T17" style:family="text">
      <style:text-properties officeooo:rsid="00438421"/>
    </style:style>
    <style:style style:name="T18" style:family="text">
      <style:text-properties officeooo:rsid="0045f16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text:span text:style-name="T18">Cognitive Restoration</text:span> Program</text:p>
      <text:p text:style-name="P2"/>
      <text:p text:style-name="P5"/>
      <text:p text:style-name="P6"/>
      <text:h text:style-name="P11" text:outline-level="1">Preamble</text:h>
      <text:p text:style-name="P6"/>
      <text:p text:style-name="P4">There are moments in history that test the character of a nation, that demand more than ordinary times prepare <text:span text:style-name="T3">any person</text:span> for. We believe we are living in such a moment. We do not take that lightly. We resolve to meet it together.</text:p>
      <text:p text:style-name="P6"/>
      <text:h text:style-name="P11" text:outline-level="1">Foundational Principles</text:h>
      <text:h text:style-name="P13" text:outline-level="3"><text:span text:style-name="Strong_20_Emphasis">A Working Society Course in Presence and Understanding</text:span></text:h>
      <text:p text:style-name="Text_20_body"><text:span text:style-name="Strong_20_Emphasis">Format:</text:span> Small group, approximately 6 members plus one guide <text:span text:style-name="Strong_20_Emphasis">Session length:</text:span> 90 minutes <text:span text:style-name="Strong_20_Emphasis">Frequency:</text:span> Weekly <text:span text:style-name="Strong_20_Emphasis">Duration:</text:span> Open-ended — structured phase of approximately 12 sessions, then ongoing practice woven into community life <text:span text:style-name="Strong_20_Emphasis">Setting:</text:span> In person, no devices in the room <text:span text:style-name="Strong_20_Emphasis">Note:</text:span> This course works best when members are already engaged in Working Society community life — meetings, shared work, collective decisions. The course reflects on real conversations happening in context, not simulated ones.</text:p>
      <text:p text:style-name="Horizontal_20_Line"/>
      <text:h text:style-name="Heading_20_3" text:outline-level="3">What This Course Is</text:h>
      <text:p text:style-name="Text_20_body">A systematic examination of what conversation actually requires and a practice of doing it better. Not communication skills. Not technique. The actual thing — two or more people present with each other, building understanding that neither had alone, occasionally being changed by what they hear.</text:p>
      <text:p text:style-name="Text_20_body">The damage the attention economy did to conversation is specific: it shortened tolerance for silence, accelerated the pace of exchange, rewarded performance over presence, made exit always available, and replaced the <text:soft-page-break/>experience of being genuinely heard with the simulation of being liked. The result is a population that talks constantly and converses rarely.</text:p>
      <text:p text:style-name="Text_20_body">This course is about recovering the real thing.</text:p>
      <text:p text:style-name="Horizontal_20_Line"/>
      <text:h text:style-name="Heading_20_3" text:outline-level="3">The Guide's Role</text:h>
      <text:p text:style-name="Text_20_body">Create conditions. Protect the space. Name what you observe without judgment. Model genuine presence — you are not demonstrating technique, you are actually here.</text:p>
      <text:p text:style-name="Text_20_body">The hardest part of guiding this course is resisting the urge to teach. Most of what needs to happen will happen if the conditions are right and someone is paying careful attention to what's occurring. Your job is mostly to slow things down, ask what people noticed, and occasionally name something the group is doing that they haven't seen yet.</text:p>
      <text:p text:style-name="Text_20_body">You will need to be comfortable with silence. Long silence. Silence that feels like failure and isn't.</text:p>
      <text:p text:style-name="Horizontal_20_Line"/>
      <text:h text:style-name="Heading_20_3" text:outline-level="3">A Note on Format</text:h>
      <text:p text:style-name="Text_20_body">Sessions in this course are less structured than Courses 1 and 2. Each session has a frame — a practice, a question, a structured exercise — but the content is what actually happens in the room. The guide works with what arises rather than delivering a curriculum. What follows is a guide to the arc and the tools, not a script.</text:p>
      <text:p text:style-name="Horizontal_20_Line"/>
      <text:h text:style-name="Heading_20_3" text:outline-level="3">Phase 1: What Conversation Is and Isn't</text:h>
      <text:p text:style-name="Text_20_body"><text:span text:style-name="Emphasis">Sessions 1–3</text:span> <text:span text:style-name="Emphasis">Goal: Establish honest baseline — what are we actually doing when we talk to each other?</text:span></text:p>
      <text:p text:style-name="Text_20_body"><text:span text:style-name="Strong_20_Emphasis">Session 1 — What We Lost</text:span></text:p>
      <text:p text:style-name="Text_20_body">Open with a question and nothing else: when was the last time you had a conversation that changed how you saw something?</text:p>
      <text:p text:style-name="Text_20_body">Let that sit. Don't rush the silence. What comes up is already the material.</text:p>
      <text:p text:style-name="Text_20_body"><text:soft-page-break/>The session works with what emerges from that question to build a shared picture of what genuine conversation feels like when it happens — and how rarely it happens. Members will have examples. They'll also have a felt sense of the contrast between those rare conversations and most of what passes for conversation in daily life.</text:p>
      <text:p text:style-name="Text_20_body">Concepts named but not belabored: the difference between talking and conversing. Exchange versus encounter. The specific ways digital communication shaped expectations — speed, brevity, performance, the always-available exit.</text:p>
      <text:p text:style-name="Text_20_body">No practice assigned this week beyond one instruction: notice conversations. Not to evaluate them — just to notice what's actually happening.</text:p>
      <text:p text:style-name="Text_20_body"><text:span text:style-name="Strong_20_Emphasis">Session 2 — The Listener's Half</text:span></text:p>
      <text:p text:style-name="Text_20_body">Listening is not waiting to speak. This is obvious when stated and almost universally violated in practice.</text:p>
      <text:p text:style-name="Text_20_body">The session examines what actual listening requires: suspending your own response long enough to genuinely receive what someone is saying. Not just the words — the meaning, the feeling, the thing underneath the thing being said. This is cognitively demanding in a way people underestimate, especially when the attention span has been shortened and the instinct is to process quickly and move on.</text:p>
      <text:p text:style-name="Text_20_body">Structured exercise: pairs. One person speaks for four minutes — something real, something that matters to them, not a performance. The listener's only job is to listen. No response, no questions, no nodding strategy. Then the listener reflects back what they heard — not a summary, not an interpretation, but what actually landed. Speaker responds: what was accurate, what was missed, what was surprising.</text:p>
      <text:p text:style-name="Text_20_body">Debrief as a group: what was it like to be listened to that way? What was it like to listen that way? What got in the way?</text:p>
      <text:p text:style-name="Text_20_body">Practice: one conversation this week where you make listening your explicit intention. Not technique — intention. Report back.</text:p>
      <text:p text:style-name="Text_20_body"><text:span text:style-name="Strong_20_Emphasis">Session 3 — The Talker's Half</text:span></text:p>
      <text:p text:style-name="Text_20_body">If listening is not waiting to speak, speaking is not performing. The specific deformation social media produced in how people express themselves: everything optimized for reception, for reaction, for the performance of a self <text:soft-page-break/>that needs external validation. The result is people who are very good at saying things that sound good and much less practiced at saying what they actually mean.</text:p>
      <text:p text:style-name="Text_20_body">Saying what you actually mean is harder than it sounds. It requires knowing what you actually mean, which requires a degree of self-knowledge and internal attention that has also been degraded. It requires tolerating the vulnerability of being genuinely known rather than strategically presented.</text:p>
      <text:p text:style-name="Text_20_body">Structured exercise: each member takes two minutes to say something true that they haven't said in this group yet. Not a secret — just something real. Something they mean. The group listens without response until everyone has spoken. Then: what was it like to say something without immediately knowing how it would land?</text:p>
      <text:p text:style-name="Text_20_body">Practice: one exchange this week where you say what you actually mean rather than what you think will be well received. Notice the difference.</text:p>
      <text:p text:style-name="Horizontal_20_Line"/>
      <text:h text:style-name="Heading_20_3" text:outline-level="3">Phase 2: What Gets in the Way</text:h>
      <text:p text:style-name="Text_20_body"><text:span text:style-name="Emphasis">Sessions 4–7</text:span> <text:span text:style-name="Emphasis">Goal: Examine the specific obstacles to genuine conversation and work with them directly</text:span></text:p>
      <text:p text:style-name="Text_20_body"><text:span text:style-name="Strong_20_Emphasis">Session 4 — Speed and Silence</text:span></text:p>
      <text:p text:style-name="Text_20_body">The pace of contemporary conversation is calibrated to digital exchange — fast, compressed, no gaps. Silence has become intolerable. The instinct to fill it is almost physical.</text:p>
      <text:p text:style-name="Text_20_body">But silence in conversation is not empty. It's where thinking happens, where feeling catches up with words, where something that hasn't been said yet becomes sayable. A conversation that never pauses is a conversation that never goes anywhere new.</text:p>
      <text:p text:style-name="Text_20_body">The session works directly with silence. Extended periods of it. The guide introduces a question and lets it sit for longer than is comfortable. Members stay with it. What happens in the silence? What wants to be said that wouldn't have been said if someone had jumped in?</text:p>
      <text:p text:style-name="Text_20_body">Practice: in one conversation this week, let a silence be. Don't fill it. See what happens on the other side of it.</text:p>
      <text:p text:style-name="Text_20_body"><text:soft-page-break/><text:span text:style-name="Strong_20_Emphasis">Session 5 — Disagreement Without Destruction</text:span></text:p>
      <text:p text:style-name="Text_20_body">This is where most conversation fails. Disagreement triggers defensiveness, which triggers counter-attack, which produces heat rather than light. The alternative — genuine engagement with a position you don't hold — feels like losing, like weakness, like betrayal of your own view.</text:p>
      <text:p text:style-name="Text_20_body">It isn't. It's the condition for thinking together rather than just talking past each other.</text:p>
      <text:p text:style-name="Text_20_body">The session distinguishes three things that look like disagreement but are different: disagreement about facts, disagreement about values, and disagreement about interpretation. Each requires a different response. Conflating them is why most disagreements go nowhere.</text:p>
      <text:p text:style-name="Text_20_body">Structured exercise: the group takes a real disagreement — something members actually see differently — and works through it using explicit process. Before anyone argues for their position, each person must state the opposing position well enough that the person holding it confirms it's accurate. Only then does anyone respond.</text:p>
      <text:p text:style-name="Text_20_body">Debrief: what changed when you had to understand first?</text:p>
      <text:p text:style-name="Text_20_body">Practice: one disagreement this week where you attempt genuine understanding before response. Not as a technique — as an actual intention.</text:p>
      <text:p text:style-name="Text_20_body"><text:span text:style-name="Strong_20_Emphasis">Session 6 — The Stories We Tell</text:span></text:p>
      <text:p text:style-name="Text_20_body">Every person enters every conversation carrying a story about what's happening — about who the other person is, what they mean, what they want, why they're saying what they're saying. These stories are mostly invisible to the person carrying them and mostly wrong in important ways.</text:p>
      <text:p text:style-name="Text_20_body">The session works with the gap between what someone said and what you heard — not the words but the meaning you made of the words. That gap is where most conversational damage happens. Someone says something. You hear something different. You respond to what you heard. They respond to your response as if you'd responded to what they said. Within a few exchanges nobody is talking to the actual person in the room anymore.</text:p>
      <text:p text:style-name="Text_20_body">Structured exercise: the guide describes a brief scenario — something someone said in a conversation. Each member writes down what they think the speaker meant. Compare. The variation is always larger than people expect. What does this tell us about how much we're constructing rather than receiving?</text:p>
      <text:p text:style-name="Text_20_body"><text:soft-page-break/>Practice: in one conversation this week, notice a moment when you made a meaning. Pause. Check it. Ask rather than assume.</text:p>
      <text:p text:style-name="Text_20_body"><text:span text:style-name="Strong_20_Emphasis">Session 7 — Devices, Presence, and the Available Exit</text:span></text:p>
      <text:p text:style-name="Text_20_body">The specific effect of always-available exit on conversational depth. When leaving is always possible and easy, staying requires a different quality of choice. When the phone is in your pocket, part of you is always somewhere else. This is not a moral failing — it's a structural feature of the environment that has become the baseline condition of most conversation.</text:p>
      <text:p text:style-name="Text_20_body">The session examines this honestly: what does it actually feel like to be fully present with another person with no exit available? Not trapped — present. Most members will find it has been a long time since they experienced this routinely.</text:p>
      <text:p text:style-name="Text_20_body">No technique here. Just honest examination of what has changed and what it costs.</text:p>
      <text:p text:style-name="Text_20_body">Practice: one conversation this week in conditions of genuine presence — phone not just face-down but absent, no time pressure, no available exit. What was different?</text:p>
      <text:p text:style-name="Horizontal_20_Line"/>
      <text:h text:style-name="Heading_20_3" text:outline-level="3">Phase 3: Going Deeper</text:h>
      <text:p text:style-name="Text_20_body"><text:span text:style-name="Emphasis">Sessions 8–10</text:span> <text:span text:style-name="Emphasis">Goal: Practice the harder forms of conversation</text:span></text:p>
      <text:p text:style-name="Text_20_body"><text:span text:style-name="Strong_20_Emphasis">Session 8 — Being Changed</text:span></text:p>
      <text:p text:style-name="Text_20_body">The hardest thing conversation can ask: to be genuinely changed by what another person says. Not persuaded by a better argument — actually changed. A new way of seeing something. A feeling you didn't expect. A recognition that your account of something was incomplete.</text:p>
      <text:p text:style-name="Text_20_body">This is the standard by which genuine conversation can be measured. If you leave every conversation holding exactly the views you came in with, you were performing, not conversing.</text:p>
      <text:p text:style-name="Text_20_body">The session examines what being changed feels like, what it requires, and what prevents it. The obstacles are mostly ego-protective: if I change my view I was wrong, and being wrong means something about my worth. Untangling that knot is part of the work.</text:p>
      <text:p text:style-name="Text_20_body"><text:soft-page-break/>Structured exercise: each member recalls a conversation that actually changed them. What happened? What made it possible? What was the condition that allowed it?</text:p>
      <text:p text:style-name="Text_20_body"><text:span text:style-name="Strong_20_Emphasis">Session 9 — Difficult Conversations</text:span></text:p>
      <text:p text:style-name="Text_20_body">Conversations with real stakes — conflict, accountability, grief, love, fear, anger. The instinct is to avoid these or to manage them into safety. The cost of that instinct is relationships that stay shallow and communities that can't navigate hard things.</text:p>
      <text:p text:style-name="Text_20_body">The session doesn't teach a method for difficult conversations. It examines what makes them hard — the emotional load, the self-protection, the fear of what might be said or felt — and what it looks like when someone moves toward difficulty rather than away from it.</text:p>
      <text:p text:style-name="Text_20_body">The Working Society will require difficult conversations. Accountability processes, collective decisions under stress, conflicts between members. The capacity to have those conversations well is not separate from the health of the community — it is the health of the community.</text:p>
      <text:p text:style-name="Text_20_body">Practice: identify one conversation you've been avoiding. You don't have to have it this week. Just identify it and write about why you've been avoiding it.</text:p>
      <text:p text:style-name="Text_20_body"><text:span text:style-name="Strong_20_Emphasis">Session 10 — The Conversation Beneath the Conversation</text:span></text:p>
      <text:p text:style-name="Text_20_body">Most conversations have a surface and a depth. The surface is the explicit content — what's being said. The depth is what's actually at stake for each person, what they need, what they're afraid of, what they're not saying. Good conversation eventually reaches the depth. Most conversation never does.</text:p>
      <text:p text:style-name="Text_20_body">The session works with this through observation of the group's own conversations in previous sessions. The guide has been tracking: what went unsaid? Where did the conversation stay shallow when it could have gone deeper? What were the moments when depth became possible and someone pulled back?</text:p>
      <text:p text:style-name="Text_20_body">This session names those moments honestly. Not as criticism — as data about what the group is still working on.</text:p>
      <text:p text:style-name="Horizontal_20_Line"/>
      <text:h text:style-name="Heading_20_3" text:outline-level="3"><text:soft-page-break/>Phase 4: Integration</text:h>
      <text:p text:style-name="Text_20_body"><text:span text:style-name="Emphasis">Sessions 11–12</text:span></text:p>
      <text:p text:style-name="Text_20_body"><text:span text:style-name="Strong_20_Emphasis">Session 11 — Conversation in Community</text:span></text:p>
      <text:p text:style-name="Text_20_body">How everything in this course connects to the Working Society's actual life together. The governance processes require members who can disagree without destroying. The accountability structures require members who can speak and hear hard things. The shared work requires members who can be present with each other. The mutual aid requires members who can ask for help and receive it — which is its own conversational challenge.</text:p>
      <text:p text:style-name="Text_20_body">This session maps the course back onto community life: where do the capacities we've been building actually matter? Where has the group already used them? Where are the places the community's conversational health is still fragile?</text:p>
      <text:p text:style-name="Text_20_body"><text:span text:style-name="Strong_20_Emphasis">Session 12 — The Ongoing Practice</text:span></text:p>
      <text:p text:style-name="Text_20_body">Transition to practice woven into community life. Unlike Courses 1 and 2, this course doesn't continue as a separate practice group. It continues as the quality of conversation in everything the community does.</text:p>
      <text:p text:style-name="Text_20_body">The group establishes norms: what do we commit to in how we talk with each other? Not rules — intentions. Written down, revisited periodically, held lightly but genuinely.</text:p>
      <text:p text:style-name="Horizontal_20_Line"/>
      <text:h text:style-name="Heading_20_3" text:outline-level="3">Ongoing Practice</text:h>
      <text:p text:style-name="Text_20_body"><text:span text:style-name="Emphasis">No terminus — woven into community life</text:span></text:p>
      <text:p text:style-name="Text_20_body">The practices from this course become part of how the Working Society community conducts itself. New members encounter them through the culture rather than only through the course. The guide may periodically convene the group to reflect on how the community's conversational health is doing — not as a class but as a check-in.</text:p>
      <text:p text:style-name="Horizontal_20_Line"/>
      <text:h text:style-name="Heading_20_3" text:outline-level="3"><text:soft-page-break/>Running Themes Throughout</text:h>
      <text:p text:style-name="Text_20_body"><text:span text:style-name="Strong_20_Emphasis">Presence not performance.</text:span> The distinction is named regularly. The group learns to feel the difference.</text:p>
      <text:p text:style-name="Text_20_body"><text:span text:style-name="Strong_20_Emphasis">Slow not fast.</text:span> Almost every conversational failure is a speed problem at its root. The course consistently moves against the pace people bring in from outside.</text:p>
      <text:p text:style-name="Text_20_body"><text:span text:style-name="Strong_20_Emphasis">Real not simulated.</text:span> Every exercise uses actual material from the members' actual lives. Nothing hypothetical.</text:p>
      <text:p text:style-name="Text_20_body"><text:span text:style-name="Strong_20_Emphasis">Noticing not fixing.</text:span> The guide's primary move is to help the group notice what's happening. The fixing takes care of itself when the noticing is honest.</text:p>
      <text:p text:style-name="Horizontal_20_Line"/>
      <text:h text:style-name="Heading_20_3" text:outline-level="3">What Success Looks Like</text:h>
      <text:p text:style-name="Text_20_body">A member who completes the structured phase should be able to:</text:p>
      <text:p text:style-name="Text_20_body">Listen to another person without preparing their response. Sit with silence without anxiety. Say what they actually mean rather than what they think will land well. Engage a disagreement with genuine curiosity rather than defensiveness. Notice when they're performing rather than present. Have a conversation with real stakes without managing it into safety. Be changed occasionally by what another person says.</text:p>
      <text:p text:style-name="Text_20_body">None of these are advanced. They are what conversation is supposed to be. The course is about recovering the conditions under which they become possible again.</text:p>
      <text:p text:style-name="P16"><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indent="0.2in" style:auto-text-indent="false"/>
      <style:text-properties style:font-name="Libre Baskerville" fo:font-family="'Libre Baskervill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IM FELL English SC1" fo:font-family="'IM FELL English SC'" style:font-style-name="Bold"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IM FELL English SC1" fo:font-family="'IM FELL English SC'" style:font-style-name="Bold" style:font-pitch="variable" fo:font-size="11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1799in" style:contextual-spacing="false" fo:text-align="center" style:justify-single-word="false"/>
      <style:text-properties style:font-name="IM FELL English SC2" fo:font-family="'IM FELL English SC'" style:font-style-name="Regular"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IM FELL English SC2" fo:font-family="'IM FELL English SC'" style:font-style-name="Regular" style:font-pitch="variable" fo:font-size="13pt" style:font-size-asian="18pt" style:font-size-complex="18pt"/>
    </style:style>
    <style:style style:name="First_20_Paragraph" style:display-name="First Paragraph" style:family="paragraph" style:parent-style-name="Standard" style:master-page-name="">
      <style:paragraph-properties fo:text-indent="0in" style:auto-text-indent="false" style:page-number="auto"/>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Resolute Societies of Americ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3:48:24.763225727</meta:creation-date>
    <dc:date>2026-06-09T19:12:37.106421309</dc:date>
    <meta:editing-duration>PT8H7M54S</meta:editing-duration>
    <meta:editing-cycles>28</meta:editing-cycles>
    <meta:generator>LibreOffice/24.2.7.2$Linux_X86_64 LibreOffice_project/420$Build-2</meta:generator>
    <meta:document-statistic meta:table-count="0" meta:image-count="0" meta:object-count="0" meta:page-count="9" meta:paragraph-count="96" meta:word-count="2481" meta:character-count="15664" meta:non-whitespace-character-count="13233"/>
  </office:meta>
</office:document-meta>
</file>