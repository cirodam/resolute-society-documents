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IM FELL English SC" svg:font-family="'IM FELL English SC'" style:font-pitch="variable"/>
    <style:font-face style:name="IM FELL English SC1" svg:font-family="'IM FELL English SC'" style:font-adornments="Bold" style:font-pitch="variable"/>
    <style:font-face style:name="IM FELL English SC2" svg:font-family="'IM FELL English SC'" style:font-adornments="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re Baskerville" svg:font-family="'Libre Baskerville'" style:font-adornments="Regular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end" style:justify-single-word="false" fo:padding="0.0201in" fo:border-left="none" fo:border-right="none" fo:border-top="none" fo:border-bottom="0.06pt solid #000000"/>
      <style:text-properties fo:color="#1e3a5f" loext:opacity="100%" officeooo:rsid="00207e9d" officeooo:paragraph-rsid="00207e9d"/>
    </style:style>
    <style:style style:name="P2" style:family="paragraph" style:parent-style-name="Subtitle">
      <style:text-properties fo:color="#1e3a5f" loext:opacity="100%"/>
    </style:style>
    <style:style style:name="P3" style:family="paragraph" style:parent-style-name="Standard">
      <style:paragraph-properties fo:margin-left="0in" fo:margin-right="0in" style:line-height-at-least="0.198in" fo:text-indent="0in" style:auto-text-indent="false"/>
      <style:text-properties fo:color="#111111" loext:opacity="100%" style:font-name="IM FELL English SC" fo:font-size="10.5pt" fo:font-weight="bold" officeooo:paragraph-rsid="001f52f8" fo:background-color="transparent"/>
    </style:style>
    <style:style style:name="P4" style:family="paragraph" style:parent-style-name="First_20_Paragraph">
      <style:text-properties fo:color="#2c2c2c" loext:opacity="100%"/>
    </style:style>
    <style:style style:name="P5" style:family="paragraph" style:parent-style-name="Standard">
      <style:paragraph-properties style:line-height-at-least="0.198in"/>
      <style:text-properties fo:color="#2c2c2c" loext:opacity="100%" style:font-name="IM FELL English SC" fo:font-size="10.5pt" fo:font-weight="bold" fo:background-color="transparent"/>
    </style:style>
    <style:style style:name="P6" style:family="paragraph" style:parent-style-name="Standard">
      <style:paragraph-properties style:line-height-at-least="0.198in"/>
      <style:text-properties fo:color="#2c2c2c" loext:opacity="100%" style:font-name="IM FELL English SC" fo:background-color="transparent"/>
    </style:style>
    <style:style style:name="P7" style:family="paragraph" style:parent-style-name="Standard">
      <style:text-properties fo:color="#2c2c2c" loext:opacity="100%"/>
    </style:style>
    <style:style style:name="P8" style:family="paragraph" style:parent-style-name="First_20_Paragraph">
      <style:text-properties fo:color="#2c2c2c" loext:opacity="100%" officeooo:paragraph-rsid="003a82d1"/>
    </style:style>
    <style:style style:name="P9" style:family="paragraph" style:parent-style-name="First_20_Paragraph">
      <style:text-properties fo:color="#2c2c2c" loext:opacity="100%" officeooo:paragraph-rsid="003afd50"/>
    </style:style>
    <style:style style:name="P10" style:family="paragraph" style:parent-style-name="Title">
      <style:text-properties fo:color="#1e3a5f" loext:opacity="100%" officeooo:rsid="003fa145" officeooo:paragraph-rsid="003fa145"/>
    </style:style>
    <style:style style:name="P11" style:family="paragraph" style:parent-style-name="Heading_20_1">
      <style:text-properties fo:color="#1e3a5f" loext:opacity="100%"/>
    </style:style>
    <style:style style:name="P12" style:family="paragraph" style:parent-style-name="Heading_20_2">
      <style:text-properties fo:color="#1e3a5f" loext:opacity="100%"/>
    </style:style>
    <style:style style:name="P13" style:family="paragraph" style:parent-style-name="Heading_20_4">
      <style:text-properties fo:color="#2c2c2c" loext:opacity="100%"/>
    </style:style>
    <style:style style:name="P14" style:family="paragraph" style:parent-style-name="Text_20_body">
      <style:text-properties fo:color="#2c2c2c" loext:opacity="100%"/>
    </style:style>
    <style:style style:name="P15" style:family="paragraph" style:parent-style-name="Text_20_body" style:list-style-name="L1"/>
    <style:style style:name="P16" style:family="paragraph" style:parent-style-name="Text_20_body" style:list-style-name="L1">
      <style:paragraph-properties fo:margin-top="0in" fo:margin-bottom="0in" style:contextual-spacing="false"/>
    </style:style>
    <style:style style:name="T1" style:family="text">
      <style:text-properties officeooo:rsid="00207e9d"/>
    </style:style>
    <style:style style:name="T2" style:family="text">
      <style:text-properties officeooo:rsid="0024f617"/>
    </style:style>
    <style:style style:name="T3" style:family="text">
      <style:text-properties officeooo:rsid="0026ccf4"/>
    </style:style>
    <style:style style:name="T4" style:family="text">
      <style:text-properties officeooo:rsid="0027efd4"/>
    </style:style>
    <style:style style:name="T5" style:family="text">
      <style:text-properties officeooo:rsid="00297856"/>
    </style:style>
    <style:style style:name="T6" style:family="text">
      <style:text-properties officeooo:rsid="002a39be"/>
    </style:style>
    <style:style style:name="T7" style:family="text">
      <style:text-properties officeooo:rsid="002b7d10"/>
    </style:style>
    <style:style style:name="T8" style:family="text">
      <style:text-properties officeooo:rsid="002cc6bf"/>
    </style:style>
    <style:style style:name="T9" style:family="text">
      <style:text-properties officeooo:rsid="002cf6af"/>
    </style:style>
    <style:style style:name="T10" style:family="text">
      <style:text-properties officeooo:rsid="002ec032"/>
    </style:style>
    <style:style style:name="T11" style:family="text">
      <style:text-properties officeooo:rsid="002f17f7"/>
    </style:style>
    <style:style style:name="T12" style:family="text">
      <style:text-properties officeooo:rsid="00310cfc"/>
    </style:style>
    <style:style style:name="T13" style:family="text">
      <style:text-properties officeooo:rsid="003210b5"/>
    </style:style>
    <style:style style:name="T14" style:family="text">
      <style:text-properties officeooo:rsid="003732d9"/>
    </style:style>
    <style:style style:name="T15" style:family="text">
      <style:text-properties officeooo:rsid="003783fc"/>
    </style:style>
    <style:style style:name="T16" style:family="text">
      <style:text-properties officeooo:rsid="003a82d1"/>
    </style:style>
    <style:style style:name="T17" style:family="text">
      <style:text-properties officeooo:rsid="0043842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10">Foundational <text:span text:style-name="T17">Numeracy</text:span> Program</text:p>
      <text:p text:style-name="P2"/>
      <text:p text:style-name="P5"/>
      <text:p text:style-name="P6"/>
      <text:h text:style-name="P11" text:outline-level="1">Preamble</text:h>
      <text:p text:style-name="P6"/>
      <text:p text:style-name="P4">There are moments in history that test the character of a nation, that demand more than ordinary times prepare <text:span text:style-name="T3">any person</text:span> for. We believe we are living in such a moment. We do not take that lightly. We resolve to meet it together.</text:p>
      <text:p text:style-name="P6"/>
      <text:h text:style-name="P11" text:outline-level="1">Foundational Principles</text:h>
      <text:p text:style-name="P6"/>
      <text:p text:style-name="P14"><text:span text:style-name="Strong_20_Emphasis">Pre-numeracy</text:span></text:p>
      <text:list text:style-name="L1">
        <text:list-item>
          <text:p text:style-name="P16">Counting with physical objects </text:p>
        </text:list-item>
        <text:list-item>
          <text:p text:style-name="P16">One-to-one correspondence (this many things = this number) </text:p>
        </text:list-item>
        <text:list-item>
          <text:p text:style-name="P16">Recognizing numerals 0–9 </text:p>
        </text:list-item>
        <text:list-item>
          <text:p text:style-name="P15">Comparing quantities: more, less, same</text:p>
        </text:list-item>
      </text:list>
      <text:p text:style-name="P14"><text:span text:style-name="Strong_20_Emphasis">Unit N1 — Number Sense and Place Value</text:span> <text:span text:style-name="Emphasis">(6–8 sessions)</text:span> What numbers represent. Reading and writing numbers to 1,000. Comparing magnitudes. Which is larger: 0.75 or 0.8? Ordering numbers on a line. Worked through physical quantities: weights, counts, measurements.</text:p>
      <text:p text:style-name="Text_20_body"><text:span text:style-name="Strong_20_Emphasis">Unit N2 — Addition and Subtraction</text:span> <text:span text:style-name="Emphasis">(6–8 sessions)</text:span> Concept before algorithm. What does adding mean? What does subtracting mean? Mental strategies: rounding, breaking apart. When to use which operation. Practical contexts: adjusting a recipe, calculating change, figuring leftover material.</text:p>
      <text:p text:style-name="Text_20_body"><text:span text:style-name="Strong_20_Emphasis">Unit N3 — Multiplication and Division as Concepts</text:span> <text:span text:style-name="Emphasis">(8–10 sessions)</text:span> Not times tables as memorization — multiplication as repeated addition, division as equal sharing or grouping. How many fence posts for 60 feet at one every 8 feet? How many jars does a batch of 24 servings fill if each jar holds 3? Build intuition before procedure.</text:p>
      <text:p text:style-name="Text_20_body"><text:soft-page-break/><text:span text:style-name="Strong_20_Emphasis">Unit N4 — Fractions</text:span> <text:span text:style-name="Emphasis">(8–10 sessions)</text:span> What a fraction means: part of a whole, part of a group. Halves, thirds, quarters first. Equivalence: one half equals two quarters. Comparing fractions. Practical: measuring cups, recipe scaling, dividing a plot of land.</text:p>
      <text:p text:style-name="Text_20_body"><text:span text:style-name="Strong_20_Emphasis">Unit N5 — Decimals</text:span> <text:span text:style-name="Emphasis">(6–8 sessions)</text:span> Place value extended past the decimal point. Connection to fractions: 0.5 is one half, 0.25 is one quarter. Reading decimals on scales, thermometers, price tags. Comparing and ordering decimals.</text:p>
      <text:p text:style-name="Text_20_body"><text:span text:style-name="Strong_20_Emphasis">Unit N6 — Measurement</text:span> <text:span text:style-name="Emphasis">(6–8 sessions)</text:span> Length, area, volume, weight, temperature. Reading a ruler and tape measure. Standard and metric. What area means and why you multiply two dimensions. Practical: how much soil to fill a bed, how much paint for a wall, medicine doses.</text:p>
      <text:p text:style-name="P14"/>
      <text:p text:style-name="P14"/>
      <text:h text:style-name="P13" text:outline-level="4">Numeracy Track</text:h>
      <text:p text:style-name="Text_20_body"><text:span text:style-name="Strong_20_Emphasis">Unit N7 — Percentages</text:span> <text:span text:style-name="Emphasis">(6–8 sessions)</text:span> Percent means per hundred. Connection to fractions and decimals unified explicitly: 50% = one half = 0.5. Calculating discounts, tips, increases, proportions of a group. Reading percentage information in health and agriculture contexts.</text:p>
      <text:p text:style-name="Text_20_body"><text:span text:style-name="Strong_20_Emphasis">Unit N8 — Ratios and Proportional Reasoning</text:span> <text:span text:style-name="Emphasis">(8–10 sessions)</text:span> Scaling up and down. Mixing ratios: fertilizer, mortar, medicine. Recipe scaling. Unit rates: cost per pound, yield per acre, dose per kilogram. This is the numeracy of practical skilled work.</text:p>
      <text:p text:style-name="Text_20_body"><text:span text:style-name="Strong_20_Emphasis">Unit N9 — Time and Scheduling</text:span> <text:span text:style-name="Emphasis">(4–6 sessions)</text:span> Reading clocks and calendars. Calculating durations and intervals. Planning backwards from a deadline. Seasonal and planting schedules.</text:p>
      <text:p text:style-name="Text_20_body"><text:span text:style-name="Strong_20_Emphasis">Unit N10 — Money and Basic Finance</text:span> <text:span text:style-name="Emphasis">(6–8 sessions)</text:span> Making change. Budgeting: income, expenses, what's left. Calculating unit prices and comparing value. Understanding simple interest in plain terms. Reading a basic bill or statement.</text:p>
      <text:p text:style-name="Text_20_body"><text:span text:style-name="Strong_20_Emphasis">Unit N11 — Data and Estimation</text:span> <text:span text:style-name="Emphasis">(6–8 sessions)</text:span> Reading tables, bar charts, pie charts. What an average means and what it hides. Estimation as a checking tool: is this answer in the right range? Rounding strategies. Interpreting health data, yield records, community resource figures.</text:p>
      <text:p text:style-name="P14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IM FELL English SC" svg:font-family="'IM FELL English SC'" style:font-pitch="variable"/>
    <style:font-face style:name="IM FELL English SC1" svg:font-family="'IM FELL English SC'" style:font-adornments="Bold" style:font-pitch="variable"/>
    <style:font-face style:name="IM FELL English SC2" svg:font-family="'IM FELL English SC'" style:font-adornments="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re Baskerville" svg:font-family="'Libre Baskerville'" style:font-adornments="Regular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indent="0.2in" style:auto-text-indent="false"/>
      <style:text-properties style:font-name="Libre Baskerville" fo:font-family="'Libre Baskerville'" style:font-style-name="Regular" style:font-pitch="variable" fo:font-size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IM FELL English SC1" fo:font-family="'IM FELL English SC'" style:font-style-name="Bold" style:font-pitch="variable" fo:font-size="16pt" fo:font-weight="normal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style:font-name="IM FELL English SC1" fo:font-family="'IM FELL English SC'" style:font-style-name="Bold" style:font-pitch="variable" fo:font-size="11pt" fo:font-weight="normal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margin-top="0.1701in" fo:margin-bottom="0.1799in" style:contextual-spacing="false" fo:text-align="center" style:justify-single-word="false"/>
      <style:text-properties style:font-name="IM FELL English SC2" fo:font-family="'IM FELL English SC'" style:font-style-name="Regular" style:font-pitch="variable" fo:font-size="22pt" fo:font-weight="normal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style:font-name="IM FELL English SC2" fo:font-family="'IM FELL English SC'" style:font-style-name="Regular" style:font-pitch="variable" fo:font-size="13pt" style:font-size-asian="18pt" style:font-size-complex="18pt"/>
    </style:style>
    <style:style style:name="First_20_Paragraph" style:display-name="First Paragraph" style:family="paragraph" style:parent-style-name="Standard" style:master-page-name="">
      <style:paragraph-properties fo:text-indent="0in" style:auto-text-indent="false" style:page-number="auto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 fo:padding="0.0201in" fo:border-left="none" fo:border-right="none" fo:border-top="none" fo:border-bottom="0.06pt solid #000000"/>
      <style:text-properties fo:color="#1e3a5f" loext:opacity="100%" officeooo:rsid="00207e9d" officeooo:paragraph-rsid="00207e9d"/>
    </style:style>
    <style:page-layout style:name="Mpm1">
      <style:page-layout-properties fo:page-width="8.5in" fo:page-height="11in" style:num-format="1" style:print-orientation="portrait" fo:margin-top="1.25in" fo:margin-bottom="1.25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The Resolute Societies of America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08T13:48:24.763225727</meta:creation-date>
    <dc:date>2026-06-09T18:53:03.491431576</dc:date>
    <meta:editing-duration>PT7H48M22S</meta:editing-duration>
    <meta:editing-cycles>25</meta:editing-cycles>
    <meta:generator>LibreOffice/24.2.7.2$Linux_X86_64 LibreOffice_project/420$Build-2</meta:generator>
    <meta:document-statistic meta:table-count="0" meta:image-count="0" meta:object-count="0" meta:page-count="3" meta:paragraph-count="22" meta:word-count="517" meta:character-count="3361" meta:non-whitespace-character-count="2867"/>
  </office:meta>
</office:document-meta>
</file>