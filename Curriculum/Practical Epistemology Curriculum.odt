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3">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8">Cognitive Restoration</text:span> 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3"><text:span text:style-name="Strong_20_Emphasis">A Working Society Course in Practical Epistemology</text:span></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2 sessions, then ongoing practice group <text:span text:style-name="Strong_20_Emphasis">Setting:</text:span> In person, no devices in the room <text:span text:style-name="Strong_20_Emphasis">Prerequisite:</text:span> Course 2 concurrent enrollment recommended — the reasoning tools built there are the substrate for this one</text:p>
      <text:p text:style-name="Horizontal_20_Line"/>
      <text:h text:style-name="Heading_20_3" text:outline-level="3">What This Course Is</text:h>
      <text:p text:style-name="Text_20_body">A practical examination of how we form beliefs, how we evaluate claims, and how we recognize when we're going wrong. Not a course in logic or philosophy. Not a course in spotting misinformation — though that follows naturally. A course in the actual process of knowing: what it means to have good reasons for believing something, how to tell a good reason from a bad one, and what to do when you encounter something that challenges what you thought you knew.</text:p>
      <text:p text:style-name="Text_20_body">The damage the attention economy did to epistemology is specific: it made belief a social act rather than a cognitive one. What you believe signals who you are, who your people are, and who your enemies are. Changing your mind under evidence stopped being intellectual honesty and became betrayal. The <text:soft-page-break/>result is a population that is very good at defending positions and very poor at examining them.</text:p>
      <text:p text:style-name="Text_20_body">This course is about separating belief from identity just enough to think clearly — not to become a person without commitments, but to become a person whose commitments can survive contact with reality.</text:p>
      <text:p text:style-name="Horizontal_20_Line"/>
      <text:h text:style-name="Heading_20_3" text:outline-level="3">The Guide's Role</text:h>
      <text:p text:style-name="Text_20_body">Model epistemic humility without epistemic cowardice. Be willing to say I don't know. Be willing to say I was wrong about that. Be willing to say that's a genuinely hard question and here are the competing considerations — without retreating into false balance that treats all positions as equally supported.</text:p>
      <text:p text:style-name="Text_20_body">The hardest thing this course asks of the guide: genuine neutrality on object-level questions while being genuinely rigorous about process. You can push hard on how someone is reasoning without pushing toward a particular conclusion. That distinction has to be lived, not just stated.</text:p>
      <text:p text:style-name="Text_20_body">Do not correct beliefs. Examine the process that produced them.</text:p>
      <text:p text:style-name="Horizontal_20_Line"/>
      <text:h text:style-name="Heading_20_3" text:outline-level="3">A Note on Tone</text:h>
      <text:p text:style-name="Text_20_body">This course will fail if it feels like an intervention. It will fail if members sense that the guide or the curriculum has a view about what they should conclude and is using epistemology as a vehicle for delivering it.</text:p>
      <text:p text:style-name="Text_20_body">The tone throughout is one of shared inquiry. We are all trying to figure out how to know things better. The guide is not exempt. The curriculum is not a verdict. Every session should feel like people thinking together, not people being corrected.</text:p>
      <text:p text:style-name="Horizontal_20_Line"/>
      <text:h text:style-name="Heading_20_3" text:outline-level="3">Phase 1: The Landscape</text:h>
      <text:p text:style-name="Text_20_body"><text:span text:style-name="Emphasis">Sessions 1–3</text:span> <text:span text:style-name="Emphasis">Goal: Build a shared honest account of how belief actually works and what went wrong</text:span></text:p>
      <text:p text:style-name="Text_20_body"><text:span text:style-name="Strong_20_Emphasis">Session 1 — How We Actually Form Beliefs</text:span></text:p>
      <text:p text:style-name="Text_20_body"><text:soft-page-break/>Not how we think we form beliefs. How we actually do.</text:p>
      <text:p text:style-name="Text_20_body">The honest answer is uncomfortable: most beliefs are not formed through careful evaluation of evidence. They're formed through experience, intuition, social transmission, emotional resonance, and motivated reasoning — then retrofitted with justifications that feel like reasons but were assembled after the conclusion was already reached.</text:p>
      <text:p text:style-name="Text_20_body">This is not a failing unique to unintelligent or uneducated people. It is how human cognition works. The research on this is extensive and humbling. Smart, educated people are often better at motivated reasoning because they have more cognitive resources to construct convincing post-hoc justifications.</text:p>
      <text:p text:style-name="Text_20_body">The session names this honestly and without shame. The goal is not to make people distrust their own minds but to develop a more accurate picture of what their minds are actually doing when they evaluate a claim.</text:p>
      <text:p text:style-name="Text_20_body">Opening question: think of a belief you hold strongly. How did you come to hold it? What would it take to change it? Let the group sit with this honestly before any concepts are introduced.</text:p>
      <text:p text:style-name="Text_20_body">Concepts introduced: the difference between the process that produces a belief and the justification given for it. System 1 and System 2 thinking in plain terms — fast intuitive processing versus slow deliberate reasoning, and why fast is the default.</text:p>
      <text:p text:style-name="Text_20_body">Practice introduced: Belief Inventory. Between sessions members choose three beliefs they hold with confidence — one about how something works, one about what's true in the world, one about what's right or wrong. For each: how did I come to believe this? What evidence would I actually need to change my mind?</text:p>
      <text:p text:style-name="Text_20_body"><text:span text:style-name="Strong_20_Emphasis">Session 2 — What the Platforms Did</text:span></text:p>
      <text:p text:style-name="Text_20_body">The specific epistemological deformations of the attention economy. Not a rant about social media — a precise account of the mechanisms.</text:p>
      <text:p text:style-name="Text_20_body">Covered: the engagement optimization feedback loop — content that produces strong emotional response gets amplified regardless of its truth value, so the information environment is systematically biased toward outrage, fear, and tribal confirmation. The filter bubble — not that you never see opposing views, but that you see them in their most cartoonish and uncharitable form, which makes genuine engagement with them nearly impossible. The identity-<text:soft-page-break/>belief fusion — your beliefs became your brand, your tribe, your status signal, and changing them under evidence began to carry real social cost.</text:p>
      <text:p text:style-name="Text_20_body">The point is not that the internet is bad. It's that a specific set of design decisions, made by specific people optimizing for specific metrics, reshaped the epistemic environment in ways that made it harder to know things and easier to be certain about things you don't actually know.</text:p>
      <text:p text:style-name="Text_20_body">Group discussion: where do you actually get your information? How much of it comes through social feeds versus direct sources? What does your information environment look like?</text:p>
      <text:p text:style-name="Text_20_body">Practice: for one week, track where each significant piece of information you act on actually came from. Not just "the news" — which outlet, which person, which platform, what was the original source?</text:p>
      <text:p text:style-name="Text_20_body"><text:span text:style-name="Strong_20_Emphasis">Session 3 — The Legitimacy Question</text:span></text:p>
      <text:p text:style-name="Text_20_body">The session the course cannot skip: why skepticism of institutions is sometimes rational and sometimes not, and how to tell the difference.</text:p>
      <text:p text:style-name="Text_20_body">The honest account: institutions have lied. Experts have been wrong, sometimes systematically. Consensus has been manufactured. Trust that was given was sometimes betrayed. The people in this room who distrust certain institutions often have real reasons rooted in real experience. That distrust is not a cognitive error to be corrected.</text:p>
      <text:p text:style-name="Text_20_body">And: the response to institutional failure is not to conclude that all claims are equally valid, that expertise is worthless, or that the absence of perfect trustworthiness means nothing can be trusted. That move — from "institutions sometimes lie" to "therefore I can believe whatever I want" — is exactly the gap the attention economy exploited.</text:p>
      <text:p text:style-name="Text_20_body">The session holds both of these without collapsing either. Legitimate skepticism is calibrated — it asks which institutions, on which questions, with what track record, under what incentives. Illegitimate skepticism is global — it treats institutional origin as sufficient to dismiss a claim regardless of the evidence for it.</text:p>
      <text:p text:style-name="Text_20_body">Concepts introduced: the difference between source skepticism and evidence skepticism. How to evaluate a source without simply accepting or rejecting everything it says.</text:p>
      <text:p text:style-name="Text_20_body"><text:soft-page-break/>Practice: revisit the Belief Inventory. For each belief: what is the original source? What is that source's track record on this kind of claim? What incentives does it have?</text:p>
      <text:p text:style-name="Horizontal_20_Line"/>
      <text:h text:style-name="Heading_20_3" text:outline-level="3">Phase 2: The Tools</text:h>
      <text:p text:style-name="Text_20_body"><text:span text:style-name="Emphasis">Sessions 4–9</text:span> <text:span text:style-name="Emphasis">Goal: Build a practical toolkit for evaluating claims and recognizing epistemic failure</text:span></text:p>
      <text:p text:style-name="Text_20_body"><text:span text:style-name="Strong_20_Emphasis">Session 4 — Claims and Evidence</text:span></text:p>
      <text:p text:style-name="Text_20_body">The most fundamental distinction in practical epistemology: the difference between a claim and evidence for a claim. These are routinely conflated in everyday discourse. Someone states a claim with confidence and the confidence is taken as evidence. Someone repeats a claim many times and the repetition is taken as evidence. Someone with status or authority makes a claim and the status is taken as evidence.</text:p>
      <text:p text:style-name="Text_20_body">None of those are evidence. Evidence is something that would be different if the claim were false.</text:p>
      <text:p text:style-name="Text_20_body">Concepts introduced: what counts as evidence, what doesn't, and why. The difference between anecdote and data. The difference between correlation and cause revisited from Course 2 but now in the context of evaluating claims rather than solving problems.</text:p>
      <text:p text:style-name="Text_20_body">Group activity: the guide presents a series of real claims — drawn from health, agriculture, community life, current events. For each: what would count as evidence? What evidence actually exists? What's being offered as evidence that isn't?</text:p>
      <text:p text:style-name="Text_20_body">Practice: this week, when you encounter a claim you're inclined to believe, ask: what is the evidence? Not — is there evidence somewhere out there. What evidence is actually being offered here, and is it the kind of thing that would be different if the claim were false?</text:p>
      <text:p text:style-name="Text_20_body"><text:span text:style-name="Strong_20_Emphasis">Session 5 — Uncertainty and Confidence</text:span></text:p>
      <text:p text:style-name="Text_20_body">The relationship between how confident someone sounds and how much they actually know is weak to nonexistent. Confident delivery is a rhetorical feature, not an epistemic one. The most knowledgeable people on genuinely <text:soft-page-break/>hard questions are often the least confident because they understand the complexity.</text:p>
      <text:p text:style-name="Text_20_body">Concepts introduced: calibrated uncertainty — matching your confidence to the actual state of the evidence. The difference between genuine expert uncertainty and false balance. Why "we don't know for certain" doesn't mean "therefore both sides are equally supported."</text:p>
      <text:p text:style-name="Text_20_body">The Dunning-Kruger dynamic in plain terms: the least informed people on a topic tend to be the most confident because they don't yet know enough to know what they don't know. This is not a put-down — it's a structural feature of learning that applies to everyone at the frontier of their knowledge.</text:p>
      <text:p text:style-name="Text_20_body">Group activity: members rate their confidence in a series of claims before seeing any evidence. Then examine the evidence together. How well calibrated were the initial confidence levels?</text:p>
      <text:p text:style-name="Text_20_body">Practice: this week, practice stating your uncertainty explicitly. Not as weakness — as accuracy. "I think this is likely but I'm not sure because..." Notice how it changes conversations.</text:p>
      <text:p text:style-name="Text_20_body"><text:span text:style-name="Strong_20_Emphasis">Session 6 — Experts and Expertise</text:span></text:p>
      <text:p text:style-name="Text_20_body">When to defer to expertise and when not to. This is genuinely complicated and most framings of it are wrong in one direction or the other — either "trust the experts always" or "experts are just another interest group."</text:p>
      <text:p text:style-name="Text_20_body">The honest account: expertise is real. Someone who has spent twenty years studying soil microbiology knows things about soil microbiology that you don't, and that knowledge is not negated by the existence of expert disagreement or the occasional expert who is wrong. At the same time, expertise is domain-specific — a virologist's expertise doesn't extend to the economic policy questions raised by a pandemic. And experts have incentives, institutional affiliations, and blind spots that are worth understanding.</text:p>
      <text:p text:style-name="Text_20_body">Concepts introduced: the difference between scientific consensus and expert opinion. How to read disagreement among experts — is this a genuine contested frontier or manufactured controversy? The specific ways expertise gets misrepresented: cherry-picking outlier experts, misrepresenting the degree of consensus, applying expertise outside its domain.</text:p>
      <text:p text:style-name="Text_20_body">Group activity: a real contested question where expert opinion is invoked on multiple sides. Work through it together: what do the experts actually say, on <text:soft-page-break/>what questions, with what degree of consensus, and what are the limits of their expertise on this question?</text:p>
      <text:p text:style-name="Text_20_body">Practice: for one claim you've encountered invoking expertise this week — what is the actual domain of expertise being claimed? Is it the right domain for this question? What does the broader expert community say?</text:p>
      <text:p text:style-name="Text_20_body"><text:span text:style-name="Strong_20_Emphasis">Session 7 — How Stories Work on Us</text:span></text:p>
      <text:p text:style-name="Text_20_body">Human cognition is narrative before it is analytical. We understand the world through stories — and that's not a bug, it's a feature of how meaning-making works. But it becomes a vulnerability when stories are deliberately constructed to produce conclusions that the evidence doesn't support.</text:p>
      <text:p text:style-name="Text_20_body">The specific mechanisms: a compelling individual story overrides statistical evidence in almost everyone's cognitive processing. A vivid example feels more true than a dry summary of data even when the data is more epistemically reliable. Emotional resonance makes claims feel more credible regardless of their truth value.</text:p>
      <text:p text:style-name="Text_20_body">This is not a reason to distrust stories. It's a reason to know what stories do to your reasoning and to add the analytical layer rather than substitute it.</text:p>
      <text:p text:style-name="Text_20_body">Group activity: the guide presents a real claim first as a compelling individual story, then as a dry statistical summary. Same underlying claim. Different forms. What happens to confidence levels? What happens to the instinct to share it?</text:p>
      <text:p text:style-name="Text_20_body">Practice: this week when you encounter a compelling story being used to support a claim — what is the underlying claim? What does the evidence beyond the story actually look like?</text:p>
      <text:p text:style-name="Text_20_body"><text:span text:style-name="Strong_20_Emphasis">Session 8 — The Motivated Mind</text:span></text:p>
      <text:p text:style-name="Text_20_body">Confirmation bias and motivated reasoning examined in depth — not as a list of named biases but as a coherent account of what the motivated mind actually does and why it does it.</text:p>
      <text:p text:style-name="Text_20_body">The core: we are all, always, motivated to believe certain things. Our identities, relationships, communities, and self-concepts are bound up with our beliefs in ways that make disconfirming evidence genuinely threatening. The motivated mind doesn't ignore evidence — it processes it selectively, weights it asymmetrically, and generates objections to disconfirming evidence that it doesn't apply to confirming evidence.</text:p>
      <text:p text:style-name="Text_20_body"><text:soft-page-break/>The session works with this through honest self-examination rather than pointing at others. Where are your motivated beliefs? Not — where are other people's motivated beliefs. Where are yours?</text:p>
      <text:p text:style-name="Text_20_body">Structured exercise: members identify one belief they hold where they notice they're applying different standards to evidence for it than to evidence against it. This is hard. It requires genuine self-honesty. The guide should go first.</text:p>
      <text:p text:style-name="Text_20_body">Practice: for the Belief Inventory beliefs — apply the same standard of scrutiny to evidence that supports each belief as to evidence that challenges it. What changes?</text:p>
      <text:p text:style-name="Text_20_body"><text:span text:style-name="Strong_20_Emphasis">Session 9 — The Limits of Individual Reason</text:span></text:p>
      <text:p text:style-name="Text_20_body">No person can independently verify most of what they believe. The world is too complex, the evidence too distributed, the expertise required too specialized. We are all, inescapably, dependent on epistemic networks — communities of people and institutions that produce and transmit knowledge.</text:p>
      <text:p text:style-name="Text_20_body">This is not a failure. It's the human condition. But it means that how you choose your epistemic community — who you trust, on what questions, for what reasons — matters enormously. And the attention economy deliberately corrupted those choices by making epistemic community selection a function of tribal identity rather than track record and reliability.</text:p>
      <text:p text:style-name="Text_20_body">Concepts introduced: epistemic dependence as a feature not a bug. How to build a reliable epistemic network — diverse sources, track records, willingness to update, explicit uncertainty. The difference between trusting a source and being dependent on it.</text:p>
      <text:p text:style-name="Text_20_body">Group activity: members map their actual epistemic networks. Who do you actually rely on for information about different domains? What do you know about their track records? Where are the gaps and vulnerabilities?</text:p>
      <text:p text:style-name="Horizontal_20_Line"/>
      <text:h text:style-name="Heading_20_3" text:outline-level="3">Phase 3: Hard Cases</text:h>
      <text:p text:style-name="Text_20_body"><text:span text:style-name="Emphasis">Sessions 10–11</text:span> <text:span text:style-name="Emphasis">Goal: Apply the toolkit to genuinely difficult questions where the right answer is not obvious</text:span></text:p>
      <text:p text:style-name="Text_20_body"><text:span text:style-name="Strong_20_Emphasis">Session 10 — When Good People Disagree</text:span></text:p>
      <text:p text:style-name="Text_20_body"><text:soft-page-break/>Some disagreements persist among careful, honest, well-informed people not because one side is stupid or corrupt but because the questions are genuinely hard — because the evidence is incomplete, because values differences legitimately produce different conclusions, because the problem is complex enough that reasonable people weight factors differently.</text:p>
      <text:p text:style-name="Text_20_body">The session works through examples of genuine hard cases — not manufactured controversies, not cases where one side has overwhelming evidence and the other doesn't, but actual hard cases where thoughtful people land in different places.</text:p>
      <text:p text:style-name="Text_20_body">The skill being practiced: distinguishing genuine hard cases from manufactured ones. Knowing when to hold your conclusion loosely versus when the evidence actually is strong enough to warrant confidence.</text:p>
      <text:p text:style-name="Text_20_body">Group activity: the group works through a real contested question that members actually disagree about. The goal is not to reach consensus. The goal is to characterize the disagreement as precisely as possible: is this a factual disagreement, a values disagreement, an interpretive disagreement, or some combination? What would each side need to see to update?</text:p>
      <text:p text:style-name="Text_20_body"><text:span text:style-name="Strong_20_Emphasis">Session 11 — Changing Your Mind</text:span></text:p>
      <text:p text:style-name="Text_20_body">The practical experience of updating a belief under evidence — what it feels like, what it requires, what it signals about the person who does it.</text:p>
      <text:p text:style-name="Text_20_body">The framing the course has been building toward: changing your mind when presented with good reasons is not weakness. It is the point. A person whose beliefs never change in response to evidence isn't strong — they're closed. The capacity to update is the mark of an honest mind, not a weak one.</text:p>
      <text:p text:style-name="Text_20_body">But this needs to be distinguished from capitulation — changing your mind because of social pressure, because someone was forceful or angry, because you want to avoid conflict. Updating under evidence is epistemic virtue. Updating under pressure is the same motivated reasoning in reverse.</text:p>
      <text:p text:style-name="Text_20_body">Structured exercise: each member identifies one belief they have updated in their life — something they used to think that they no longer think, because of something they learned or experienced. What was it like? What made it possible? What does it tell us about what genuine updating requires?</text:p>
      <text:p text:style-name="Horizontal_20_Line"/>
      <text:h text:style-name="Heading_20_3" text:outline-level="3"><text:soft-page-break/>Phase 4: Integration</text:h>
      <text:p text:style-name="Text_20_body"><text:span text:style-name="Emphasis">Session 12</text:span></text:p>
      <text:p text:style-name="Text_20_body"><text:span text:style-name="Strong_20_Emphasis">Session 12 — Living With Uncertainty</text:span></text:p>
      <text:p text:style-name="Text_20_body">The course's destination: not certainty, but calibrated uncertainty held honestly. A person who has done this work doesn't know more facts than when they started. They have a more accurate sense of what they know, what they don't, and how to tell the difference. They hold their conclusions with appropriate confidence — firm where the evidence is strong, loose where it isn't, and genuinely open to revision.</text:p>
      <text:p text:style-name="Text_20_body">That's uncomfortable in a culture that rewards confident assertion. It can feel like weakness when it is actually the most intellectually honest position available.</text:p>
      <text:p text:style-name="Text_20_body">The session closes with honest reckoning: what changed? What does each member now hold differently — not necessarily different conclusions, but different relationships to their conclusions? What is harder now than it was? What is more solid?</text:p>
      <text:p text:style-name="Text_20_body">Transition to ongoing practice group: this one probably has the most natural continuation in community life of all five courses. The Working Society's decision-making processes, the College of Conciliation, the governance structures — all of them depend on members who can reason about evidence together. This course feeds directly into that.</text:p>
      <text:p text:style-name="Horizontal_20_Line"/>
      <text:h text:style-name="Heading_20_3" text:outline-level="3">Ongoing Practice Group</text:h>
      <text:p text:style-name="Text_20_body"><text:span text:style-name="Emphasis">No terminus</text:span></text:p>
      <text:p text:style-name="Text_20_body">Meets regularly. Brings real questions the community is facing. Works through them using the tools built in this course. Over time becomes an epistemic culture — a community where how you know things matters as much as what you conclude.</text:p>
      <text:p text:style-name="Horizontal_20_Line"/>
      <text:h text:style-name="Heading_20_3" text:outline-level="3">Running Themes Throughout</text:h>
      <text:p text:style-name="Text_20_body"><text:span text:style-name="Strong_20_Emphasis">Process not conclusion.</text:span> The course never pushes toward particular object-level beliefs. It pushes consistently toward better processes for forming them.</text:p>
      <text:p text:style-name="Text_20_body"><text:soft-page-break/><text:span text:style-name="Strong_20_Emphasis">Humble not relativist.</text:span> Epistemic humility means calibrated uncertainty, not the position that all claims are equally valid. Those are opposite errors and the course distinguishes them clearly throughout.</text:p>
      <text:p text:style-name="Text_20_body"><text:span text:style-name="Strong_20_Emphasis">Self-directed not other-directed.</text:span> The tools are applied first to one's own reasoning, not to the reasoning of people one disagrees with. The course fails if it becomes a way of feeling superior to people who believe different things.</text:p>
      <text:p text:style-name="Text_20_body"><text:span text:style-name="Strong_20_Emphasis">Real not abstract.</text:span> Every concept is introduced through real claims about real things. If it can't be applied to something that matters it doesn't belong here.</text:p>
      <text:p text:style-name="Horizontal_20_Line"/>
      <text:h text:style-name="Heading_20_3" text:outline-level="3">What Success Looks Like</text:h>
      <text:p text:style-name="Text_20_body">A member who completes the structured phase should be able to:</text:p>
      <text:p text:style-name="Text_20_body">Distinguish a claim from evidence for it. Recognize when confidence is a rhetorical feature rather than an epistemic one. Apply consistent standards of scrutiny to evidence regardless of whether it supports or challenges their existing beliefs. Characterize a disagreement precisely — factual, values, interpretive. Know when to defer to expertise and when that deference is being manipulated. Hold genuine uncertainty without collapsing into relativism. Change their mind when presented with good reasons and recognize the difference between that and capitulating to pressure.</text:p>
      <text:p text:style-name="Text_20_body">These are not advanced philosophical skills. They are what honest thinking requires. The course is about building them as habits rather than studying them as concepts.</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15:16.388004028</dc:date>
    <meta:editing-duration>PT8H10M33S</meta:editing-duration>
    <meta:editing-cycles>29</meta:editing-cycles>
    <meta:generator>LibreOffice/24.2.7.2$Linux_X86_64 LibreOffice_project/420$Build-2</meta:generator>
    <meta:document-statistic meta:table-count="0" meta:image-count="0" meta:object-count="0" meta:page-count="11" meta:paragraph-count="109" meta:word-count="3280" meta:character-count="21100" meta:non-whitespace-character-count="17873"/>
  </office:meta>
</office:document-meta>
</file>