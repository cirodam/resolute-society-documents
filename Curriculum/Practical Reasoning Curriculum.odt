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IM FELL English SC" svg:font-family="'IM FELL English SC'" style:font-pitch="variable"/>
    <style:font-face style:name="IM FELL English SC1" svg:font-family="'IM FELL English SC'" style:font-adornments="Bold" style:font-pitch="variable"/>
    <style:font-face style:name="IM FELL English SC2" svg:font-family="'IM FELL English SC'"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re Baskerville" svg:font-family="'Libre Baskerville'" style:font-adornments="Regular"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end" style:justify-single-word="false" fo:padding="0.0201in" fo:border-left="none" fo:border-right="none" fo:border-top="none" fo:border-bottom="0.06pt solid #000000"/>
      <style:text-properties fo:color="#1e3a5f" loext:opacity="100%" officeooo:rsid="00207e9d" officeooo:paragraph-rsid="00207e9d"/>
    </style:style>
    <style:style style:name="P2" style:family="paragraph" style:parent-style-name="Subtitle">
      <style:text-properties fo:color="#1e3a5f" loext:opacity="100%"/>
    </style:style>
    <style:style style:name="P3" style:family="paragraph" style:parent-style-name="Standard">
      <style:paragraph-properties fo:margin-left="0in" fo:margin-right="0in" style:line-height-at-least="0.198in" fo:text-indent="0in" style:auto-text-indent="false"/>
      <style:text-properties fo:color="#111111" loext:opacity="100%" style:font-name="IM FELL English SC" fo:font-size="10.5pt" fo:font-weight="bold" officeooo:paragraph-rsid="001f52f8" fo:background-color="transparent"/>
    </style:style>
    <style:style style:name="P4" style:family="paragraph" style:parent-style-name="First_20_Paragraph">
      <style:text-properties fo:color="#2c2c2c" loext:opacity="100%"/>
    </style:style>
    <style:style style:name="P5" style:family="paragraph" style:parent-style-name="Standard">
      <style:paragraph-properties style:line-height-at-least="0.198in"/>
      <style:text-properties fo:color="#2c2c2c" loext:opacity="100%" style:font-name="IM FELL English SC" fo:font-size="10.5pt" fo:font-weight="bold" fo:background-color="transparent"/>
    </style:style>
    <style:style style:name="P6" style:family="paragraph" style:parent-style-name="Standard">
      <style:paragraph-properties style:line-height-at-least="0.198in"/>
      <style:text-properties fo:color="#2c2c2c" loext:opacity="100%" style:font-name="IM FELL English SC" fo:background-color="transparent"/>
    </style:style>
    <style:style style:name="P7" style:family="paragraph" style:parent-style-name="Standard">
      <style:text-properties fo:color="#2c2c2c" loext:opacity="100%"/>
    </style:style>
    <style:style style:name="P8" style:family="paragraph" style:parent-style-name="First_20_Paragraph">
      <style:text-properties fo:color="#2c2c2c" loext:opacity="100%" officeooo:paragraph-rsid="003a82d1"/>
    </style:style>
    <style:style style:name="P9" style:family="paragraph" style:parent-style-name="First_20_Paragraph">
      <style:text-properties fo:color="#2c2c2c" loext:opacity="100%" officeooo:paragraph-rsid="003afd50"/>
    </style:style>
    <style:style style:name="P10" style:family="paragraph" style:parent-style-name="Title">
      <style:text-properties fo:color="#1e3a5f" loext:opacity="100%" officeooo:rsid="003fa145" officeooo:paragraph-rsid="003fa145"/>
    </style:style>
    <style:style style:name="P11" style:family="paragraph" style:parent-style-name="Heading_20_1">
      <style:text-properties fo:color="#1e3a5f" loext:opacity="100%"/>
    </style:style>
    <style:style style:name="P12" style:family="paragraph" style:parent-style-name="Heading_20_2">
      <style:text-properties fo:color="#1e3a5f" loext:opacity="100%"/>
    </style:style>
    <style:style style:name="P13" style:family="paragraph" style:parent-style-name="Heading_20_3">
      <style:paragraph-properties style:line-height-at-least="0.198in" fo:text-indent="0in" style:auto-text-indent="false"/>
      <style:text-properties fo:color="#2c2c2c" loext:opacity="100%"/>
    </style:style>
    <style:style style:name="P14" style:family="paragraph" style:parent-style-name="Heading_20_4">
      <style:text-properties fo:color="#2c2c2c" loext:opacity="100%"/>
    </style:style>
    <style:style style:name="P15" style:family="paragraph" style:parent-style-name="Text_20_body">
      <style:text-properties fo:color="#2c2c2c" loext:opacity="100%"/>
    </style:style>
    <style:style style:name="P16" style:family="paragraph" style:parent-style-name="Text_20_body">
      <style:paragraph-properties style:line-height-at-least="0.198in" fo:text-indent="0in" style:auto-text-indent="false"/>
      <style:text-properties fo:color="#2c2c2c" loext:opacity="100%"/>
    </style:style>
    <style:style style:name="P17" style:family="paragraph" style:parent-style-name="Text_20_body" style:list-style-name="L1"/>
    <style:style style:name="P18" style:family="paragraph" style:parent-style-name="Text_20_body" style:list-style-name="L1">
      <style:paragraph-properties fo:margin-top="0in" fo:margin-bottom="0in" style:contextual-spacing="false"/>
    </style:style>
    <style:style style:name="T1" style:family="text">
      <style:text-properties officeooo:rsid="00207e9d"/>
    </style:style>
    <style:style style:name="T2" style:family="text">
      <style:text-properties officeooo:rsid="0024f617"/>
    </style:style>
    <style:style style:name="T3" style:family="text">
      <style:text-properties officeooo:rsid="0026ccf4"/>
    </style:style>
    <style:style style:name="T4" style:family="text">
      <style:text-properties officeooo:rsid="0027efd4"/>
    </style:style>
    <style:style style:name="T5" style:family="text">
      <style:text-properties officeooo:rsid="00297856"/>
    </style:style>
    <style:style style:name="T6" style:family="text">
      <style:text-properties officeooo:rsid="002a39be"/>
    </style:style>
    <style:style style:name="T7" style:family="text">
      <style:text-properties officeooo:rsid="002b7d10"/>
    </style:style>
    <style:style style:name="T8" style:family="text">
      <style:text-properties officeooo:rsid="002cc6bf"/>
    </style:style>
    <style:style style:name="T9" style:family="text">
      <style:text-properties officeooo:rsid="002cf6af"/>
    </style:style>
    <style:style style:name="T10" style:family="text">
      <style:text-properties officeooo:rsid="002ec032"/>
    </style:style>
    <style:style style:name="T11" style:family="text">
      <style:text-properties officeooo:rsid="002f17f7"/>
    </style:style>
    <style:style style:name="T12" style:family="text">
      <style:text-properties officeooo:rsid="00310cfc"/>
    </style:style>
    <style:style style:name="T13" style:family="text">
      <style:text-properties officeooo:rsid="003210b5"/>
    </style:style>
    <style:style style:name="T14" style:family="text">
      <style:text-properties officeooo:rsid="003732d9"/>
    </style:style>
    <style:style style:name="T15" style:family="text">
      <style:text-properties officeooo:rsid="003783fc"/>
    </style:style>
    <style:style style:name="T16" style:family="text">
      <style:text-properties officeooo:rsid="003a82d1"/>
    </style:style>
    <style:style style:name="T17" style:family="text">
      <style:text-properties officeooo:rsid="00438421"/>
    </style:style>
    <style:style style:name="T18" style:family="text">
      <style:text-properties officeooo:rsid="0045f162"/>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10"><text:span text:style-name="T18">Cognitive Restoration</text:span> Program</text:p>
      <text:p text:style-name="P2"/>
      <text:p text:style-name="P5"/>
      <text:p text:style-name="P6"/>
      <text:h text:style-name="P11" text:outline-level="1">Preamble</text:h>
      <text:p text:style-name="P6"/>
      <text:p text:style-name="P4">There are moments in history that test the character of a nation, that demand more than ordinary times prepare <text:span text:style-name="T3">any person</text:span> for. We believe we are living in such a moment. We do not take that lightly. We resolve to meet it together.</text:p>
      <text:p text:style-name="P6"/>
      <text:h text:style-name="P11" text:outline-level="1">Foundational Principles</text:h>
      <text:h text:style-name="P13" text:outline-level="3"><text:span text:style-name="Strong_20_Emphasis">A Working Society Course in Practical Reasoning</text:span></text:h>
      <text:p text:style-name="Text_20_body"><text:span text:style-name="Strong_20_Emphasis">Format:</text:span> Small group, approximately 6 members plus one guide <text:span text:style-name="Strong_20_Emphasis">Session length:</text:span> 90 minutes <text:span text:style-name="Strong_20_Emphasis">Frequency:</text:span> Weekly <text:span text:style-name="Strong_20_Emphasis">Duration:</text:span> Open-ended — structured phase of approximately 14 sessions, then ongoing practice group <text:span text:style-name="Strong_20_Emphasis">Setting:</text:span> In person, no devices in the room <text:span text:style-name="Strong_20_Emphasis">Prerequisite:</text:span> Concurrent enrollment in Course 1 practice group recommended</text:p>
      <text:p text:style-name="Horizontal_20_Line"/>
      <text:h text:style-name="Heading_20_3" text:outline-level="3">What This Course Is</text:h>
      <text:p text:style-name="Text_20_body">A systematic rebuilding of the capacity to reason through difficult problems — problems that don't come with instructions, don't have obvious answers, and require sustained effort to make progress on. Not logic as an academic subject. Not puzzles. Real problems, worked through together, with explicit attention to what thinking actually looks like when it's working and when it isn't.</text:p>
      <text:p text:style-name="Text_20_body">The central skill is productive struggle: staying with difficulty in the absence of an answer and continuing to make progress. Everything else — identifying the problem, gathering what's known, generating approaches, checking reasoning, revising — is in service of that.</text:p>
      <text:p text:style-name="Horizontal_20_Line"><text:soft-page-break/></text:p>
      <text:h text:style-name="Heading_20_3" text:outline-level="3">The Guide's Role</text:h>
      <text:p text:style-name="Text_20_body">Pose problems. Ask questions that open up the problem rather than narrow it toward your preferred answer. Notice when the group is thinking and when it's performing thinking. Slow things down when the group rushes to a conclusion. Resist giving answers. Your job is to make the struggle productive, not to end it.</text:p>
      <text:p text:style-name="Text_20_body">You do not need to know the answer to the problems you pose. In fact it's often better if you don't.</text:p>
      <text:p text:style-name="Horizontal_20_Line"/>
      <text:h text:style-name="Heading_20_3" text:outline-level="3">A Note on Problem Selection</text:h>
      <text:p text:style-name="Text_20_body">Problems throughout this course should be:</text:p>
      <text:p text:style-name="Text_20_body"><text:span text:style-name="Strong_20_Emphasis">Real</text:span> — drawn from actual situations in agriculture, building, health, community organization, resource management. Not hypotheticals for their own sake.</text:p>
      <text:p text:style-name="Text_20_body"><text:span text:style-name="Strong_20_Emphasis">Appropriately difficult</text:span> — solvable with sustained effort but not immediately obvious. If the group gets it in two minutes the problem was too easy. If they make no progress after twenty minutes the problem may need reframing.</text:p>
      <text:p text:style-name="Text_20_body"><text:span text:style-name="Strong_20_Emphasis">Open</text:span> — more than one reasonable approach, possibly more than one reasonable answer. Problems with single correct answers that require finding a formula train formula-finding. Problems with genuine uncertainty train reasoning.</text:p>
      <text:p text:style-name="Text_20_body"><text:span text:style-name="Strong_20_Emphasis">Owned</text:span> — ideally problems the members actually face or will face. A problem about seed saving ratios for a real garden plot is worth ten abstract problems about trains leaving stations.</text:p>
      <text:p text:style-name="Horizontal_20_Line"/>
      <text:h text:style-name="Heading_20_3" text:outline-level="3">Phase 1: What Thinking Actually Is</text:h>
      <text:p text:style-name="Text_20_body"><text:span text:style-name="Emphasis">Sessions 1–3</text:span> <text:span text:style-name="Emphasis">Goal: Build a shared honest account of how reasoning works and how it fails</text:span></text:p>
      <text:p text:style-name="Text_20_body"><text:span text:style-name="Strong_20_Emphasis">Session 1 — The Problem with Problems</text:span></text:p>
      <text:p text:style-name="Text_20_body"><text:soft-page-break/>Most people's relationship with hard problems was formed in school, where problems came with a correct method, a correct answer, and a time limit. That training produces a specific failure mode: when confronted with a real problem, people look for the method they're supposed to use, panic when they can't find it, and either guess or give up.</text:p>
      <text:p text:style-name="Text_20_body">This session names that failure mode explicitly and begins to replace it with something more honest: problem solving is a process of progressive clarification under uncertainty. You rarely know at the start what the problem actually is, what you know that's relevant, or what a solution would even look like. That's not a sign you're doing it wrong. That's what hard problems are.</text:p>
      <text:p text:style-name="Text_20_body">Group activity: the guide poses a real problem — something genuinely uncertain, no obvious method — and the group attempts it. Not to solve it but to observe what happens. Who reaches for their phone? Who goes quiet? Who rushes to an answer? Who asks a question? Debrief: what did we notice about how we think?</text:p>
      <text:p text:style-name="Text_20_body">Practice introduced: Problem Journal. Between sessions members write down one hard problem they encounter — not to solve it but to describe it precisely. What do you actually know? What don't you know? What would a solution look like?</text:p>
      <text:p text:style-name="Text_20_body"><text:span text:style-name="Strong_20_Emphasis">Session 2 — What Do We Actually Know?</text:span></text:p>
      <text:p text:style-name="Text_20_body">The first and most consistently skipped step in reasoning: establishing what you actually know versus what you assume, suspect, remember vaguely, or wish were true. These are different epistemic states and conflating them is the source of most reasoning failures.</text:p>
      <text:p text:style-name="Text_20_body">Concepts introduced: the difference between observation and inference, between evidence and assumption, between knowing and believing. Not in philosophical abstraction but in practical terms — here is a real problem, let's sort what we know from what we're guessing.</text:p>
      <text:p text:style-name="Text_20_body">Group activity: members bring problems from their journals. Group takes one and methodically sorts the claims: what do we actually know for certain, what are we inferring, what are we assuming? Often this process reveals the problem is different than it first appeared.</text:p>
      <text:p text:style-name="Text_20_body">Practice: For each entry in the Problem Journal this week, explicitly sort claims into three columns: know, infer, assume.</text:p>
      <text:p text:style-name="Text_20_body"><text:soft-page-break/><text:span text:style-name="Strong_20_Emphasis">Session 3 — The Shape of the Problem</text:span></text:p>
      <text:p text:style-name="Text_20_body">Most hard problems, when first encountered, are not yet well-defined. They feel like a fog of discomfort or difficulty. Part of what reasoning does is give the problem a shape — boundaries, components, relationships between parts. A well-defined problem is already half solved.</text:p>
      <text:p text:style-name="Text_20_body">Concepts introduced: problem decomposition — breaking a complex problem into its constituent parts. Identifying what kind of problem it is — a resource problem, a relationship problem, a knowledge problem, a coordination problem. Different kinds of problems respond to different approaches.</text:p>
      <text:p text:style-name="Text_20_body">Group activity: takes a complex real problem — something affecting the community or the lives of members — and works on defining it precisely. What exactly is the problem? What is it not? What would have to change for it to be solved?</text:p>
      <text:p text:style-name="Text_20_body">Practice: Revisit one entry from the Problem Journal and try to define the problem more precisely than you did originally. What changed when you looked more carefully?</text:p>
      <text:p text:style-name="Horizontal_20_Line"/>
      <text:h text:style-name="Heading_20_3" text:outline-level="3">Phase 2: Tools for Thinking</text:h>
      <text:p text:style-name="Text_20_body"><text:span text:style-name="Emphasis">Sessions 4–9</text:span> <text:span text:style-name="Emphasis">Goal: Build a practical repertoire of reasoning approaches</text:span></text:p>
      <text:p text:style-name="Text_20_body"><text:span text:style-name="Strong_20_Emphasis">Session 4 — Working With What You Have</text:span></text:p>
      <text:p text:style-name="Text_20_body">Reasoning under incomplete information — which is all reasoning, always. The instinct to wait until you have all the information before thinking is a trap; you never have all the information. The skill is making reasonable progress with what you have while staying honest about what you don't know.</text:p>
      <text:p text:style-name="Text_20_body">Concepts introduced: estimation as a reasoning tool — not guessing, but principled approximation. Fermi problems as a practice form: how many gallons of water does our chapter need to store for a two-week disruption? You don't need exact numbers. You need a process. Working through one together.</text:p>
      <text:p text:style-name="Text_20_body">Practice: One Fermi problem per week from the member's own life. Make an estimate. Show the reasoning. Check it where possible.</text:p>
      <text:p text:style-name="Text_20_body"><text:span text:style-name="Strong_20_Emphasis">Session 5 — Causes and Effects</text:span></text:p>
      <text:p text:style-name="Text_20_body"><text:soft-page-break/>The difference between correlation and causation in plain terms. How to reason about why something is happening — not just what is happening. The specific failure modes: assuming the most visible cause is the real cause, assuming a single cause when there are many, confusing sequence with causation.</text:p>
      <text:p text:style-name="Text_20_body">Group activity: a real situation where something went wrong — a crop failure, a community conflict, a health problem. Work backward: what actually caused this? How do we know? What else could have caused it?</text:p>
      <text:p text:style-name="Text_20_body">Concepts introduced: the five whys as a practical tool. Root cause versus proximate cause. The difference between treating a symptom and addressing a cause.</text:p>
      <text:p text:style-name="Text_20_body">Practice: Apply the five whys to one problem from the journal. Where does the chain of causes actually end?</text:p>
      <text:p text:style-name="Text_20_body"><text:span text:style-name="Strong_20_Emphasis">Session 6 — Other Ways to See It</text:span></text:p>
      <text:p text:style-name="Text_20_body">The single most underused reasoning move: deliberately considering the problem from a perspective other than the first one that came to mind. First interpretations feel like facts. They're hypotheses.</text:p>
      <text:p text:style-name="Text_20_body">Concepts introduced: steelmanning — not as a debate technique but as an epistemic practice. What is the strongest possible version of the interpretation I'm not currently holding? What would I have to believe for that to be right?</text:p>
      <text:p text:style-name="Text_20_body">Group activity: the group takes a contested real situation — something about which members have different initial reactions — and each member is assigned to argue for the interpretation they find least natural. What does this reveal?</text:p>
      <text:p text:style-name="Text_20_body">Practice: This week, when you find yourself confident about an explanation for something, spend five minutes genuinely trying to construct an alternative explanation that is at least as plausible.</text:p>
      <text:p text:style-name="Text_20_body"><text:span text:style-name="Strong_20_Emphasis">Session 7 — When Reasoning Goes Wrong</text:span></text:p>
      <text:p text:style-name="Text_20_body">The specific failure modes that appear in group reasoning and in individual thinking. Not a taxonomy of logical fallacies — that's academic and doesn't transfer. The ones that actually matter in practical collective reasoning.</text:p>
      <text:p text:style-name="Text_20_body">Covered: anchoring on the first number or idea encountered. Confirmation — seeking evidence that supports what you already think and discounting what doesn't. The planning fallacy — systematically underestimating how long and <text:soft-page-break/>hard things will be. Groupthink — the pressure toward consensus that makes groups dumber than their individual members. Social proof — reasoning from what others do or believe rather than from evidence.</text:p>
      <text:p text:style-name="Text_20_body">The approach is not to memorize these as named fallacies but to recognize them in real examples — including examples from the group's own discussions in previous sessions.</text:p>
      <text:p text:style-name="Text_20_body">Practice: Notice one instance of each of these in your own thinking or in conversations this week. Write it down.</text:p>
      <text:p text:style-name="Text_20_body"><text:span text:style-name="Strong_20_Emphasis">Session 8 — Numbers in Reasoning</text:span></text:p>
      <text:p text:style-name="Text_20_body">Quantitative reasoning as a component of thinking clearly — not as a math lesson but as a reasoning practice. The specific ways that numbers mislead when you don't know how to read them. Absolute versus relative risk. The base rate problem. What an average hides. What a percentage actually means.</text:p>
      <text:p text:style-name="Text_20_body">Real examples throughout: health statistics, agricultural yield data, resource consumption figures, community planning numbers. The question is always: what is this number actually telling me, and what is it not telling me?</text:p>
      <text:p text:style-name="Text_20_body">Group activity: members bring a real number they've encountered recently — from a news story, a product label, a health recommendation. Group interrogates it: what does this actually mean? What would you need to know to evaluate it?</text:p>
      <text:p text:style-name="Text_20_body">Practice: This week, when you encounter a statistic or quantitative claim, ask three questions: compared to what, over what time period, and who measured it and how.</text:p>
      <text:p text:style-name="Text_20_body"><text:span text:style-name="Strong_20_Emphasis">Session 9 — Making Decisions Under Uncertainty</text:span></text:p>
      <text:p text:style-name="Text_20_body">Reasoning doesn't end with understanding the problem. It ends with a decision or an action. How to move from analysis to action when you don't have all the information you'd like — which is always.</text:p>
      <text:p text:style-name="Text_20_body">Concepts introduced: the difference between reversible and irreversible decisions — the appropriate caution for each. The cost of not deciding. Expected value thinking in plain terms — not the formula but the logic: what are the possible outcomes, how likely is each, how bad or good is each? When is a good enough answer better than a perfect one that arrives too late?</text:p>
      <text:p text:style-name="Text_20_body"><text:soft-page-break/>Group activity: a real decision the group or community faces. Work through it together using the tools built in previous sessions. Make an actual recommendation.</text:p>
      <text:p text:style-name="Text_20_body">Practice: Apply this framework to one real decision you're facing. Write out the reasoning. Make the decision.</text:p>
      <text:p text:style-name="Horizontal_20_Line"/>
      <text:h text:style-name="Heading_20_3" text:outline-level="3">Phase 3: Thinking Together</text:h>
      <text:p text:style-name="Text_20_body"><text:span text:style-name="Emphasis">Sessions 10–12</text:span> <text:span text:style-name="Emphasis">Goal: Collective reasoning as a specific skill distinct from individual reasoning</text:span></text:p>
      <text:p text:style-name="Text_20_body"><text:span text:style-name="Strong_20_Emphasis">Session 10 — The Group as a Thinking Machine</text:span></text:p>
      <text:p text:style-name="Text_20_body">Groups can think better than individuals or much worse, depending on how they're structured. The conditions for good collective reasoning: diverse perspectives actually heard, dissent welcomed rather than suppressed, process explicit rather than implicit, conclusions provisional.</text:p>
      <text:p text:style-name="Text_20_body">The specific pathologies of group reasoning revisited: now not as individual failure modes but as group dynamics. How does a group anchor? How does groupthink propagate? What does good dissent look like and why is it hard to offer?</text:p>
      <text:p text:style-name="Text_20_body">Activity: the group attempts a complex problem using explicit collective reasoning — roles assigned, process made visible. One person tracks assumptions being made. One tracks what's being left out. One plays devil's advocate. Debrief: how was this different from normal discussion?</text:p>
      <text:p text:style-name="Text_20_body"><text:span text:style-name="Strong_20_Emphasis">Session 11 — Disagreement as a Tool</text:span></text:p>
      <text:p text:style-name="Text_20_body">Productive disagreement — the kind that sharpens thinking rather than generating heat — is a specific skill. It requires distinguishing between disagreements about facts, disagreements about values, and disagreements about interpretation. These require different responses.</text:p>
      <text:p text:style-name="Text_20_body">It also requires the capacity to change your mind when presented with good reasons — which is not weakness but the point of reasoning together.</text:p>
      <text:p text:style-name="Text_20_body">Activity: the group takes a genuinely contested question — one where members actually disagree — and works through it using explicit process. The <text:soft-page-break/>goal is not consensus. The goal is understanding the disagreement more precisely than when you started.</text:p>
      <text:p text:style-name="Text_20_body">Practice: This week, have one disagreement where your explicit goal is to understand the other person's position well enough to state it back to their satisfaction before you respond.</text:p>
      <text:p text:style-name="Text_20_body"><text:span text:style-name="Strong_20_Emphasis">Session 12 — Putting It Together</text:span></text:p>
      <text:p text:style-name="Text_20_body">A complex real problem — something that requires most of the tools built in this course — worked through completely, from initial fog to reasoned recommendation. The group chooses the problem. The guide steps back further than usual.</text:p>
      <text:p text:style-name="Text_20_body">Debrief: what did we use? What did we miss? What would we do differently?</text:p>
      <text:p text:style-name="Horizontal_20_Line"/>
      <text:h text:style-name="Heading_20_3" text:outline-level="3">Phase 4: Integration and Transition</text:h>
      <text:p text:style-name="Text_20_body"><text:span text:style-name="Emphasis">Sessions 13–14</text:span></text:p>
      <text:p text:style-name="Text_20_body"><text:span text:style-name="Strong_20_Emphasis">Session 13 — Stocktaking</text:span></text:p>
      <text:p text:style-name="Text_20_body">Honest assessment. Problem Journals reviewed. What changed in how members approach a hard problem? What failure modes have diminished? What persists? Not performance — genuine reckoning.</text:p>
      <text:p text:style-name="Text_20_body"><text:span text:style-name="Strong_20_Emphasis">Session 14 — The Ongoing Group</text:span></text:p>
      <text:p text:style-name="Text_20_body">Transition to practice group. Establish norms. The ongoing group continues to work real problems together — this is now a standing capacity of the Working Society chapter, not just a course. New members join after completing the structured phase.</text:p>
      <text:p text:style-name="Horizontal_20_Line"/>
      <text:h text:style-name="Heading_20_3" text:outline-level="3">Ongoing Practice Group</text:h>
      <text:p text:style-name="Text_20_body"><text:span text:style-name="Emphasis">No terminus</text:span></text:p>
      <text:p text:style-name="Text_20_body">The group continues to meet and work real problems. Over time this becomes one of the most practically valuable things a Working Society chapter does — a standing body that can think carefully through anything the community faces. The College of Conciliation and the sortition governance <text:soft-page-break/>structure both depend on members who can reason well together. This is where that capacity lives.</text:p>
      <text:p text:style-name="Horizontal_20_Line"/>
      <text:h text:style-name="Heading_20_3" text:outline-level="3">Running Themes Throughout</text:h>
      <text:p text:style-name="Text_20_body"><text:span text:style-name="Strong_20_Emphasis">Difficulty is the point.</text:span> If it were easy it wouldn't be practice. The guide names this regularly.</text:p>
      <text:p text:style-name="Text_20_body"><text:span text:style-name="Strong_20_Emphasis">Process over answer.</text:span> The quality of the reasoning matters more than whether the conclusion is correct. A group that reasons well and reaches a wrong conclusion can correct itself. A group that reaches the right conclusion for bad reasons cannot.</text:p>
      <text:p text:style-name="Text_20_body"><text:span text:style-name="Strong_20_Emphasis">Honest not confident.</text:span> The goal is not to sound smart. It is to think clearly. These are different and sometimes opposite.</text:p>
      <text:p text:style-name="Text_20_body"><text:span text:style-name="Strong_20_Emphasis">Real not abstract.</text:span> Every concept is introduced through a real problem. If a concept can't be applied to something that matters it doesn't belong in this course.</text:p>
      <text:p text:style-name="Horizontal_20_Line"/>
      <text:h text:style-name="Heading_20_3" text:outline-level="3">What Success Looks Like</text:h>
      <text:p text:style-name="Text_20_body">A member who completes the structured phase and continues the practice group should be able to:</text:p>
      <text:p text:style-name="Text_20_body">Sit with a hard problem without immediately reaching for resolution or giving up. Distinguish what they know from what they assume. Define a problem more precisely than they first encountered it. Generate more than one plausible approach. Notice when their reasoning is going wrong. Disagree productively with another person. Reason from incomplete information to a provisional conclusion they can defend and revise.</text:p>
      <text:p text:style-name="Text_20_body">These are not advanced intellectual skills. They are what thinking is supposed to be. The course is about recovering them.</text:p>
      <text:p text:style-name="P16"><text:span text:style-name="Strong_20_Empha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IM FELL English SC" svg:font-family="'IM FELL English SC'" style:font-pitch="variable"/>
    <style:font-face style:name="IM FELL English SC1" svg:font-family="'IM FELL English SC'" style:font-adornments="Bold" style:font-pitch="variable"/>
    <style:font-face style:name="IM FELL English SC2" svg:font-family="'IM FELL English SC'"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re Baskerville" svg:font-family="'Libre Baskerville'" style:font-adornments="Regular"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indent="0.2in" style:auto-text-indent="false"/>
      <style:text-properties style:font-name="Libre Baskerville" fo:font-family="'Libre Baskerville'" style:font-style-name="Regular" style:font-pitch="variable" fo:font-size="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IM FELL English SC1" fo:font-family="'IM FELL English SC'" style:font-style-name="Bold" style:font-pitch="variable" fo:font-size="16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IM FELL English SC1" fo:font-family="'IM FELL English SC'" style:font-style-name="Bold" style:font-pitch="variable" fo:font-size="11pt" fo:font-weight="normal" style:font-size-asian="16pt" style:font-weight-asian="bold" style:font-size-complex="16pt" style:font-weight-complex="bold"/>
    </style:style>
    <style:style style:name="Title" style:family="paragraph" style:parent-style-name="Heading" style:next-style-name="Text_20_body" style:class="chapter">
      <style:paragraph-properties fo:margin-top="0.1701in" fo:margin-bottom="0.1799in" style:contextual-spacing="false" fo:text-align="center" style:justify-single-word="false"/>
      <style:text-properties style:font-name="IM FELL English SC2" fo:font-family="'IM FELL English SC'" style:font-style-name="Regular" style:font-pitch="variable" fo:font-size="22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IM FELL English SC2" fo:font-family="'IM FELL English SC'" style:font-style-name="Regular" style:font-pitch="variable" fo:font-size="13pt" style:font-size-asian="18pt" style:font-size-complex="18pt"/>
    </style:style>
    <style:style style:name="First_20_Paragraph" style:display-name="First Paragraph" style:family="paragraph" style:parent-style-name="Standard" style:master-page-name="">
      <style:paragraph-properties fo:text-indent="0in" style:auto-text-indent="false" style:page-number="auto"/>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fo:padding="0.0201in" fo:border-left="none" fo:border-right="none" fo:border-top="none" fo:border-bottom="0.06pt solid #000000"/>
      <style:text-properties fo:color="#1e3a5f" loext:opacity="100%" officeooo:rsid="00207e9d" officeooo:paragraph-rsid="00207e9d"/>
    </style:style>
    <style:page-layout style:name="Mpm1">
      <style:page-layout-properties fo:page-width="8.5in" fo:page-height="11in" style:num-format="1" style:print-orientation="portrait" fo:margin-top="1.25in" fo:margin-bottom="1.25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he Resolute Societies of America</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08T13:48:24.763225727</meta:creation-date>
    <dc:date>2026-06-09T19:10:20.924560244</dc:date>
    <meta:editing-duration>PT8H5M38S</meta:editing-duration>
    <meta:editing-cycles>27</meta:editing-cycles>
    <meta:generator>LibreOffice/24.2.7.2$Linux_X86_64 LibreOffice_project/420$Build-2</meta:generator>
    <meta:document-statistic meta:table-count="0" meta:image-count="0" meta:object-count="0" meta:page-count="9" meta:paragraph-count="99" meta:word-count="2476" meta:character-count="15828" meta:non-whitespace-character-count="13395"/>
  </office:meta>
</office:document-meta>
</file>