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First_20_Paragraph">
      <style:text-properties fo:color="#2c2c2c" loext:opacity="100%"/>
    </style:style>
    <style:style style:name="P12" style:family="paragraph" style:parent-style-name="Heading_20_1">
      <style:text-properties fo:color="#1e3a5f" loext:opacity="100%"/>
    </style:style>
    <style:style style:name="P13" style:family="paragraph" style:parent-style-name="Heading_20_2">
      <style:text-properties fo:color="#1e3a5f" loext:opacity="100%"/>
    </style:style>
    <style:style style:name="P14" style:family="paragraph" style:parent-style-name="Heading_20_3">
      <style:text-properties fo:color="#2c2c2c" loext:opacity="100%"/>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Foundational Literacy Program</text:p>
      <text:p text:style-name="P2"/>
      <text:p text:style-name="P5"/>
      <text:p text:style-name="P6"/>
      <text:h text:style-name="P12"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2" text:outline-level="1">Foundational Principles</text:h>
      <text:p text:style-name="P6"/>
      <text:h text:style-name="P14" text:outline-level="3">Stage 1: Foundation — Unit Sequence</text:h>
      <text:p text:style-name="Text_20_body"><text:span text:style-name="Strong_20_Emphasis">Unit 0: Orientation (2–3 sessions)</text:span> No reading yet. Purpose: build rapport, establish the rhythm, and do an informal baseline. Tutor listens to the learner talk about their life. What words come up? What do they care about? Those become the content layer throughout the program. Also: establish that this is not school. Different contract.</text:p>
      <text:p text:style-name="Text_20_body"><text:span text:style-name="Strong_20_Emphasis">Unit 1: Phonemic Awareness (4–6 sessions)</text:span> Entirely oral. Rhyme recognition, syllable clapping, isolating first/last sounds in spoken words. The conceptual move: spoken words are made of separable sounds. Without this, phonics instruction doesn't stick. Sessions are short — 15 minutes of oral work, then 10 minutes of something else (drawing, talking).</text:p>
      <text:p text:style-name="Text_20_body"><text:span text:style-name="Strong_20_Emphasis">Unit 2: Letters and Their Sounds (6–8 sessions)</text:span> Introduce the most consistent consonants first: m, s, t, f, n, b, p, h, d. Short vowels: a, i, o. Letter formation integrated from day one — you say it, you write it, you read it back. Avoid c, g, x, q early. No alphabet recitation as a goal; sounds are the goal.</text:p>
      <text:p text:style-name="Text_20_body"><text:span text:style-name="Strong_20_Emphasis">Unit 3: CVC Words (8–10 sessions)</text:span> Consonant-vowel-consonant: sat, fin, hop, bed, mud. Blending (reading) and segmenting (spelling) as mirror skills. First <text:soft-page-break/>written vocabulary drawn from the learner's own life where possible. First sentences: "The dog sat." Using content relevant to the Working Society context naturally here — tool names, plant names, animal names.</text:p>
      <text:p text:style-name="Text_20_body"><text:span text:style-name="Strong_20_Emphasis">Unit 4: Blends, Digraphs, Short Vowel Variants (8–10 sessions)</text:span> bl, st, tr, ch, sh, th, wh. Words: shed, chin, trap, bled. Still fully decodable. First multi-sentence texts — three to five sentences on a single topic. Learner writes one sentence per session from dictation and one of their own.</text:p>
      <text:p text:style-name="Text_20_body"><text:span text:style-name="Strong_20_Emphasis">Unit 5: Long Vowel Patterns (8–10 sessions)</text:span> Silent-e (make, pine, hope), then vowel teams (rain, boat, feet). This is where many learners hit a wall — the patterns are less consistent. Slow down here. Lots of sorting activities: "does this word have a long or short vowel?" before decoding.</text:p>
      <text:p text:style-name="Text_20_body"><text:span text:style-name="Strong_20_Emphasis">Unit 6: High-Frequency Irregular Words (woven throughout, formalized here)</text:span> The, said, was, have, they, come, some, where, there — words that can't be decoded. Learned as wholes. Introduce a few per unit from Unit 3 onward; Unit 6 formalizes them with flash card review and dictation practice.</text:p>
      <text:p text:style-name="Text_20_body"><text:span text:style-name="Strong_20_Emphasis">Gateway Assessment</text:span> Tutor reads a short passage aloud together with the learner, then asks the learner to read a similar one alone. Learner writes two sentences about it. Tutor records observations on a simple rubric. Decision: ready for Stage 2, needs more time in specific units, or needs a different approach entirely.</text:p>
      <text:p text:style-name="Horizontal_20_Line"/>
      <text:h text:style-name="Heading_20_3" text:outline-level="3">Stage 2: Fluency — Unit Sequence</text:h>
      <text:p text:style-name="Text_20_body"><text:span text:style-name="Strong_20_Emphasis">Unit 7: Multisyllabic Words (8–10 sessions)</text:span> Syllable types: open (be, go), closed (sit, hop), vowel-consonant-e (make), vowel team (boat), r-controlled (farm, her). Chunking strategy: cover part of a long word, decode chunk by chunk. Words: together, children, important, garden, problem.</text:p>
      <text:p text:style-name="Text_20_body"><text:span text:style-name="Strong_20_Emphasis">Unit 8: Prefixes, Suffixes, Roots (6–8 sessions)</text:span> un-, re-, pre-, -ing, -ed, -tion, -ness, -ful, -less. Morphology as a meaning tool, not just a decoding tool. "If you know what 'work' means, what does 'rework' mean? What does 'workless' mean?"</text:p>
      <text:p text:style-name="Text_20_body"><text:span text:style-name="Strong_20_Emphasis">Unit 9: Fluency Practice (6–8 sessions)</text:span> Repeated reading of meaningful passages — same text read three times across two sessions. The goal is automaticity: when decoding is effortless, comprehension has room to happen. Texts drawn from Working Society materials, local news, practical documents.</text:p>
      <text:p text:style-name="Text_20_body"><text:soft-page-break/><text:span text:style-name="Strong_20_Emphasis">Unit 10: Comprehension Strategies (8–10 sessions)</text:span> Main idea and detail. Sequence. Cause and effect. Making inferences. These are taught explicitly and practiced on real texts. Learner keeps a simple reading log — not a school journal, just a record: what they read, one thing they noticed.</text:p>
      <text:p text:style-name="Text_20_body"><text:span text:style-name="Strong_20_Emphasis">Unit 11: Writing Paragraphs (6–8 sessions)</text:span> Topic sentence, two or three supporting sentences, closing sentence. Starts with transcription and modification ("here's a paragraph — change it to be about your own experience"). Moves to independent paragraph writing on prompts tied to real life and Working Society context.</text:p>
      <text:p text:style-name="Text_20_body"><text:span text:style-name="Strong_20_Emphasis">Completion</text:span> No ceremony required, but one is appropriate. The learner has done something real and har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8:43:39.252826093</dc:date>
    <meta:editing-duration>PT7H38M58S</meta:editing-duration>
    <meta:editing-cycles>24</meta:editing-cycles>
    <meta:generator>LibreOffice/24.2.7.2$Linux_X86_64 LibreOffice_project/420$Build-2</meta:generator>
    <meta:document-statistic meta:table-count="0" meta:image-count="0" meta:object-count="0" meta:page-count="3" meta:paragraph-count="21" meta:word-count="714" meta:character-count="4487" meta:non-whitespace-character-count="3794"/>
  </office:meta>
</office:document-meta>
</file>