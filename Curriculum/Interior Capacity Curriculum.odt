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M FELL English SC" svg:font-family="'IM FELL English SC'" style:font-pitch="variable"/>
    <style:font-face style:name="IM FELL English SC1" svg:font-family="'IM FELL English SC'" style:font-adornments="Bold" style:font-pitch="variable"/>
    <style:font-face style:name="IM FELL English SC2" svg:font-family="'IM FELL English SC'"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re Baskerville" svg:font-family="'Libre Baskerville'" style:font-adornments="Regular"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end" style:justify-single-word="false" fo:padding="0.0201in" fo:border-left="none" fo:border-right="none" fo:border-top="none" fo:border-bottom="0.06pt solid #000000"/>
      <style:text-properties fo:color="#1e3a5f" loext:opacity="100%" officeooo:rsid="00207e9d" officeooo:paragraph-rsid="00207e9d"/>
    </style:style>
    <style:style style:name="P2" style:family="paragraph" style:parent-style-name="Subtitle">
      <style:text-properties fo:color="#1e3a5f" loext:opacity="100%"/>
    </style:style>
    <style:style style:name="P3" style:family="paragraph" style:parent-style-name="Standard">
      <style:paragraph-properties fo:margin-left="0in" fo:margin-right="0in" style:line-height-at-least="0.198in" fo:text-indent="0in" style:auto-text-indent="false"/>
      <style:text-properties fo:color="#111111" loext:opacity="100%" style:font-name="IM FELL English SC" fo:font-size="10.5pt" fo:font-weight="bold" officeooo:paragraph-rsid="001f52f8" fo:background-color="transparent"/>
    </style:style>
    <style:style style:name="P4" style:family="paragraph" style:parent-style-name="First_20_Paragraph">
      <style:text-properties fo:color="#2c2c2c" loext:opacity="100%"/>
    </style:style>
    <style:style style:name="P5" style:family="paragraph" style:parent-style-name="Standard">
      <style:paragraph-properties style:line-height-at-least="0.198in"/>
      <style:text-properties fo:color="#2c2c2c" loext:opacity="100%" style:font-name="IM FELL English SC" fo:font-size="10.5pt" fo:font-weight="bold" fo:background-color="transparent"/>
    </style:style>
    <style:style style:name="P6" style:family="paragraph" style:parent-style-name="Standard">
      <style:paragraph-properties style:line-height-at-least="0.198in"/>
      <style:text-properties fo:color="#2c2c2c" loext:opacity="100%" style:font-name="IM FELL English SC" fo:background-color="transparent"/>
    </style:style>
    <style:style style:name="P7" style:family="paragraph" style:parent-style-name="Standard">
      <style:text-properties fo:color="#2c2c2c" loext:opacity="100%"/>
    </style:style>
    <style:style style:name="P8" style:family="paragraph" style:parent-style-name="First_20_Paragraph">
      <style:text-properties fo:color="#2c2c2c" loext:opacity="100%" officeooo:paragraph-rsid="003a82d1"/>
    </style:style>
    <style:style style:name="P9" style:family="paragraph" style:parent-style-name="First_20_Paragraph">
      <style:text-properties fo:color="#2c2c2c" loext:opacity="100%" officeooo:paragraph-rsid="003afd50"/>
    </style:style>
    <style:style style:name="P10" style:family="paragraph" style:parent-style-name="Title">
      <style:text-properties fo:color="#1e3a5f" loext:opacity="100%" officeooo:rsid="003fa145" officeooo:paragraph-rsid="003fa145"/>
    </style:style>
    <style:style style:name="P11" style:family="paragraph" style:parent-style-name="Heading_20_1">
      <style:text-properties fo:color="#1e3a5f" loext:opacity="100%"/>
    </style:style>
    <style:style style:name="P12" style:family="paragraph" style:parent-style-name="Heading_20_2">
      <style:text-properties fo:color="#1e3a5f" loext:opacity="100%"/>
    </style:style>
    <style:style style:name="P13" style:family="paragraph" style:parent-style-name="Heading_20_3">
      <style:paragraph-properties style:line-height-at-least="0.198in" fo:text-indent="0in" style:auto-text-indent="false"/>
      <style:text-properties fo:color="#2c2c2c" loext:opacity="100%"/>
    </style:style>
    <style:style style:name="P14" style:family="paragraph" style:parent-style-name="Heading_20_4">
      <style:text-properties fo:color="#2c2c2c" loext:opacity="100%"/>
    </style:style>
    <style:style style:name="P15" style:family="paragraph" style:parent-style-name="Text_20_body">
      <style:text-properties fo:color="#2c2c2c" loext:opacity="100%"/>
    </style:style>
    <style:style style:name="P16" style:family="paragraph" style:parent-style-name="Text_20_body">
      <style:paragraph-properties style:line-height-at-least="0.198in" fo:text-indent="0in" style:auto-text-indent="false"/>
      <style:text-properties fo:color="#2c2c2c" loext:opacity="100%"/>
    </style:style>
    <style:style style:name="P17" style:family="paragraph" style:parent-style-name="Text_20_body" style:list-style-name="L1"/>
    <style:style style:name="P18" style:family="paragraph" style:parent-style-name="Text_20_body" style:list-style-name="L1">
      <style:paragraph-properties fo:margin-top="0in" fo:margin-bottom="0in" style:contextual-spacing="false"/>
    </style:style>
    <style:style style:name="T1" style:family="text">
      <style:text-properties officeooo:rsid="00207e9d"/>
    </style:style>
    <style:style style:name="T2" style:family="text">
      <style:text-properties officeooo:rsid="0024f617"/>
    </style:style>
    <style:style style:name="T3" style:family="text">
      <style:text-properties officeooo:rsid="0026ccf4"/>
    </style:style>
    <style:style style:name="T4" style:family="text">
      <style:text-properties officeooo:rsid="0027efd4"/>
    </style:style>
    <style:style style:name="T5" style:family="text">
      <style:text-properties officeooo:rsid="00297856"/>
    </style:style>
    <style:style style:name="T6" style:family="text">
      <style:text-properties officeooo:rsid="002a39be"/>
    </style:style>
    <style:style style:name="T7" style:family="text">
      <style:text-properties officeooo:rsid="002b7d10"/>
    </style:style>
    <style:style style:name="T8" style:family="text">
      <style:text-properties officeooo:rsid="002cc6bf"/>
    </style:style>
    <style:style style:name="T9" style:family="text">
      <style:text-properties officeooo:rsid="002cf6af"/>
    </style:style>
    <style:style style:name="T10" style:family="text">
      <style:text-properties officeooo:rsid="002ec032"/>
    </style:style>
    <style:style style:name="T11" style:family="text">
      <style:text-properties officeooo:rsid="002f17f7"/>
    </style:style>
    <style:style style:name="T12" style:family="text">
      <style:text-properties officeooo:rsid="00310cfc"/>
    </style:style>
    <style:style style:name="T13" style:family="text">
      <style:text-properties officeooo:rsid="003210b5"/>
    </style:style>
    <style:style style:name="T14" style:family="text">
      <style:text-properties officeooo:rsid="003732d9"/>
    </style:style>
    <style:style style:name="T15" style:family="text">
      <style:text-properties officeooo:rsid="003783fc"/>
    </style:style>
    <style:style style:name="T16" style:family="text">
      <style:text-properties officeooo:rsid="003a82d1"/>
    </style:style>
    <style:style style:name="T17" style:family="text">
      <style:text-properties officeooo:rsid="00438421"/>
    </style:style>
    <style:style style:name="T18" style:family="text">
      <style:text-properties officeooo:rsid="0045f162"/>
    </style:style>
    <style:style style:name="T19" style:family="text">
      <style:text-properties officeooo:rsid="00541d4b"/>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10"><text:span text:style-name="T19">Interior Capacity</text:span> Program</text:p>
      <text:p text:style-name="P2"/>
      <text:p text:style-name="P5"/>
      <text:p text:style-name="P6"/>
      <text:h text:style-name="P11" text:outline-level="1">Preamble</text:h>
      <text:p text:style-name="P6"/>
      <text:p text:style-name="P4">There are moments in history that test the character of a nation, that demand more than ordinary times prepare <text:span text:style-name="T3">any person</text:span> for. We believe we are living in such a moment. We do not take that lightly. We resolve to meet it together.</text:p>
      <text:p text:style-name="P6"/>
      <text:h text:style-name="P11" text:outline-level="1">Foundational Principles</text:h>
      <text:h text:style-name="P13" text:outline-level="3"><text:span text:style-name="Strong_20_Emphasis">A Working Society Course in Interior Capacity</text:span></text:h>
      <text:p text:style-name="Text_20_body"><text:span text:style-name="Strong_20_Emphasis">Format:</text:span> Small group, approximately 6 members plus one guide <text:span text:style-name="Strong_20_Emphasis">Session length:</text:span> 90 minutes <text:span text:style-name="Strong_20_Emphasis">Frequency:</text:span> Weekly <text:span text:style-name="Strong_20_Emphasis">Duration:</text:span> Open-ended — structured phase of approximately 14 sessions, then ongoing practice group <text:span text:style-name="Strong_20_Emphasis">Setting:</text:span> In person, no devices in the room <text:span text:style-name="Strong_20_Emphasis">Prerequisite:</text:span> None formally, but Course 1 concurrent enrollment strongly recommended — the attentional practices are the substrate for much of this work</text:p>
      <text:p text:style-name="Horizontal_20_Line"/>
      <text:h text:style-name="Heading_20_3" text:outline-level="3">What This Course Is</text:h>
      <text:p text:style-name="Text_20_body">A practical course in four related capacities that the attention economy systematically damaged: psychological resilience, identity independent of external validation, emotional literacy, and relationship with solitude. These are not separate things. They are four facets of the same underlying capacity — the ability to exist from the inside rather than from the outside.</text:p>
      <text:p text:style-name="Text_20_body">The course approaches all four through a spiral structure: introduced together in Phase 1, developed with depth in Phase 2, examined in their interactions in Phase 3. The practices are present-tense and concrete. The goal is not self-knowledge as a private achievement but as a community asset — a <text:soft-page-break/>person who acts from their own values and perceptions rather than from the need for approval is a more honest member, a more reliable neighbor, a more genuine participant in collective life.</text:p>
      <text:p text:style-name="Horizontal_20_Line"/>
      <text:h text:style-name="Heading_20_3" text:outline-level="3">What This Course Is Not</text:h>
      <text:p text:style-name="Text_20_body">This course is not therapy. The guide is not a therapist. The sessions do not simulate therapeutic process and do not require disclosure beyond what each member chooses freely.</text:p>
      <text:p text:style-name="Text_20_body">What arises in this course may sometimes point toward something that needs clinical attention. That is not a failure — it is information, and it is valuable. The Working Society can help connect members to appropriate support when that is what is needed. The guide should name this clearly in the first session and return to it whenever it becomes relevant.</text:p>
      <text:p text:style-name="Text_20_body">If a session opens something a member is not ready to work with in a group context, the right response is not to push through. The right response is to acknowledge it, honor it, and find the appropriate container for it — which may not be this course.</text:p>
      <text:p text:style-name="Horizontal_20_Line"/>
      <text:h text:style-name="Heading_20_3" text:outline-level="3">The Guide's Role</text:h>
      <text:p text:style-name="Text_20_body">Hold the space. Protect the boundary between course and therapy without being rigid about it. Model the capacities being built — you are not outside this work.</text:p>
      <text:p text:style-name="Text_20_body">The specific skill this course requires of the guide more than any other: the capacity to be present with difficulty without rushing to resolve it. Members will bring real things into this room. Some of it will be heavy. The guide's job is not to fix it or redirect away from it, but to hold it steadily and help the group stay with it long enough to learn something.</text:p>
      <text:p text:style-name="Text_20_body">You also need to know your own limits. If something arises that is beyond your capacity to hold safely, say so. That honesty is itself a model of the stable self.</text:p>
      <text:p text:style-name="Horizontal_20_Line"/>
      <text:h text:style-name="Heading_20_3" text:outline-level="3"><text:soft-page-break/>A Note on Disclosure</text:h>
      <text:p text:style-name="Text_20_body">Members should never feel that this course requires them to disclose personal material to participate fully. Every structured exercise has a version that works with hypothetical or lightly personal material. The guide should make this explicit at the outset and reinforce it regularly.</text:p>
      <text:p text:style-name="Text_20_body">The group should also establish early that what is shared in the room stays in the room. Not as a rule imposed from outside but as a norm the group establishes together. This is different from the other courses — the material here is more personal and the stakes of a breach are higher.</text:p>
      <text:p text:style-name="Horizontal_20_Line"/>
      <text:h text:style-name="Heading_20_3" text:outline-level="3">Phase 1: The Landscape</text:h>
      <text:p text:style-name="Text_20_body"><text:span text:style-name="Emphasis">Sessions 1–3</text:span> <text:span text:style-name="Emphasis">Goal: Establish a shared honest picture of what was damaged and what we are building</text:span></text:p>
      <text:p text:style-name="Text_20_body"><text:span text:style-name="Strong_20_Emphasis">Session 1 — The Performing Self</text:span></text:p>
      <text:p text:style-name="Text_20_body">Open with a question: when are you most yourself?</text:p>
      <text:p text:style-name="Text_20_body">Let it sit. Notice what comes up before any concepts are introduced.</text:p>
      <text:p text:style-name="Text_20_body">The session builds a shared account of the specific damage the attention economy did to the self. Not the attentional damage covered in Course 1 — the identity damage. The permanent audience. The quantified social worth. The self that exists primarily as a signal sent to others and is only real insofar as it is received. The experience of being always on, always observable, always subject to evaluation.</text:p>
      <text:p text:style-name="Text_20_body">This didn't create the performing self — that's a human tendency as old as social life. But it made the performance continuous and the feedback immediate in a way that has no historical precedent. There was no previous era in which a person could know, in real time, how many people approved of what they just said.</text:p>
      <text:p text:style-name="Text_20_body">The cost of that: the interior life atrophied. The experience of existing without an audience became strange and uncomfortable. The self that doesn't need to be seen to be real became harder to access.</text:p>
      <text:p text:style-name="Text_20_body"><text:soft-page-break/>Concepts introduced plainly: the performing self versus the experiencing self. Not as a binary — as a spectrum, and as a question of which one is running the show most of the time.</text:p>
      <text:p text:style-name="Text_20_body">Practice introduced: The Interior Check. Once per day, at a moment not prompted by external stimulus, ask: what am I actually feeling right now? Not what should I be feeling, not what would I say I'm feeling if someone asked — what is actually present? Write it down without editing it.</text:p>
      <text:p text:style-name="Text_20_body"><text:span text:style-name="Strong_20_Emphasis">Session 2 — Four Capacities, One Ground</text:span></text:p>
      <text:p text:style-name="Text_20_body">The session introduces all four capacities the course is building, with enough precision that members can locate themselves honestly in relation to each.</text:p>
      <text:p text:style-name="Text_20_body"><text:span text:style-name="Strong_20_Emphasis">Resilience</text:span> — the capacity to encounter difficulty, setback, loss, and uncertainty without collapsing, fleeing, or being permanently destabilized. Not toughness in the sense of not feeling things. The capacity to feel the difficulty fully and continue functioning from your own ground.</text:p>
      <text:p text:style-name="Text_20_body"><text:span text:style-name="Strong_20_Emphasis">Identity independent of validation</text:span> — a sense of self that doesn't require continuous external confirmation to remain stable. Not indifference to others' views — genuine engagement with feedback while not being constituted by it. The difference between caring what people think and needing what people think.</text:p>
      <text:p text:style-name="Text_20_body"><text:span text:style-name="Strong_20_Emphasis">Emotional literacy</text:span> — the capacity to know what you are actually feeling with enough precision to work with it. Distinguishing anger from fear, loneliness from boredom, grief from depression, genuine enthusiasm from performed excitement. Knowing what a feeling is telling you without being run by it.</text:p>
      <text:p text:style-name="Text_20_body"><text:span text:style-name="Strong_20_Emphasis">Relationship with solitude</text:span> — the capacity to be alone without loneliness, to find the interior life worthwhile rather than threatening, to exist in your own company without needing to fill the space with stimulation.</text:p>
      <text:p text:style-name="Text_20_body">Group discussion: where does each member feel most solid and most fragile across these four? Not a disclosure requirement — a honest self-inventory. Members can share as much or as little as they choose.</text:p>
      <text:p text:style-name="Text_20_body">Practice: the Interior Check continues. Add one question: which of the four capacities felt most relevant to what you noticed today?</text:p>
      <text:p text:style-name="Text_20_body"><text:span text:style-name="Strong_20_Emphasis">Session 3 — What the Platforms Did, Specifically</text:span></text:p>
      <text:p text:style-name="Text_20_body"><text:soft-page-break/>A precise account of the mechanisms — not as a lecture but as a shared examination of something the group lived through.</text:p>
      <text:p text:style-name="Text_20_body">The validation loop: every like, share, and follower count is a variable reward signal that the brain processes similarly to other reward stimuli. Over time the self-concept becomes entangled with these signals. Your sense of whether something you said or did was worthwhile becomes dependent on its reception. The interior sense of your own value atrophies from disuse.</text:p>
      <text:p text:style-name="Text_20_body">The permanent audience: when behavior is always potentially observable and recorded, the calculating mind — what will this look like? how will this be received? — becomes default rather than occasional. Spontaneity, genuine expression, and the experience of doing things purely for their own sake all require a temporary absence of audience. The permanent audience makes that absence rare.</text:p>
      <text:p text:style-name="Text_20_body">The comparison engine: social media is an optimized comparison machine. You are always seeing the curated highlights of others against the unfiltered interior of your own experience. The inevitable result is a chronic sense of inadequacy that is structural rather than personal.</text:p>
      <text:p text:style-name="Text_20_body">The exit: when things get hard, uncomfortable, or boring — in a relationship, a conversation, a moment of solitude — the device offers immediate exit. Over years this conditions the self away from the capacity to stay with difficulty. Resilience requires practiced staying. The phone trained practiced leaving.</text:p>
      <text:p text:style-name="Text_20_body">Group discussion: which of these hit hardest? Where do members recognize themselves most clearly?</text:p>
      <text:p text:style-name="Text_20_body">Practice: identify one moment this week when you reached for your phone to exit something uncomfortable. What were you exiting? What would have happened if you'd stayed?</text:p>
      <text:p text:style-name="Horizontal_20_Line"/>
      <text:h text:style-name="Heading_20_3" text:outline-level="3">Phase 2: Building the Capacities</text:h>
      <text:p text:style-name="Text_20_body"><text:span text:style-name="Emphasis">Sessions 4–11</text:span> <text:span text:style-name="Emphasis">Goal: Systematic practice of each capacity with increasing depth and difficulty</text:span></text:p>
      <text:p text:style-name="Text_20_body"><text:span text:style-name="Strong_20_Emphasis">Session 4 — Solitude: First Practice</text:span></text:p>
      <text:p text:style-name="Text_20_body">Solitude is the foundation the other three sit on. A person who cannot be alone with themselves cannot know what they actually feel, cannot act from <text:soft-page-break/>their own ground, cannot encounter difficulty without the escape hatch of distraction. This course builds solitude first because it is both the most damaged capacity and the most enabling one.</text:p>
      <text:p text:style-name="Text_20_body">Concepts introduced: the difference between solitude and loneliness. Loneliness is the painful absence of desired connection. Solitude is the chosen presence with oneself — and for many people who grew up with constant digital stimulation, it has never been genuinely experienced. What feels like introversion or preference for alone time is often just the experience of being with a device rather than with people. That's not solitude. It's distraction in a private room.</text:p>
      <text:p text:style-name="Text_20_body">Group practice in session: ten minutes of genuine solitude. No task, no device, no conversation, no agenda. Sit. The guide holds the space. Afterward: what arose? What was uncomfortable? What was surprising?</text:p>
      <text:p text:style-name="Text_20_body">Practice: fifteen minutes of genuine solitude daily. No devices, no task, no stimulation. Sit or walk. Stay with whatever comes. Interior Check during or immediately after.</text:p>
      <text:p text:style-name="Text_20_body"><text:span text:style-name="Strong_20_Emphasis">Session 5 — Solitude: Going Deeper</text:span></text:p>
      <text:p text:style-name="Text_20_body">The group reports on the solitude practice. Honest accounting — not performance of how well it went.</text:p>
      <text:p text:style-name="Text_20_body">What typically arises in genuine solitude: anxiety, restlessness, boredom, and then — if you stay past the discomfort — something quieter. Memory. Genuine feeling. The texture of your own experience. Things you've been moving too fast to notice.</text:p>
      <text:p text:style-name="Text_20_body">The session works with what arose for members specifically. What came up in the solitude that hadn't been available when the stimulation was running? What was it like to be alone with that?</text:p>
      <text:p text:style-name="Text_20_body">Concepts introduced: the interior life as a resource rather than a void. What creativity, genuine preference, and authentic feeling require — unscheduled, unobserved mental time. The relationship between solitude and self-knowledge.</text:p>
      <text:p text:style-name="Text_20_body">Practice: solitude practice extends to twenty minutes. Try it in a different setting — outside if possible, somewhere with natural rather than built environment.</text:p>
      <text:p text:style-name="Text_20_body"><text:span text:style-name="Strong_20_Emphasis">Session 6 — Emotional Literacy: What Am I Actually Feeling?</text:span></text:p>
      <text:p text:style-name="Text_20_body"><text:soft-page-break/>Most people have a working vocabulary of about six emotions: happy, sad, angry, scared, surprised, disgusted. That vocabulary is not sufficient for navigating a human life. The emotions that actually run behavior are more specific, more ambiguous, and often layered — and without the language to identify them precisely, they remain opaque forces that drive action without being understood.</text:p>
      <text:p text:style-name="Text_20_body">The session builds emotional vocabulary as a practical tool, not a therapeutic one. The goal is precision — not feeling more but knowing more clearly what you are feeling.</text:p>
      <text:p text:style-name="Text_20_body">Concepts introduced: primary and secondary emotions. The difference between anger and hurt, between anxiety and excitement, between guilt and shame, between grief and depression. How emotions carry information — what the feeling is trying to tell you about what matters and what is threatened.</text:p>
      <text:p text:style-name="Text_20_body">Group activity: the guide presents a series of real scenarios — situations that arise in community life, in relationships, in work. For each: what might someone actually be feeling? The group works to name it with precision. Not what they should feel — what the actual emotional texture of the situation might be.</text:p>
      <text:p text:style-name="Text_20_body">Practice: Interior Check expands. Not just what are you feeling but what specifically. Use more precise language than you normally would. Notice where the vocabulary is lacking.</text:p>
      <text:p text:style-name="Text_20_body"><text:span text:style-name="Strong_20_Emphasis">Session 7 — Emotional Literacy: Working With What's There</text:span></text:p>
      <text:p text:style-name="Text_20_body">Knowing what you feel is the first step. The second is being able to work with it — to neither suppress it nor be run by it.</text:p>
      <text:p text:style-name="Text_20_body">The specific failure modes the attention economy produced here: suppression through stimulation — every uncomfortable feeling immediately resolved by reaching for the phone, so feelings never complete their arc and the information they carry never arrives. And flooding — the emotional system overwhelmed by the volume and intensity of digitally mediated experience, producing chronic low-grade anxiety, rage, and despair that is structural rather than responsive to actual circumstances.</text:p>
      <text:p text:style-name="Text_20_body">Concepts introduced: the difference between feeling a feeling and acting from it. The arc of an emotion — what happens if you actually stay with a difficult feeling rather than suppressing or venting it. Regulation as a skill distinct from suppression.</text:p>
      <text:p text:style-name="Text_20_body"><text:soft-page-break/>The therapy boundary is most relevant here. The session can introduce these concepts and practices without becoming a processing session for individual members' emotional histories. The guide keeps the work at the level of present-tense practice and observation.</text:p>
      <text:p text:style-name="Text_20_body">Group practice: the guide leads a brief structured exercise — members bring a mild current feeling, stay with it for three minutes without doing anything about it, and notice what happens. Debrief.</text:p>
      <text:p text:style-name="Text_20_body">Practice: once this week, when a difficult feeling arises, stay with it for five minutes before doing anything. Not to analyze it — to let it be present. Notice what changes.</text:p>
      <text:p text:style-name="Text_20_body"><text:span text:style-name="Strong_20_Emphasis">Session 8 — Resilience: What It Actually Is</text:span></text:p>
      <text:p text:style-name="Text_20_body">Resilience is not toughness. It is not the absence of feeling difficulty. It is not the capacity to absorb damage without flinching. Those are performance of resilience, not the thing itself.</text:p>
      <text:p text:style-name="Text_20_body">Real resilience is the capacity to encounter difficulty — loss, failure, pain, uncertainty, conflict — and to remain functional, to continue acting from your own ground, to recover without permanent destabilization. It requires feeling the difficulty fully. The person who doesn't feel the difficulty isn't resilient — they're defended. Defense is not the same as resilience and it fails differently.</text:p>
      <text:p text:style-name="Text_20_body">The session builds an honest account of what makes difficulty difficult. Not the external event — the internal experience of threat to the self-concept, to safety, to relationships, to plans, to the sense of being in control. Resilience develops when you encounter that experience repeatedly and survive it — not unscathed, but intact.</text:p>
      <text:p text:style-name="Text_20_body">Concepts introduced: the difference between resilience and suppression, between recovery and denial, between stability and rigidity. Post-traumatic growth in plain terms — the research finding that people who encounter and survive significant difficulty often develop capacities they didn't have before.</text:p>
      <text:p text:style-name="Text_20_body">Group discussion: a moment of genuine difficulty each member navigated. Not disclosure of trauma — a moment when something hard happened and they came through it. What did they learn about what they were capable of?</text:p>
      <text:p text:style-name="Text_20_body">Practice: identify one small difficulty you are currently avoiding. Not a big one — something modest. Stay with the discomfort of it without resolving it for three days. Notice what happens.</text:p>
      <text:p text:style-name="Text_20_body"><text:soft-page-break/><text:span text:style-name="Strong_20_Emphasis">Session 9 — Resilience: The Practice of Staying</text:span></text:p>
      <text:p text:style-name="Text_20_body">The specific practice that builds resilience is the practice of staying — with difficulty, with discomfort, with ambiguity, without the immediate escape the phone offers.</text:p>
      <text:p text:style-name="Text_20_body">This session connects resilience directly to the solitude practice and the attentional work of Course 1. Every time a member stays with discomfort instead of exiting it, they are building the substrate of resilience. The practices aren't separate — they're the same practice approached from different angles.</text:p>
      <text:p text:style-name="Text_20_body">Concepts introduced: distress tolerance as a trainable capacity. The difference between discomfort that is a signal to act and discomfort that is simply the experience of being alive in difficult circumstances. The role of the body in resilience — sleep, physical work, time in natural environments, the things that restore the nervous system.</text:p>
      <text:p text:style-name="Text_20_body">Group activity: the group examines the avoidances identified in the previous session's practice. What happened? What was learned? What did staying feel like compared to what was anticipated?</text:p>
      <text:p text:style-name="Text_20_body">Practice: extend the practice of staying. Choose one ongoing difficulty — something in your actual life — and commit to staying with it for the duration of this course rather than resolving it prematurely.</text:p>
      <text:p text:style-name="Text_20_body"><text:span text:style-name="Strong_20_Emphasis">Session 10 — Identity: The Ground Beneath</text:span></text:p>
      <text:p text:style-name="Text_20_body">The session the course has been building toward. Where does your sense of self actually come from — and how stable is that ground?</text:p>
      <text:p text:style-name="Text_20_body">The attention economy produced a specific answer to that question: from reception. From how you are perceived, evaluated, and responded to. The self becomes a function of its audience. And when the audience is fickle, algorithmically curated, and capable of turning on you in ways you can't predict or control, the self built on that ground is chronically unstable.</text:p>
      <text:p text:style-name="Text_20_body">The alternative is not independence from all relationship and community — that's not human. It's a self grounded in something more durable: values you actually hold and act from, relationships of genuine rather than performed intimacy, work and practice that has meaning independent of whether anyone is watching, a sense of your own history and continuity that doesn't require external confirmation.</text:p>
      <text:p text:style-name="Text_20_body"><text:soft-page-break/>Concepts introduced: values-based identity versus reception-based identity. Not as a pure binary — as a question of what is load-bearing. What carries your sense of self when the reception is bad or absent?</text:p>
      <text:p text:style-name="Text_20_body">Group discussion: what are the things that remain true about who you are regardless of how they are received? This is genuinely hard for many people to answer. Give it time.</text:p>
      <text:p text:style-name="Text_20_body">Practice: write down five things you value and act on that no one would know about from your social presence. Things that are real but not performed. Notice what this reveals.</text:p>
      <text:p text:style-name="Text_20_body"><text:span text:style-name="Strong_20_Emphasis">Session 11 — Identity: Living From the Inside</text:span></text:p>
      <text:p text:style-name="Text_20_body">The practical experience of acting from your own values and perceptions rather than from the anticipated response of an audience. What it feels like. What it costs. What it enables.</text:p>
      <text:p text:style-name="Text_20_body">The specific difficulty: living from the inside in a social world that rewards performance. The people around you have been conditioned by the same environment. Genuine expression without strategic packaging can feel naked. Groups can penalize authenticity when performance is the norm. The Working Society community is supposed to be different — but it will take work to make that real rather than aspirational.</text:p>
      <text:p text:style-name="Text_20_body">Concepts introduced: the difference between genuine expression and strategic disclosure. How to offer your actual perception of something in a group setting without performing it or suppressing it. The relationship between interior stability and the capacity for genuine community — a person who needs the group's approval to feel real cannot be honest with the group.</text:p>
      <text:p text:style-name="Text_20_body">Group activity: each member says one thing they actually think about a real question facing the group — not what they think will be well received, not a performance of having an interesting opinion, but what they actually think. The group receives it without immediate evaluation.</text:p>
      <text:p text:style-name="Text_20_body">Practice: once this week, act from a value you hold without doing it in a way that is visible or receives any social response. Do it purely because it's what you value. Notice what that feels like.</text:p>
      <text:p text:style-name="Horizontal_20_Line"/>
      <text:h text:style-name="Heading_20_3" text:outline-level="3"><text:soft-page-break/>Phase 3: The Interactions</text:h>
      <text:p text:style-name="Text_20_body"><text:span text:style-name="Emphasis">Sessions 12–13</text:span> <text:span text:style-name="Emphasis">Goal: Examine how the four capacities support and challenge each other</text:span></text:p>
      <text:p text:style-name="Text_20_body"><text:span text:style-name="Strong_20_Emphasis">Session 12 — How They Work Together</text:span></text:p>
      <text:p text:style-name="Text_20_body">The spiral closes. The session examines the relationships between the four capacities the course has been building.</text:p>
      <text:p text:style-name="Text_20_body">Solitude is the foundation: without the capacity to be alone with yourself, you cannot develop emotional literacy — you never encounter your own interior clearly enough to read it. Without emotional literacy, resilience is just suppression wearing a different name. Without resilience, identity under social pressure reverts to reception-dependence because the discomfort of being genuinely yourself among people who want you to perform is real and requires the capacity to stay with it.</text:p>
      <text:p text:style-name="Text_20_body">And in the other direction: a person with stable identity grounded in their own values can be alone without existential threat — solitude stops being frightening when you find your own company worthwhile. Emotional literacy makes resilience possible — you can stay with difficulty when you know what you're actually feeling rather than being overwhelmed by an undifferentiated mass of distress.</text:p>
      <text:p text:style-name="Text_20_body">Group activity: each member maps their own experience of these interactions. Where have you felt one capacity support another this course? Where have you felt the absence of one undermine another?</text:p>
      <text:p text:style-name="Text_20_body"><text:span text:style-name="Strong_20_Emphasis">Session 13 — When It's Hard</text:span></text:p>
      <text:p text:style-name="Text_20_body">The session addresses what happens when this work runs into its limits — when the difficulty that arises is more than the course can hold, when what emerges points toward something clinical, when a member is struggling in ways that need support beyond what the group can provide.</text:p>
      <text:p text:style-name="Text_20_body">This is not a crisis session. It is a preventive one — building the group's capacity to recognize when one of its members needs more than the group offers and to respond with care rather than denial or panic.</text:p>
      <text:p text:style-name="Text_20_body">The guide leads an honest discussion: what are the signs that someone might need clinical support? What does the Working Society's responsibility look like in that situation? What resources exist and how does the community connect people to them?</text:p>
      <text:p text:style-name="Text_20_body"><text:soft-page-break/>This is also a session about the limits of the course itself. What has it not been able to address? What remains difficult? Honest accounting — not of failure but of scope.</text:p>
      <text:p text:style-name="Horizontal_20_Line"/>
      <text:h text:style-name="Heading_20_3" text:outline-level="3">Phase 4: Integration</text:h>
      <text:p text:style-name="Text_20_body"><text:span text:style-name="Emphasis">Session 14</text:span></text:p>
      <text:p text:style-name="Text_20_body"><text:span text:style-name="Strong_20_Emphasis">Session 14 — The Ongoing Practice</text:span></text:p>
      <text:p text:style-name="Text_20_body">Stocktaking. Interior Check logs reviewed — not as performance but as genuine record. What changed across the four capacities? What is more solid than it was? What is still fragile?</text:p>
      <text:p text:style-name="Text_20_body">Transition to ongoing practice group. This course probably has the longest tail of any of the five — the capacities being built here consolidate slowly, over months and years, through practice embedded in daily life and community membership.</text:p>
      <text:p text:style-name="Text_20_body">The ongoing group meets regularly. It is not a support group and not a therapy group. It is a community of practice in the same sense as Courses 1 and 2 — people who have made a commitment to developing these capacities and who hold each other to that commitment over time.</text:p>
      <text:p text:style-name="Text_20_body">New members join after completing the structured phase.</text:p>
      <text:p text:style-name="Horizontal_20_Line"/>
      <text:h text:style-name="Heading_20_3" text:outline-level="3">Ongoing Practice Group</text:h>
      <text:p text:style-name="Text_20_body"><text:span text:style-name="Emphasis">No terminus</text:span></text:p>
      <text:p text:style-name="Text_20_body">The four practices continue:</text:p>
      <text:p text:style-name="Text_20_body">Daily solitude — duration and depth increasing over time. Interior Check — increasingly precise emotional vocabulary. The practice of staying — with difficulty, with discomfort, with ambiguity. Acting from the inside — one thing per week from genuine value rather than anticipated reception.</text:p>
      <text:p text:style-name="Text_20_body">The group meets to report honestly, to examine what's working and what isn't, and to support each other in continuing. Over time the group becomes something the Working Society depends on — a body of members who can be genuinely present, genuinely honest, and genuinely stable under pressure. That <text:soft-page-break/>is not a private achievement. That is what the community needs to function at its best.</text:p>
      <text:p text:style-name="Horizontal_20_Line"/>
      <text:h text:style-name="Heading_20_3" text:outline-level="3">Running Themes Throughout</text:h>
      <text:p text:style-name="Text_20_body"><text:span text:style-name="Strong_20_Emphasis">Practice not excavation.</text:span> The course works with present-tense experience and present-tense practice. It does not require or encourage historical excavation of the origins of damage. That is therapy's work, not this course's.</text:p>
      <text:p text:style-name="Text_20_body"><text:span text:style-name="Strong_20_Emphasis">Interior not performance.</text:span> The distinction between the experiencing self and the performing self is named regularly and the course consistently works toward the former.</text:p>
      <text:p text:style-name="Text_20_body"><text:span text:style-name="Strong_20_Emphasis">Collective not individual.</text:span> These capacities are built in community. The group is not incidental — it is the condition. A person cannot develop identity independent of validation while being validated by the group for developing it. The guide holds that tension carefully.</text:p>
      <text:p text:style-name="Text_20_body"><text:span text:style-name="Strong_20_Emphasis">Present not fixed.</text:span> The goal is not a finished stable self — a completed project. It is a developing practice of stability that deepens over time and that the community sustains.</text:p>
      <text:p text:style-name="Horizontal_20_Line"/>
      <text:h text:style-name="Heading_20_3" text:outline-level="3">What Success Looks Like</text:h>
      <text:p text:style-name="Text_20_body">A member who completes the structured phase and continues the practice group should be able to:</text:p>
      <text:p text:style-name="Text_20_body">Be alone without significant anxiety. Know with reasonable precision what they are feeling at any given moment. Stay with difficulty — emotional, relational, circumstantial — without immediately fleeing into distraction. Act from their own values in a social context without needing the response to confirm the value of the action. Recover from setback without permanent destabilization. Offer their genuine perception in a group setting without performing it or suppressing it. Recognize when they are acting from reception-dependence and have a practice for returning to their own ground.</text:p>
      <text:p text:style-name="Text_20_body">These are not extraordinary psychological achievements. They are what a functioning interior life looks like. The attention economy made them rare. This <text:soft-page-break/>course is about making them ordinary again — first in individuals, then in the community those individuals build together.</text:p>
      <text:p text:style-name="P16"><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M FELL English SC" svg:font-family="'IM FELL English SC'" style:font-pitch="variable"/>
    <style:font-face style:name="IM FELL English SC1" svg:font-family="'IM FELL English SC'" style:font-adornments="Bold" style:font-pitch="variable"/>
    <style:font-face style:name="IM FELL English SC2" svg:font-family="'IM FELL English SC'"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re Baskerville" svg:font-family="'Libre Baskerville'" style:font-adornments="Regular"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indent="0.2in" style:auto-text-indent="false"/>
      <style:text-properties style:font-name="Libre Baskerville" fo:font-family="'Libre Baskerville'" style:font-style-name="Regular" style:font-pitch="variable" fo:font-size="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IM FELL English SC1" fo:font-family="'IM FELL English SC'" style:font-style-name="Bold" style:font-pitch="variable" fo:font-size="16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IM FELL English SC1" fo:font-family="'IM FELL English SC'" style:font-style-name="Bold" style:font-pitch="variable" fo:font-size="11pt" fo:font-weight="normal" style:font-size-asian="16pt" style:font-weight-asian="bold" style:font-size-complex="16pt" style:font-weight-complex="bold"/>
    </style:style>
    <style:style style:name="Title" style:family="paragraph" style:parent-style-name="Heading" style:next-style-name="Text_20_body" style:class="chapter">
      <style:paragraph-properties fo:margin-top="0.1701in" fo:margin-bottom="0.1799in" style:contextual-spacing="false" fo:text-align="center" style:justify-single-word="false"/>
      <style:text-properties style:font-name="IM FELL English SC2" fo:font-family="'IM FELL English SC'" style:font-style-name="Regular" style:font-pitch="variable" fo:font-size="22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IM FELL English SC2" fo:font-family="'IM FELL English SC'" style:font-style-name="Regular" style:font-pitch="variable" fo:font-size="13pt" style:font-size-asian="18pt" style:font-size-complex="18pt"/>
    </style:style>
    <style:style style:name="First_20_Paragraph" style:display-name="First Paragraph" style:family="paragraph" style:parent-style-name="Standard" style:master-page-name="">
      <style:paragraph-properties fo:text-indent="0in" style:auto-text-indent="false" style:page-number="auto"/>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fo:padding="0.0201in" fo:border-left="none" fo:border-right="none" fo:border-top="none" fo:border-bottom="0.06pt solid #000000"/>
      <style:text-properties fo:color="#1e3a5f" loext:opacity="100%" officeooo:rsid="00207e9d" officeooo:paragraph-rsid="00207e9d"/>
    </style:style>
    <style:page-layout style:name="Mpm1">
      <style:page-layout-properties fo:page-width="8.5in" fo:page-height="11in" style:num-format="1" style:print-orientation="portrait" fo:margin-top="1.25in" fo:margin-bottom="1.25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he Resolute Societies of America</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08T13:48:24.763225727</meta:creation-date>
    <dc:date>2026-06-09T19:20:48.316681363</dc:date>
    <meta:editing-duration>PT8H16M3S</meta:editing-duration>
    <meta:editing-cycles>31</meta:editing-cycles>
    <meta:generator>LibreOffice/24.2.7.2$Linux_X86_64 LibreOffice_project/420$Build-2</meta:generator>
    <meta:document-statistic meta:table-count="0" meta:image-count="0" meta:object-count="0" meta:page-count="14" meta:paragraph-count="132" meta:word-count="4038" meta:character-count="25661" meta:non-whitespace-character-count="21666"/>
  </office:meta>
</office:document-meta>
</file>