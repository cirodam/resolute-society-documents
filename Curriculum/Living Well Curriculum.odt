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59be53" officeooo:paragraph-rsid="0059be53"/>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2">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style:style style:name="T19" style:family="text">
      <style:text-properties officeooo:rsid="00541d4b"/>
    </style:style>
    <style:style style:name="T20" style:family="text">
      <style:text-properties officeooo:rsid="005801d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Living Well</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2"><text:span text:style-name="Strong_20_Emphasis">Course 6: Orientation</text:span></text:h>
      <text:h text:style-name="Heading_20_3" text:outline-level="3">A Working Society Course in Living Well in Difficult Times</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2 sessions, then ongoing practice woven into community life <text:span text:style-name="Strong_20_Emphasis">Setting:</text:span> In person, no devices in the room <text:span text:style-name="Strong_20_Emphasis">Prerequisites:</text:span> None formally. But this course lands differently for members who have done some work in Courses 1 and 5 — the attentional capacity and interior stability those courses build make the harder sessions of this one more navigable.</text:p>
      <text:p text:style-name="Horizontal_20_Line"/>
      <text:h text:style-name="Heading_20_3" text:outline-level="3">What This Course Is</text:h>
      <text:p text:style-name="Text_20_body">An honest examination of the world as it actually is, followed by a sustained practice of finding stable ground inside that honesty. Not therapy. Not activism. Not prepping. Not doom.</text:p>
      <text:p text:style-name="Text_20_body">The two failure modes this course is designed to move people out of: managed unawareness — the various ways people avoid looking clearly at what <text:soft-page-break/>is happening — and clear-eyed paralysis — looking honestly and finding nothing to stand on. The course moves toward a third thing that is harder to name but recognizable when you encounter it: the capacity to see clearly, grieve honestly, and act with purpose, without requiring the situation to be better than it is before doing any of those things.</text:p>
      <text:p text:style-name="Text_20_body">The Working Society already has an implicit answer to the question this course asks — the Craft Commons, the mutual aid infrastructure, the kin system, the governance structures are all answers to how to live well when external systems are failing. This course makes that answer explicit and gives members the interior framework to inhabit it.</text:p>
      <text:p text:style-name="Horizontal_20_Line"/>
      <text:h text:style-name="Heading_20_3" text:outline-level="3">The Guide's Character Requirement</text:h>
      <text:p text:style-name="Text_20_body">This course requires a guide who has genuinely done this work. Not read about it — done it. Someone who has looked at the situation clearly, gone through their own version of what the course asks members to go through, and found a way to stand steadily inside difficult reality.</text:p>
      <text:p text:style-name="Text_20_body">That is not a credential. It is a character requirement. A guide who is themselves in managed unawareness will unconsciously steer the course away from the harder sessions. A guide who is in clear-eyed paralysis will make the course heavier than it needs to be. The course needs someone who can hold the weight without being crushed by it and without pretending it isn't there.</text:p>
      <text:p text:style-name="Text_20_body">The guide should be honest with the group about their own relationship to this material. Not as disclosure for its own sake — as modeling. This is what it looks like to have gone through this and come out the other side with something to stand on.</text:p>
      <text:p text:style-name="Horizontal_20_Line"/>
      <text:h text:style-name="Heading_20_3" text:outline-level="3">A Note on Truth-Telling</text:h>
      <text:p text:style-name="Text_20_body">This course makes claims about the state of the world. Those claims must be honest — calibrated, evidence-based, neither catastrophizing nor minimizing. The guide is not a prophet. The course does not traffic in certainty about outcomes. What it offers is a clear-eyed account of what is actually happening, what the realistic range of futures looks like, and what that means for how to live.</text:p>
      <text:p text:style-name="Text_20_body"><text:soft-page-break/>When members push toward either extreme — everything is fine, or everything is lost — the guide holds the middle with honesty and steadiness. Not false balance. Calibrated uncertainty. Here is what we know. Here is what we don't. Here is what that means for how we orient.</text:p>
      <text:p text:style-name="Horizontal_20_Line"/>
      <text:h text:style-name="Heading_20_3" text:outline-level="3">Phase 1: Seeing Clearly</text:h>
      <text:p text:style-name="Text_20_body"><text:span text:style-name="Emphasis">Sessions 1–5</text:span> <text:span text:style-name="Emphasis">Goal: Build a shared honest account of the situation — what is actually happening, what it means, and what has been lost</text:span></text:p>
      <text:p text:style-name="Text_20_body"><text:span text:style-name="Strong_20_Emphasis">Session 1 — What We're Not Saying</text:span></text:p>
      <text:p text:style-name="Text_20_body">The course opens not with the situation but with the avoidance of the situation. Before looking clearly, the group examines how they have been not looking.</text:p>
      <text:p text:style-name="Text_20_body">The managed unawareness that most people are living in is not stupidity or weakness. It is a rational response to information that is genuinely hard to hold. The mind protects itself. The culture provides tools for not looking — busyness, entertainment, the perpetual present of social media, the assumption that someone is handling it, the belief that things have always worked out before.</text:p>
      <text:p text:style-name="Text_20_body">Opening question — not asked rhetorically but genuinely, with time to sit with it: what do you know but try not to think about?</text:p>
      <text:p text:style-name="Text_20_body">The guide goes first. Models honest answer. Makes it safe for others to follow.</text:p>
      <text:p text:style-name="Text_20_body">The session doesn't push anyone to disclose more than they're ready to. It establishes that this course is a place where the things usually not said can be said. That is itself rare and valuable.</text:p>
      <text:p text:style-name="Text_20_body">No concepts introduced. No framework. Just the opening of the space.</text:p>
      <text:p text:style-name="Text_20_body">Practice: between sessions, notice once per day when you are actively not thinking about something. Not to force yourself to think about it — just to notice the avoidance. Write it down.</text:p>
      <text:p text:style-name="Text_20_body"><text:span text:style-name="Strong_20_Emphasis">Session 2 — The Actual Situation</text:span></text:p>
      <text:p text:style-name="Text_20_body">The course's most factual session. An honest account of what is actually happening — not as a news summary but as a structured picture of the converging pressures that constitute the current moment.</text:p>
      <text:p text:style-name="Text_20_body"><text:soft-page-break/>The guide presents this in the Working Society's register: quiet, factual, neither urgent nor minimizing. The goal is not to frighten but to give the group a shared accurate picture to orient from.</text:p>
      <text:p text:style-name="Text_20_body">The domains covered — not exhaustively but honestly:</text:p>
      <text:p text:style-name="Text_20_body"><text:span text:style-name="Emphasis">Institutional capacity</text:span> — the long decline in the functional capacity of the institutions Americans depend on. Not a partisan claim — a structural one. The hollowing of public health infrastructure, the fragility of supply chains demonstrated repeatedly, the declining trust in and capacity of government at multiple levels, the financialization of systems that were not designed to be financial instruments.</text:p>
      <text:p text:style-name="Text_20_body"><text:span text:style-name="Emphasis">Economic trajectory</text:span> — the specific ways the economy that most members grew up expecting has changed and is changing. The labor market restructuring. The cost of housing, healthcare, and education relative to wages. The debt loads. The ways that the path their parents walked is no longer navigable in the same way.</text:p>
      <text:p text:style-name="Text_20_body"><text:span text:style-name="Emphasis">Ecological conditions</text:span> — not as ideology but as physical reality. What is actually happening to weather patterns, to agricultural systems, to water availability in various regions. The specific implications for Georgia and the Southeast — heat, drought patterns, agricultural stress, the compounding of existing vulnerabilities.</text:p>
      <text:p text:style-name="Text_20_body"><text:span text:style-name="Emphasis">Social fabric</text:span> — the documented decline in associational life, in social trust, in the density of community relationships that historically provided resilience during hard times. The atomization that the Working Society exists explicitly to address.</text:p>
      <text:p text:style-name="Text_20_body">The framing throughout: these are not reasons for despair. They are the terrain. You cannot orient in terrain you haven't looked at.</text:p>
      <text:p text:style-name="Text_20_body">Discussion: what in this picture was known but unspoken? What was genuinely new? What feels most significant?</text:p>
      <text:p text:style-name="Text_20_body">Practice: identify one domain from this session where your understanding was vague before. Find one substantive thing to read about it this week — not a news article but something with more depth.</text:p>
      <text:p text:style-name="Text_20_body"><text:span text:style-name="Strong_20_Emphasis">Session 3 — What Was, What Is, What May Be</text:span></text:p>
      <text:p text:style-name="Text_20_body">The session works with three time horizons that the current moment requires holding simultaneously.</text:p>
      <text:p text:style-name="Text_20_body"><text:soft-page-break/><text:span text:style-name="Emphasis">What was</text:span> — the world that existed, or that people expected to exist, that is no longer available or no longer certain. The stable career. The affordable house. The reliable institution. The predictable future. These are real losses. The session names them as losses rather than as failures of individual ambition or adaptability. Something was promised that is not being delivered. That deserves to be named honestly.</text:p>
      <text:p text:style-name="Text_20_body"><text:span text:style-name="Emphasis">What is</text:span> — the actual present. Not worse than it is, not better. The specific texture of difficulty in this moment — what is actually hard, what is actually uncertain, what is actually still working, what is actually being built.</text:p>
      <text:p text:style-name="Text_20_body"><text:span text:style-name="Emphasis">What may be</text:span> — the range of realistic futures. Not prediction — range. Some futures are better than expected. Some are worse. The realistic range is wide and the honest answer to most specific questions about the future is genuine uncertainty. The course does not pretend otherwise.</text:p>
      <text:p text:style-name="Text_20_body">The skill being built: holding all three simultaneously without collapsing into nostalgia for what was, denial of what is, or false certainty about what will be.</text:p>
      <text:p text:style-name="Text_20_body">Concepts introduced: the difference between hope and optimism. Optimism is a belief that things will get better. Hope — in the sense Václav Havel used it — is something different. It is the orientation toward meaningful action regardless of whether the outcome is certain. You can act with hope without being optimistic. The Working Society is built on hope in this sense, not optimism.</text:p>
      <text:p text:style-name="Text_20_body">Group discussion: what have you already lost or let go of that you expected? What does it feel like to name that as a loss rather than a personal failure?</text:p>
      <text:p text:style-name="Text_20_body"><text:span text:style-name="Strong_20_Emphasis">Session 4 — Grief</text:span></text:p>
      <text:p text:style-name="Text_20_body">The most emotionally demanding session of the course. The guide should prepare for it, hold it carefully, and know the therapy boundary.</text:p>
      <text:p text:style-name="Text_20_body">The ecological grief literature — Joanna Macy's work especially — makes a claim that this session takes seriously: the grief that many people feel about the state of the world is real, legitimate, and needs to be honored rather than managed away. Treating it as a psychological problem to be solved, a mood to be improved, or a perspective to be corrected is a mistake. It is the appropriate response of someone who loves something that is being damaged.</text:p>
      <text:p text:style-name="Text_20_body">That grief has specific objects: the natural world in its abundance. The future that was expected. The institutions that were supposed to be trustworthy. The <text:soft-page-break/>communities that have dissolved. The sense of a livable world that many people absorbed in childhood and that is less certain now.</text:p>
      <text:p text:style-name="Text_20_body">Naming what you are grieving is not wallowing. It is honesty. And paradoxically, grief that is honored moves — it doesn't stay stuck in the same place the way grief that is suppressed or managed does.</text:p>
      <text:p text:style-name="Text_20_body">The session creates space for this grief to be named. Not performed, not processed in a clinical sense — named. The guide holds the space steadily. Whatever arises is legitimate.</text:p>
      <text:p text:style-name="Text_20_body">The therapy boundary: if what arises for a member is grief about specific personal loss rather than about the broader situation, the guide gently acknowledges it and notes that the course can point toward appropriate support. The session is not about personal grief history — it is about the shared grief of the present moment. Those can overlap and that's okay, but the distinction is worth holding.</text:p>
      <text:p text:style-name="Text_20_body">Practice: write about something you are grieving about the state of the world. Not for sharing necessarily — for yourself. Let it be honest.</text:p>
      <text:p text:style-name="Text_20_body"><text:span text:style-name="Strong_20_Emphasis">Session 5 — What Is Actually True</text:span></text:p>
      <text:p text:style-name="Text_20_body">The closing session of Phase 1. A stocktaking of what has been established.</text:p>
      <text:p text:style-name="Text_20_body">The session does two things. First, it completes the honest picture by naming what is also actually true alongside the difficulty — not as a corrective to the grief of Session 4 but as an addition to it. Both things are true simultaneously.</text:p>
      <text:p text:style-name="Text_20_body">What is also actually true: humans have navigated catastrophic difficulty before and built things worth having inside it. The capacity for community, for mutual aid, for meaning-making in hard circumstances, is as human as the capacity for avoidance and despair. The Working Society is real and being built. The skills being developed in this curriculum are real. The people in this room are real. These are not nothing.</text:p>
      <text:p text:style-name="Text_20_body">Second, the session introduces the pivot between Phase 1 and Phase 2. Seeing clearly is not the destination. It is the condition for what comes next. You cannot find stable ground in terrain you haven't looked at. Having looked — having named the situation, the losses, the grief, the uncertainty — the question becomes: what do you stand on?</text:p>
      <text:p text:style-name="Text_20_body">The guide asks it directly: given everything this phase has named, what do you stand on? What is the ground under your feet?</text:p>
      <text:p text:style-name="Text_20_body"><text:soft-page-break/>Let the group sit with it. Don't answer it for them. This question carries into Phase 2.</text:p>
      <text:p text:style-name="Horizontal_20_Line"/>
      <text:h text:style-name="Heading_20_3" text:outline-level="3">Phase 2: Standing Steadily</text:h>
      <text:p text:style-name="Text_20_body"><text:span text:style-name="Emphasis">Sessions 6–10</text:span> <text:span text:style-name="Emphasis">Goal: Build the interior and communal resources that make honest orientation sustainable</text:span></text:p>
      <text:p text:style-name="Text_20_body"><text:span text:style-name="Strong_20_Emphasis">Session 6 — The Dichotomy of Control</text:span></text:p>
      <text:p text:style-name="Text_20_body">The most practically useful philosophical framework for this moment. Not introduced as philosophy — introduced as a tool.</text:p>
      <text:p text:style-name="Text_20_body">The Stoic distinction: some things are in our power, some things are not. What is in our power: our own judgment, our own choices, our own effort, our own orientation. What is not in our power: outcomes, other people's choices, the trajectory of large systems, the weather, the economy, the behavior of institutions.</text:p>
      <text:p text:style-name="Text_20_body">The failure modes this distinction addresses: spending energy on what cannot be controlled — which produces anxiety, rage, and exhaustion without changing anything. And neglecting what can be controlled — which produces helplessness even where agency exists.</text:p>
      <text:p text:style-name="Text_20_body">This is not passivity. It is precision. A person who is clear about what they can and cannot affect puts their energy where it has purchase. A person who is unclear exhausts themselves on what they cannot change and neglects what they can.</text:p>
      <text:p text:style-name="Text_20_body">For the Working Society specifically: the organization cannot stop the trajectory of institutional failure, ecological degradation, or economic restructuring. It can build genuine community, develop real skills, create mutual aid infrastructure, and cultivate the capacities this curriculum addresses. That is not nothing. It is the precise domain of what is actually possible.</text:p>
      <text:p text:style-name="Text_20_body">Group activity: members map their current energy expenditure. What are you spending attention and effort on? Which of those things are actually in your power? Where is energy going that could be redirected?</text:p>
      <text:p text:style-name="Text_20_body">Practice: for one week, when you notice yourself in anxiety or rage about something — ask: is this in my power? If not, what in this situation actually is?</text:p>
      <text:p text:style-name="Text_20_body"><text:soft-page-break/><text:span text:style-name="Strong_20_Emphasis">Session 7 — Meaning</text:span></text:p>
      <text:p text:style-name="Text_20_body">Viktor Frankl's central claim, grounded in the most extreme circumstances imaginable: meaning is not found, it is made. And it can be made in any circumstances, including circumstances that cannot be improved.</text:p>
      <text:p text:style-name="Text_20_body">The three sources Frankl identified — not as a complete taxonomy but as a starting point: what you give to the world through your work and creative action. What you receive from the world through love, beauty, truth, and genuine relationship. And how you orient to suffering that cannot be avoided — the stance you take toward what you cannot change.</text:p>
      <text:p text:style-name="Text_20_body">The Working Society is a meaning-making structure. The work of building it, the relationships formed within it, the skills developed and shared, the community sustained — these are sources of meaning that do not depend on the external situation improving. The meaning is in the doing, not the outcome.</text:p>
      <text:p text:style-name="Text_20_body">This needs to be said carefully — not as a way of making the situation feel better than it is, but as a genuine account of how meaning works. Meaning doesn't require a good outcome. It requires genuine engagement with something that matters.</text:p>
      <text:p text:style-name="Text_20_body">Group discussion: what are the sources of meaning in your life that are not contingent on the situation improving? What would remain meaningful even if the situation got harder?</text:p>
      <text:p text:style-name="Text_20_body">Practice: identify one thing you do regularly that is meaningful regardless of outcome. Do it this week with explicit attention to the meaning rather than the result.</text:p>
      <text:p text:style-name="Text_20_body"><text:span text:style-name="Strong_20_Emphasis">Session 8 — Solidarity</text:span></text:p>
      <text:p text:style-name="Text_20_body">The weight of difficult reality is different when it is carried alone versus when it is carried together. Not lighter in a measurable sense — different in quality. The person who knows that others see what they see, feel what they feel, and are choosing to act anyway is in a fundamentally different psychological position than the person who carries this alone.</text:p>
      <text:p text:style-name="Text_20_body">This is the deepest argument for the Working Society's existence — not the practical infrastructure, though that matters, but the solidarity. The knowledge that you are not crazy for seeing what you see. That others have looked at the same terrain and made the same choice to build something real inside it. That the work you are doing is witnessed and shared.</text:p>
      <text:p text:style-name="Text_20_body"><text:soft-page-break/>The historical tradition this draws on: the mutual aid societies, the labor movement, the Grange, the civil rights movement, every community that has faced structural difficulty and chosen collective response over individual survival. The solidarity is not incidental to those movements — it is what made sustained action possible.</text:p>
      <text:p text:style-name="Text_20_body">Concepts introduced: the difference between solidarity and community in the shallow sense. Solidarity is not people who are nice to each other. It is people who have made a genuine commitment to each other's flourishing under difficult conditions. It requires honesty — you cannot have solidarity with people who are not seeing the same situation. It requires commitment — not feeling, but action sustained over time.</text:p>
      <text:p text:style-name="Text_20_body">Group activity: the guide asks members to name one way the community has already carried something they were carrying alone. What changed when it was shared?</text:p>
      <text:p text:style-name="Text_20_body"><text:span text:style-name="Strong_20_Emphasis">Session 9 — Acting Without Certainty</text:span></text:p>
      <text:p text:style-name="Text_20_body">The practical question this course has been building toward: how do you act with purpose when you cannot know the outcome?</text:p>
      <text:p text:style-name="Text_20_body">The conventional answer — wait until you're confident the outcome will be good — is not available here. The outcomes are genuinely uncertain. The situation is genuinely complex. Anyone who tells you they know how this ends is wrong.</text:p>
      <text:p text:style-name="Text_20_body">The working answer: you act from your values, in the domain of what you can actually affect, with the best understanding you have of the situation, knowing that the action itself has meaning regardless of outcome. This is not blind faith — it is the only rational response to genuine uncertainty combined with genuine stakes.</text:p>
      <text:p text:style-name="Text_20_body">The Working Society's founding posture is exactly this. The motto — the work shall not be lost — does not claim the work will succeed in any particular way. It claims the work matters regardless. That is an orientation to action under uncertainty. This session makes it explicit.</text:p>
      <text:p text:style-name="Text_20_body">Concepts introduced: the difference between acting from hope and acting from certainty. The role of small actions in large situations — not as naive belief that individual action changes everything, but as the maintenance of agency and meaning in circumstances where large-scale agency is limited. The importance <text:soft-page-break/>of the proximate — what is immediately in front of you, what you can affect today, what the person next to you needs.</text:p>
      <text:p text:style-name="Text_20_body">Group discussion: what is the action that is immediately available to you — not the action that would solve everything, but the one that is actually possible right now?</text:p>
      <text:p text:style-name="Text_20_body">Practice: do one thing this week that is in your power, aligned with your values, and does not depend on a particular outcome to be worthwhile.</text:p>
      <text:p text:style-name="Text_20_body"><text:span text:style-name="Strong_20_Emphasis">Session 10 — The Long View</text:span></text:p>
      <text:p text:style-name="Text_20_body">The session that provides the deepest stability — not because it makes the situation better but because it situates the present moment in a longer frame.</text:p>
      <text:p text:style-name="Text_20_body">Human beings have faced civilizational difficulty before. The fall of Rome was a catastrophe for the people living through it and also the condition from which medieval European civilization — with all its complexity and achievement — eventually emerged. The Depression was devastating and also produced the most robust mutual aid and collective infrastructure in American history. The Black Death killed a third of Europe and was followed by the Renaissance.</text:p>
      <text:p text:style-name="Text_20_body">This is not a claim that everything works out. It isn't a guarantee of a good outcome. It is the recognition that difficult transitions have been navigated before, that human beings have built things worth having inside them, and that the work of building — the Craft Commons, the kin system, the community, the skills — is continuous with a very long human tradition of doing exactly this.</text:p>
      <text:p text:style-name="Text_20_body">The Working Society's lineage — Franklin's Junto, the Grange, the fraternal mutual aid societies — is part of this tradition. The organization is not inventing something new. It is recovering something very old. That recovery has its own kind of meaning.</text:p>
      <text:p text:style-name="Text_20_body">Concepts introduced: the difference between the short view and the long view — not as a reason to be complacent about the present but as a source of orientation. People who have a long view are less destabilized by present difficulty because they can see it in context. The present moment is genuinely hard. It is also not the end of the story.</text:p>
      <text:p text:style-name="Text_20_body">Group discussion: what from the past gives you a sense of what human beings are capable of building inside difficult circumstances?</text:p>
      <text:p text:style-name="Horizontal_20_Line"/>
      <text:h text:style-name="Heading_20_3" text:outline-level="3"><text:soft-page-break/>Phase 3: Living the Orientation</text:h>
      <text:p text:style-name="Text_20_body"><text:span text:style-name="Emphasis">Sessions 11–12</text:span> <text:span text:style-name="Emphasis">Goal: Integration — making the orientation habitual rather than occasional</text:span></text:p>
      <text:p text:style-name="Text_20_body"><text:span text:style-name="Strong_20_Emphasis">Session 11 — When It Gets Heavy</text:span></text:p>
      <text:p text:style-name="Text_20_body">The course's honest acknowledgment that the orientation built in Phase 2 is not a permanent achievement. It requires maintenance. There will be sessions — days, weeks — when the weight returns, when the grief comes back, when the clarity feels like too much and the ground feels thin.</text:p>
      <text:p text:style-name="Text_20_body">This is not failure. It is the nature of the work. The question is not how to achieve permanent equanimity but how to return to stable ground when you've lost it.</text:p>
      <text:p text:style-name="Text_20_body">The session builds a shared account of what helps each member return. Not a formula — a personal repertoire. Solitude for some. Physical work for others. A conversation with someone who sees clearly. Reading that reminds you of the long view. The practices from Course 1 and Course 5. The community itself.</text:p>
      <text:p text:style-name="Text_20_body">The guide shares honestly what works for them. Models the normalcy of needing to return rather than having arrived.</text:p>
      <text:p text:style-name="Text_20_body">Group activity: each member identifies their three most reliable practices for returning to stable ground when they've lost it. Shares them. The group receives them as information — not advice, not correction.</text:p>
      <text:p text:style-name="Text_20_body"><text:span text:style-name="Strong_20_Emphasis">Session 12 — The Ongoing Orientation</text:span></text:p>
      <text:p text:style-name="Text_20_body">Transition to ongoing practice woven into community life.</text:p>
      <text:p text:style-name="Text_20_body">Unlike the cognitive courses, this one doesn't continue as a separate practice group in the same form. It continues as the quality of orientation in everything the Working Society does. It lives in how the community talks about the situation — honestly, without catastrophizing, without minimizing. It lives in the sessions of other courses where the weight of the present moment becomes relevant. It lives in the mutual aid that makes solidarity real rather than rhetorical.</text:p>
      <text:p text:style-name="Text_20_body">The guide closes with the question the course opened with — what do you stand on? — and lets the group answer it now, at the end, with what the course has built.</text:p>
      <text:p text:style-name="Text_20_body"><text:soft-page-break/>The answers will be different than they would have been in Session 1. That difference is what the course produces.</text:p>
      <text:p text:style-name="Horizontal_20_Line"/>
      <text:h text:style-name="Heading_20_3" text:outline-level="3">Ongoing Practice</text:h>
      <text:p text:style-name="Text_20_body"><text:span text:style-name="Emphasis">No terminus — woven into community life</text:span></text:p>
      <text:p text:style-name="Text_20_body">The Working Society chapter returns to this material periodically — not as a course but as a community reckoning. When the situation changes significantly. When members are struggling with the weight. When new members join who haven't done this work. The guide convenes the group, the conversation continues, the orientation is renewed.</text:p>
      <text:p text:style-name="Text_20_body">This is not a one-time achievement. It is a practice of continuously finding the ground under your feet as the terrain shifts.</text:p>
      <text:p text:style-name="Horizontal_20_Line"/>
      <text:h text:style-name="Heading_20_3" text:outline-level="3">Running Themes Throughout</text:h>
      <text:p text:style-name="Text_20_body"><text:span text:style-name="Strong_20_Emphasis">Honest not alarming.</text:span> The course looks clearly at difficult reality without catastrophizing it. The guide models calibrated honesty throughout.</text:p>
      <text:p text:style-name="Text_20_body"><text:span text:style-name="Strong_20_Emphasis">Grief not despair.</text:span> Grief is the appropriate response to genuine loss. Despair is the conclusion that nothing can be done. The course honors the first and resists the second — not by argument but by example.</text:p>
      <text:p text:style-name="Text_20_body"><text:span text:style-name="Strong_20_Emphasis">Collective not individual.</text:span> The weight is different when carried together. The course is itself a demonstration of this — six people looking at the same difficult terrain and choosing to act anyway.</text:p>
      <text:p text:style-name="Text_20_body"><text:span text:style-name="Strong_20_Emphasis">Action not outcome.</text:span> The course consistently returns to what is in members' power, what action is available, what meaning exists in the doing regardless of the result.</text:p>
      <text:p text:style-name="Text_20_body"><text:span text:style-name="Strong_20_Emphasis">Long view not short.</text:span> The present moment is situated in a longer frame — the human tradition of building inside difficulty — without using that frame to minimize what is actually hard right now.</text:p>
      <text:p text:style-name="Horizontal_20_Line"/>
      <text:h text:style-name="Heading_20_3" text:outline-level="3"><text:soft-page-break/>What This Course Produces</text:h>
      <text:p text:style-name="Text_20_body">A member who completes the structured phase should be able to:</text:p>
      <text:p text:style-name="Text_20_body">Name what they know but usually try not to think about. Look at the actual situation — economically, ecologically, institutionally — with honest calibrated clarity rather than denial or catastrophizing. Grieve what has been lost without being consumed by grief. Distinguish what is in their power from what is not, and put their energy accordingly. Act with purpose under genuine uncertainty. Find meaning in the work regardless of whether the outcome is certain. Carry the weight in community rather than alone. Return to stable ground when they've lost it — and know what helps them do that.</text:p>
      <text:p text:style-name="Text_20_body">None of this makes the situation easier. It makes the person more capable of living well inside it. That is what orientation means. Not a better map of a friendlier terrain. An honest map of the actual terrain, and the capacity to move through it with purpose.</text:p>
      <text:p text:style-name="Horizontal_20_Line"/>
      <text:h text:style-name="Heading_20_3" text:outline-level="3">The Full Curriculum — Complete</text:h>
      <text:p text:style-name="Text_20_body"><text:span text:style-name="Strong_20_Emphasis">Basic Skills</text:span></text:p>
      <text:list text:style-name="L2">
        <text:list-item>
          <text:p text:style-name="P20">Literacy </text:p>
        </text:list-item>
        <text:list-item>
          <text:p text:style-name="P19">Numeracy</text:p>
        </text:list-item>
      </text:list>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52:12.193334676</dc:date>
    <meta:editing-duration>PT8H47M25S</meta:editing-duration>
    <meta:editing-cycles>34</meta:editing-cycles>
    <meta:generator>LibreOffice/24.2.7.2$Linux_X86_64 LibreOffice_project/420$Build-2</meta:generator>
    <meta:document-statistic meta:table-count="0" meta:image-count="0" meta:object-count="0" meta:page-count="13" meta:paragraph-count="132" meta:word-count="4074" meta:character-count="25016" meta:non-whitespace-character-count="20979"/>
  </office:meta>
</office:document-meta>
</file>