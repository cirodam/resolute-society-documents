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style style:name="P2" style:family="paragraph" style:parent-style-name="Standard">
      <style:paragraph-properties fo:margin-left="0in" fo:margin-right="0in" style:line-height-at-least="0.198in" fo:text-indent="0in" style:auto-text-indent="false"/>
      <style:text-properties fo:color="#111111" loext:opacity="100%" style:font-name="IM FELL English SC" fo:font-size="10.5pt" fo:font-weight="bold" officeooo:paragraph-rsid="001f52f8" fo:background-color="transparent"/>
    </style:style>
    <style:style style:name="P3" style:family="paragraph" style:parent-style-name="First_20_Paragraph">
      <style:text-properties fo:color="#2c2c2c" loext:opacity="100%"/>
    </style:style>
    <style:style style:name="P4" style:family="paragraph" style:parent-style-name="Standard">
      <style:paragraph-properties style:line-height-at-least="0.198in"/>
      <style:text-properties fo:color="#2c2c2c" loext:opacity="100%" style:font-name="IM FELL English SC" fo:font-size="10.5pt" fo:font-weight="bold" fo:background-color="transparent"/>
    </style:style>
    <style:style style:name="P5" style:family="paragraph" style:parent-style-name="Standard">
      <style:paragraph-properties style:line-height-at-least="0.198in"/>
      <style:text-properties fo:color="#2c2c2c" loext:opacity="100%" style:font-name="IM FELL English SC" fo:background-color="transparent"/>
    </style:style>
    <style:style style:name="P6" style:family="paragraph" style:parent-style-name="Title">
      <style:text-properties fo:color="#1e3a5f" loext:opacity="100%" officeooo:rsid="003d30fb" officeooo:paragraph-rsid="003d30fb"/>
    </style:style>
    <style:style style:name="P7" style:family="paragraph" style:parent-style-name="Subtitle">
      <style:text-properties fo:color="#1e3a5f" loext:opacity="100%" officeooo:rsid="003d30fb" officeooo:paragraph-rsid="003d30fb"/>
    </style:style>
    <style:style style:name="P8" style:family="paragraph" style:parent-style-name="First_20_Paragraph">
      <style:text-properties fo:color="#2c2c2c" loext:opacity="100%"/>
    </style:style>
    <style:style style:name="P9" style:family="paragraph" style:parent-style-name="First_20_Paragraph">
      <style:text-properties fo:color="#2c2c2c" loext:opacity="100%" officeooo:rsid="003d30fb" officeooo:paragraph-rsid="003d30fb"/>
    </style:style>
    <style:style style:name="P10" style:family="paragraph" style:parent-style-name="First_20_Paragraph">
      <style:text-properties fo:color="#2c2c2c" loext:opacity="100%" officeooo:rsid="00413ae4" officeooo:paragraph-rsid="00413ae4"/>
    </style:style>
    <style:style style:name="P11" style:family="paragraph" style:parent-style-name="First_20_Paragraph">
      <style:text-properties officeooo:paragraph-rsid="003d30fb"/>
    </style:style>
    <style:style style:name="P12" style:family="paragraph" style:parent-style-name="Heading_20_1">
      <style:text-properties fo:color="#1e3a5f" loext:opacity="100%" officeooo:rsid="003d30fb" officeooo:paragraph-rsid="003d30fb"/>
    </style:style>
    <style:style style:name="P13" style:family="paragraph" style:parent-style-name="Heading_20_1">
      <style:text-properties fo:color="#1e3a5f" loext:opacity="100%" officeooo:paragraph-rsid="003d30fb"/>
    </style:style>
    <style:style style:name="P14" style:family="paragraph" style:parent-style-name="Heading_20_2">
      <style:text-properties fo:color="#1e3a5f" loext:opacity="100%" officeooo:rsid="003d30fb" officeooo:paragraph-rsid="003d30fb"/>
    </style:style>
    <style:style style:name="P15" style:family="paragraph" style:parent-style-name="Heading_20_2">
      <style:text-properties fo:color="#1e3a5f" loext:opacity="100%" officeooo:rsid="003fdda5" officeooo:paragraph-rsid="003fdda5"/>
    </style:style>
    <style:style style:name="P16" style:family="paragraph" style:parent-style-name="Heading_20_2">
      <style:text-properties officeooo:paragraph-rsid="003d30fb"/>
    </style:style>
    <style:style style:name="P17" style:family="paragraph" style:parent-style-name="Text_20_body">
      <style:text-properties officeooo:paragraph-rsid="003d30fb"/>
    </style:style>
    <style:style style:name="P18" style:family="paragraph" style:parent-style-name="Text_20_body">
      <style:text-properties fo:color="#2c2c2c" loext:opacity="100%"/>
    </style:style>
    <style:style style:name="P19" style:family="paragraph" style:parent-style-name="Text_20_body">
      <style:text-properties fo:color="#2c2c2c" loext:opacity="100%" officeooo:rsid="003d30fb" officeooo:paragraph-rsid="003d30fb"/>
    </style:style>
    <style:style style:name="P20" style:family="paragraph" style:parent-style-name="Text_20_body">
      <style:text-properties fo:color="#2c2c2c" loext:opacity="100%" officeooo:rsid="00413ae4" officeooo:paragraph-rsid="00413ae4"/>
    </style:style>
    <style:style style:name="T1" style:family="text">
      <style:text-properties officeooo:rsid="0026ccf4"/>
    </style:style>
    <style:style style:name="T2" style:family="text">
      <style:text-properties fo:color="#2c2c2c" loext:opacity="100%" officeooo:rsid="003d30fb"/>
    </style:style>
    <style:style style:name="T3" style:family="text">
      <style:text-properties officeooo:rsid="003d30fb"/>
    </style:style>
    <style:style style:name="T4" style:family="text">
      <style:text-properties fo:color="#1e3a5f" loext:opacity="100%" officeooo:rsid="003d30fb"/>
    </style:style>
    <style:style style:name="T5" style:family="text">
      <style:text-properties fo:color="#1e3a5f" loext:opacity="100%" fo:font-weight="normal" officeooo:rsid="003d30fb" style:font-weight-asian="normal" style:font-weight-complex="normal"/>
    </style:style>
    <style:style style:name="T6" style:family="text">
      <style:text-properties fo:color="#1e3a5f" loext:opacity="100%" officeooo:rsid="003fdda5"/>
    </style:style>
    <style:style style:name="T7" style:family="text">
      <style:text-properties fo:font-weight="normal" style:font-weight-asian="normal" style:font-weight-complex="normal"/>
    </style:style>
    <style:style style:name="T8" style:family="text">
      <style:text-properties officeooo:rsid="00413ae4"/>
    </style:style>
    <style:style style:name="T9" style:family="text">
      <style:text-properties officeooo:rsid="00422a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Community Health Worker</text:p>
      <text:p text:style-name="P7">Course Curriculum</text:p>
      <text:p text:style-name="P4"/>
      <text:p text:style-name="P5"/>
      <text:h text:style-name="P12" text:outline-level="1">Purpose</text:h>
      <text:p text:style-name="P5"/>
      <text:p text:style-name="P3">There are moments in history that test the character of a nation, that demand more than ordinary times prepare <text:span text:style-name="T1">any person</text:span> for. We believe we are living in such a moment. We do not take that lightly. We resolve to meet it together.</text:p>
      <text:p text:style-name="P5"/>
      <text:h text:style-name="P13" text:outline-level="1"><text:span text:style-name="T3">Curriculum</text:span></text:h>
      <text:h text:style-name="P15" text:outline-level="2">0. Why This Exists</text:h>
      <text:p text:style-name="Standard">Short. Maybe the most important thing in the whole document. Sets the tone for everything that follows. Makes clear that this is an act of educational justice rather than a training program.</text:p>
      <text:h text:style-name="P14" text:outline-level="2">1. The Role And Its Limits</text:h>
      <text:p text:style-name="Standard">You are a trusted person who has chosen to carry more knowledge than the average member so that you can be useful when something is wrong. You are not a doctor. You are not a nurse. You are not a diagnosis machine or a treatment provider. You are the person who notices, who stays, who helps the person in front of you understand what's happening and take the next right step.</text:p>
      <text:p text:style-name="Standard">You will encounter things beyond what this training prepares you for. Knowing where your knowledge ends is as important as knowing what it contains. A CHW who recognizes the boundary and escalates appropriately saves lives. A CHW who doesn't recognize the boundary and acts beyond their competence causes harm.</text:p>
      <text:p text:style-name="Standard">The practical limits that matter most — you cannot diagnose, you cannot prescribe, you cannot treat in the clinical sense. You can observe, assess, educate, support, refer, and follow up. Within those functions you have enormous latitude and enormous value.</text:p>
      <text:h text:style-name="P16" text:outline-level="2"><text:soft-page-break/><text:span text:style-name="T4">2. </text:span><text:span text:style-name="Strong_20_Emphasis"><text:span text:style-name="T5">The Body as a System</text:span></text:span></text:h>
      <text:p text:style-name="P18"><text:span text:style-name="Strong_20_Emphasis">Cardiovascular</text:span></text:p>
      <text:p text:style-name="Text_20_body">Start with the problem the system solves. Every cell in the body needs oxygen and fuel delivered continuously and waste removed continuously. The body is too large for diffusion to handle this. It needs a delivery and collection system that reaches every cell.</text:p>
      <text:p text:style-name="Text_20_body">The heart as pump. Not the technical description first — the functional description. A fist-sized muscle that contracts roughly 100,000 times a day, every day, without rest, for a lifetime. The chambers — not as an anatomy diagram but as a logical structure. Right side receives depleted blood and sends it to the lungs. Left side receives oxygenated blood from the lungs and sends it to the body. Two pumps in one organ, synchronized.</text:p>
      <text:p text:style-name="Text_20_body">The circulation as a closed loop. Arteries carrying oxygenated blood away from the heart under pressure. Capillaries — so small a red blood cell has to squeeze through single file — where the actual exchange happens. Veins carrying depleted blood back at low pressure.</text:p>
      <text:p text:style-name="Text_20_body">Blood pressure as a consequence of this system. The pressure generated by the pump pushing against the resistance of the vessels. Systolic — the pressure when the heart contracts. Diastolic — the pressure when it rests between beats. What these numbers actually mean and why they matter.</text:p>
      <text:p text:style-name="Text_20_body">The electrical system that coordinates the heartbeat. The SA node as the natural pacemaker. What an irregular rhythm feels like from the outside and what it might mean. What the pulse tells you beyond just the rate.</text:p>
      <text:p text:style-name="Text_20_body">The coronary arteries — the heart's own blood supply, separate from the blood flowing through its chambers. Why this matters for heart attack. The particular vulnerability of the heart muscle to its own supply being interrupted.</text:p>
      <text:p text:style-name="Text_20_body"><text:span text:style-name="Strong_20_Emphasis">Respiratory</text:span></text:p>
      <text:p text:style-name="Text_20_body">The problem — cells need oxygen and produce carbon dioxide continuously. The body needs a mechanism for exchanging gases with the external environment.</text:p>
      <text:p text:style-name="Text_20_body">The mechanics of breathing. Not just the lungs but the whole apparatus — the diaphragm as the primary muscle, the rib cage expanding and contracting, the negative pressure that draws air in. Why breathing is mostly passive on the inhale and entirely passive on the exhale at rest. What changes with exertion.</text:p>
      <text:p text:style-name="Text_20_body"><text:soft-page-break/>The airways as a branching tree. Trachea dividing into bronchi dividing into bronchioles dividing into alveoli. The extraordinary surface area of the lungs — the size of a tennis court folded into the chest. Why surface area matters for gas exchange.</text:p>
      <text:p text:style-name="Text_20_body">The alveolus as the functional unit. The incredibly thin membrane across which oxygen moves into the blood and carbon dioxide moves out. The capillary network wrapped around each alveolus. How this exchange actually happens — partial pressure gradients, not pumping.</text:p>
      <text:p text:style-name="Text_20_body">The protective mechanisms. Cilia sweeping debris upward. Mucus trapping particles. The cough reflex. The sneeze. What happens when these mechanisms are overwhelmed or damaged.</text:p>
      <text:p text:style-name="Text_20_body">Breathing rate and depth as clinical information. What changes in respiratory rate tell you. What labored breathing looks like and what it might mean. The difference between the breathing rate you count and the quality of breathing you observe.</text:p>
      <text:p text:style-name="Text_20_body"><text:span text:style-name="Strong_20_Emphasis">Renal</text:span></text:p>
      <text:p text:style-name="Text_20_body">The problem — metabolism continuously produces waste products that are toxic in concentration. The body needs to remove them while conserving useful substances and maintaining precise chemical balance.</text:p>
      <text:p text:style-name="Text_20_body">The kidney as an extraordinarily sophisticated filter. Not a simple sieve — a system that actively reabsorbs what the body needs while allowing waste to pass. The nephron as the functional unit. The glomerulus filtering large volumes of blood. The tubule selectively reabsorbing glucose, water, electrolytes.</text:p>
      <text:p text:style-name="Text_20_body">The scale of what the kidneys do. They filter the entire blood volume roughly every 30 minutes. They produce about 180 liters of filtrate per day and reabsorb all but about 1.5 liters. That ratio — the precision of it — is what maintains stable blood chemistry.</text:p>
      <text:p text:style-name="Text_20_body">Urine as information. Color, volume, frequency, odor — all clinically meaningful. What dark urine means. What absence of urination means. What blood in urine means.</text:p>
      <text:p text:style-name="Text_20_body">The relationship between the kidneys and blood pressure. The kidney regulates blood pressure through the renin-angiotensin system. High blood pressure damages kidneys. Damaged kidneys raise blood pressure. The feedback loop that makes hypertension and chronic kidney disease so intertwined.</text:p>
      <text:p text:style-name="Text_20_body"><text:soft-page-break/>Electrolytes — sodium, potassium, calcium, phosphorus — and why their precise balance matters. What happens when it's disrupted. Why this matters for understanding medications and dietary advice.</text:p>
      <text:p text:style-name="Text_20_body"><text:span text:style-name="Strong_20_Emphasis">Endocrine</text:span></text:p>
      <text:p text:style-name="Text_20_body">The problem — the body needs a system for coordinating functions across distant organs and tissues over longer time scales than the nervous system handles.</text:p>
      <text:p text:style-name="Text_20_body">Hormones as chemical messengers. Not drugs introduced from outside but the body's own signaling molecules. The concept of a hormone traveling through the bloodstream to a distant target organ and producing a specific response.</text:p>
      <text:p text:style-name="Text_20_body">The major players and what they do. The pancreas producing insulin and glucagon to regulate blood glucose — explain this mechanism fully because it's the foundation of understanding diabetes. The thyroid regulating metabolic rate. The adrenal glands producing cortisol and adrenaline — the stress response hormones that become so important in the social determinants module. The sex hormones and their effects beyond reproduction. Growth hormone.</text:p>
      <text:p text:style-name="Text_20_body">The feedback loop concept. Most hormonal systems operate through negative feedback — the hormone's own effect suppresses further production. This is the mechanism of homeostasis in the endocrine system and understanding it makes the pathology of endocrine disorders immediately comprehensible.</text:p>
      <text:p text:style-name="Text_20_body">Insulin resistance as a concept worth explaining in full here rather than waiting for module 3. It's the central mechanism of Type 2 diabetes and it's more comprehensible than people realize. The cellular analogy — a key that no longer fits the lock well because the lock has been changed by chronic overuse — is imperfect but useful.</text:p>
      <text:p text:style-name="Text_20_body"><text:span text:style-name="Strong_20_Emphasis">Nervous system</text:span></text:p>
      <text:p text:style-name="Text_20_body">The problem — the body needs a system for rapid coordination, sensation, movement, and the integration of all the information coming from inside and outside the body.</text:p>
      <text:p text:style-name="Text_20_body">The central and peripheral distinction. Brain and spinal cord as the central processing system. The peripheral nervous system as the network of signals going to and from every part of the body.</text:p>
      <text:p text:style-name="Text_20_body"><text:soft-page-break/>The neuron as the functional unit. The electrical signal. The synapse and chemical neurotransmission — important for understanding psychiatric medications and substance use later.</text:p>
      <text:p text:style-name="Text_20_body">The autonomic nervous system deserves special attention because it's the system most directly relevant to stress and chronic disease. Sympathetic — fight or flight, the threat response. Parasympathetic — rest and digest, the recovery state. The balance between them as a marker of physiological health. What chronic sympathetic activation does to the body over time — this is the physiological mechanism linking chronic stress to chronic disease and it needs to be explained clearly here so the social determinants module can reference it.</text:p>
      <text:p text:style-name="Text_20_body">The brain regions in functional terms rather than anatomical catalog. The brainstem controlling the automatic functions — breathing, heart rate, consciousness. The limbic system and emotional processing, memory, threat assessment. The prefrontal cortex and executive function — the part that chronic stress, poor sleep, and economic precarity most impair. Understanding these regions makes the mental health and substance use module significantly more accessible.</text:p>
      <text:p text:style-name="Text_20_body">Sensory systems briefly — pain as information, the difference between acute and chronic pain, why chronic pain is a different phenomenon than acute pain and requires different understanding.</text:p>
      <text:p text:style-name="Text_20_body"><text:span text:style-name="Strong_20_Emphasis">Musculoskeletal</text:span></text:p>
      <text:p text:style-name="Text_20_body">Yes, the bones of the forearm. And the rest of it.</text:p>
      <text:p text:style-name="Text_20_body">The skeleton as structure, protection, and mineral reservoir. The major bones in plain language. Long bones, flat bones, the axial skeleton and appendicular skeleton as organizing concepts.</text:p>
      <text:p text:style-name="Text_20_body">Joints — the different types, what each allows, what each is vulnerable to. The knee as a detailed example because it's so commonly injured and so often misunderstood. The spine as both structural marvel and common site of pathology.</text:p>
      <text:p text:style-name="Text_20_body">Muscle as the system that moves the skeleton. The major muscle groups in functional terms. How muscles work in opposing pairs. What happens to muscle with aging, with disuse, with injury.</text:p>
      <text:p text:style-name="Text_20_body"><text:soft-page-break/>The connective tissue — tendons, ligaments, cartilage. Why these heal slowly. Why cartilage damage is so consequential. The difference between a sprain and a strain.</text:p>
      <text:p text:style-name="Text_20_body">Bone as living tissue. That it remodels continuously. That it responds to stress by becoming stronger. That it loses density with age, with disuse, with nutritional deficiency. The osteoporosis trajectory and why it matters for an aging rural population doing less physical labor than their parents did.</text:p>
      <text:p text:style-name="Text_20_body"><text:span text:style-name="Strong_20_Emphasis">Immune system</text:span></text:p>
      <text:p text:style-name="Text_20_body">The problem — the body exists in an environment full of things that would damage or colonize it. It needs a defense system.</text:p>
      <text:p text:style-name="Text_20_body">The layers of defense. Skin and mucous membranes as the first barrier. The innate immune response — rapid, nonspecific, the inflammation you see around any injury or infection. The adaptive immune response — slower, specific, the system that learns and remembers.</text:p>
      <text:p text:style-name="Text_20_body">Inflammation as a process rather than a pathology. Acute inflammation as the appropriate healing response — redness, heat, swelling, pain are the signs of active repair work. Why suppressing it completely is sometimes counterproductive. Why chronic inflammation — the low-grade sustained kind — is a different and damaging phenomenon.</text:p>
      <text:p text:style-name="Text_20_body">The immune system and chronic disease. The emerging understanding of inflammation as a common thread in cardiovascular disease, diabetes, depression, cancer, Alzheimer's. Not fully understood but important enough to introduce here because it's foundational to module 3.</text:p>
      <text:p text:style-name="Text_20_body">Fever as information. What it means, what it's doing, when it's concerning, when it's the body doing its job. The specific thresholds that matter in different populations.</text:p>
      <text:p text:style-name="Text_20_body"><text:span text:style-name="Strong_20_Emphasis">Digestive system</text:span></text:p>
      <text:p text:style-name="Text_20_body">The problem — the body needs to extract nutrients from food and eliminate what it can't use.</text:p>
      <text:p text:style-name="Text_20_body">The gut as a tube from mouth to anus with increasingly specialized regions. The mouth and enzymatic digestion beginning before the stomach. The stomach's acid environment and mechanical action. The small intestine as the primary absorption site — again the surface area point, the villi and microvilli <text:soft-page-break/>creating enormous absorptive area. The large intestine and water reabsorption, the microbiome.</text:p>
      <text:p text:style-name="Text_20_body">The liver as the metabolic hub. Not just bile production but the central processing facility for everything absorbed from the gut. Drug metabolism, toxin processing, protein synthesis, glucose storage. Why liver health matters across so many systems.</text:p>
      <text:p text:style-name="Text_20_body">The microbiome briefly but seriously. The emerging understanding that the gut bacterial community affects everything from immune function to mood to metabolic health. Practical implications — what disrupts it, what supports it.</text:p>
      <text:p text:style-name="Text_20_body">Digestion as a parasympathetic function. The nervous system point coming back — you can't digest effectively while in sympathetic activation. Chronic stress impairs digestion through a direct neurological mechanism. This connects to module 6.</text:p>
      <text:p text:style-name="P18">Module 2 ends not with the last system but with a section that pulls it all together.</text:p>
      <text:p text:style-name="Text_20_body">The body as an integrated system where everything affects everything. A few concrete examples of how disruption in one system cascades through others. The person with poorly controlled diabetes — the elevated blood glucose affecting the cardiovascular system, the kidneys, the nervous system, the immune system simultaneously. Not as preview of module 3 but as demonstration that the systems just taught aren't separate chapters but one interconnected whole.</text:p>
      <text:p text:style-name="Text_20_body">The concept of homeostasis — the body's continuous effort to maintain stable internal conditions despite constant external change. This is the unifying concept of physiology. Disease is homeostasis failing or being overwhelmed. Treatment is supporting the body's own homeostatic mechanisms or replacing what they can no longer do.</text:p>
      <text:p text:style-name="Text_20_body">And the honest statement that this is remarkable. The body maintains precise temperature, precise blood chemistry, precise glucose levels, precise blood pressure — all simultaneously, all automatically, all without conscious effort, across a lifetime. That this works as well as it does for as long as it does is genuinely astonishing. The reader who finishes this module should feel something like wonder at the system they're walking around in.</text:p>
      <text:p text:style-name="P3"/>
      <text:p text:style-name="P3"/>
      <text:p text:style-name="P11"><text:soft-page-break/><text:span text:style-name="T2">3. </text:span><text:span text:style-name="Strong_20_Emphasis"><text:span text:style-name="T7">How the Body Fails</text:span></text:span></text:p>
      <text:p text:style-name="P11"><text:span text:style-name="Strong_20_Emphasis"><text:span text:style-name="T7"/></text:span></text:p>
      <text:p text:style-name="P17"><text:span text:style-name="Strong_20_Emphasis"><text:span text:style-name="T7">Two parts.</text:span></text:span></text:p>
      <text:p text:style-name="Text_20_body">Part one — the common mechanisms. The upstream processes that feed into multiple disease pathways. Taught once, applied everywhere.</text:p>
      <text:p text:style-name="Text_20_body">Part two — the major pathways. Each traced from earliest upstream conditions through established disease to late complications. Using the case narrative structure throughout.</text:p>
      <text:p text:style-name="P11"><text:span text:style-name="Strong_20_Emphasis"><text:span text:style-name="T7"/></text:span></text:p>
      <text:p text:style-name="P17"><text:span text:style-name="Strong_20_Emphasis">Part one: The common mechanisms</text:span></text:p>
      <text:p text:style-name="Text_20_body"><text:span text:style-name="Strong_20_Emphasis">Inflammation</text:span></text:p>
      <text:p text:style-name="Text_20_body">Start here because it threads through everything else.</text:p>
      <text:p text:style-name="Text_20_body">The reader already understands acute inflammation from module 2. The healing response. Redness, heat, swelling, pain around an injury or infection. The immune system mobilizing to repair damage and fight invaders. This is inflammation doing exactly what it's supposed to do.</text:p>
      <text:p text:style-name="Text_20_body">Chronic inflammation is a different animal.</text:p>
      <text:p text:style-name="Text_20_body">Chronic inflammation is what happens when the acute response never fully resolves. The immune system stays partially activated. Not at the level of fighting an acute infection — not dramatically symptomatic — but a persistent low-grade mobilization that runs in the background for months, years, decades.</text:p>
      <text:p text:style-name="Text_20_body">The causes of chronic inflammation are multiple and they compound. Excess body fat — particularly visceral fat around the organs — is metabolically active tissue that continuously secretes inflammatory signaling molecules. Poor diet, particularly highly processed food, activates inflammatory pathways through mechanisms that are still being worked out but are consistent and well-documented. Chronic stress activates the immune system through the cortisol pathway. Sleep deprivation drives inflammation. Smoking. Chronic infections. Environmental toxins.</text:p>
      <text:p text:style-name="Text_20_body">What chronic inflammation does over time is the central story of modern chronic disease. It damages blood vessel walls, making them stiff and prone to the buildup of plaques. It disrupts insulin signaling, driving insulin resistance. It damages the filtering apparatus of the kidney. It activates pain pathways, <text:soft-page-break/>contributing to chronic pain syndromes. It interferes with neurotransmitter systems, contributing to depression. It accelerates cellular aging.</text:p>
      <text:p text:style-name="Text_20_body">The remarkable and important thing is that these aren't separate processes happening to separate organs. They're the same process expressing itself differently in different tissues. The person with hypertension, Type 2 diabetes, chronic kidney disease, depression, and chronic pain doesn't have five separate diseases. They have one underlying condition — chronic inflammation and its consequences — expressing across five systems simultaneously.</text:p>
      <text:p text:style-name="Text_20_body">This is why the conditions cluster. Why the diabetic so often also has hypertension and depression and chronic pain. The CHW who understands this sees the cluster as a unified picture rather than a pile of separate problems.</text:p>
      <text:p text:style-name="Text_20_body"><text:span text:style-name="Strong_20_Emphasis">Insulin resistance</text:span></text:p>
      <text:p text:style-name="Text_20_body">Deserves its own section in the mechanisms part because it's so central to so many of the pathways and because it's so widely misunderstood.</text:p>
      <text:p text:style-name="Text_20_body">The module 2 description of insulin and glucose regulation is the foundation. Insulin as the key that allows cells to take glucose from the blood. Normal function — blood glucose rises after eating, pancreas releases insulin, cells take up glucose, blood glucose returns to normal.</text:p>
      <text:p text:style-name="Text_20_body">Insulin resistance is what happens when the cells stop responding normally to insulin's signal. The key still fits the lock but the lock has gotten stiff. The pancreas responds by producing more insulin — trying to force the door. For a while this works — blood glucose stays roughly normal but at the cost of chronically elevated insulin levels. Eventually the pancreas can't keep up. Blood glucose starts staying elevated. This is prediabetes becoming Type 2 diabetes.</text:p>
      <text:p text:style-name="Text_20_body">What causes insulin resistance — excess visceral fat, chronic inflammation, physical inactivity, chronic sleep deprivation, chronic stress. These aren't separate causes. They're interrelated and compounding. The person who is stressed, sedentary, sleep-deprived, and carrying excess visceral fat is experiencing all of these drivers simultaneously.</text:p>
      <text:p text:style-name="Text_20_body">The timeline matters. Insulin resistance develops over years before blood glucose becomes abnormal enough to trigger a diagnosis. The damage — to blood vessels, to the kidneys, to the nervous system — begins accumulating during those years. The diagnosis of diabetes isn't the beginning of the disease. It's a milestone on a pathway that started much earlier.</text:p>
      <text:p text:style-name="Text_20_body"><text:soft-page-break/><text:span text:style-name="Strong_20_Emphasis">The cortisol pathway</text:span></text:p>
      <text:p text:style-name="Text_20_body">The stress response from module 2 in expanded form.</text:p>
      <text:p text:style-name="Text_20_body">Acute stress response — the threat appears, the hypothalamus activates the HPA axis, cortisol and adrenaline flood the system, the body prepares for fight or flight. Glucose floods the bloodstream for immediate energy. Heart rate and blood pressure rise. Digestion pauses. Immune function shifts. This is the system working perfectly for an acute physical threat that resolves.</text:p>
      <text:p text:style-name="Text_20_body">Chronic stress activates the same system at lower intensity but sustained duration. Cortisol stays chronically elevated. And chronically elevated cortisol does a specific list of things that read like a catalog of modern chronic disease.</text:p>
      <text:p text:style-name="Text_20_body">It raises blood pressure persistently. It promotes insulin resistance. It promotes visceral fat accumulation — the body stores energy centrally in anticipation of continued threat. It disrupts sleep architecture — particularly the deep slow-wave sleep that is most restorative. It impairs immune regulation — initially suppressing immune function and then dysregulating it in ways that promote chronic inflammation. It impairs prefrontal cortex function — the executive function, planning, and emotional regulation capacities. It disrupts neurotransmitter systems in ways that contribute to depression and anxiety.</text:p>
      <text:p text:style-name="Text_20_body">The economic precarity point lands here with full force. Chronic economic insecurity is a chronic stressor. It activates the HPA axis in exactly the way that produces these effects. The hypertension, the diabetes, the depression, the weight gain, the sleep disruption in a chronically economically precarious person aren't separate problems. They're the physiological expression of sustained threat activation over years and decades.</text:p>
      <text:p text:style-name="Text_20_body">This isn't a social justice argument dressed in physiological language. It's a direct mechanistic account of how economic conditions get under the skin and change the body's biology.</text:p>
      <text:p text:style-name="Text_20_body"><text:span text:style-name="Strong_20_Emphasis">Cellular aging and the damage accumulation model</text:span></text:p>
      <text:p text:style-name="Text_20_body">Briefly but importantly.</text:p>
      <text:p text:style-name="Text_20_body">Cells replicate throughout life to replace damaged or worn-out cells. Each replication involves copying the DNA. The copying process isn't perfect — errors accumulate over time. Additionally each replication shortens the telomeres — the protective caps on chromosomes. When telomeres get too short the cell stops replicating and enters a senescent state. Senescent cells don't <text:soft-page-break/>die cleanly — they secrete inflammatory signals that contribute to the chronic inflammation picture.</text:p>
      <text:p text:style-name="Text_20_body">Chronic stress accelerates telomere shortening. So does chronic inflammation. So does oxidative damage from metabolic processes, smoking, and environmental toxins.</text:p>
      <text:p text:style-name="Text_20_body">The practical implication — chronic stress, chronic inflammation, and the lifestyle factors that drive them don't just cause disease. They accelerate the aging process at the cellular level. The person who has spent thirty years in economic precarity with chronic stress and poor sleep and processed food and minimal physical activity has a biological age measurably older than their chronological age. Their cells are older than their birth certificate says they are.</text:p>
      <text:p text:style-name="Text_20_body">This is not irreversible. Interventions at the lifestyle level — sleep, movement, nutrition, stress reduction — measurably slow and in some cases partially reverse the cellular aging process. This is important to establish before the pathways section because it means the intervention points are real even for people who are already far down a pathway.</text:p>
      <text:p text:style-name="Horizontal_20_Line"/>
      <text:p text:style-name="Text_20_body"><text:span text:style-name="Strong_20_Emphasis">Part two: The major pathways</text:span></text:p>
      <text:p text:style-name="Text_20_body">Each pathway follows the same structure. A case narrative opens the section — a specific recognizable person at an early stage of the pathway. The narrative follows them forward through time, pausing at each stage to explain the mechanism producing what we're seeing. The clinical hooks — what a CHW would observe, what questions would reveal the stage — are woven throughout. The intervention points are named explicitly at each stage. The late complications are described honestly without being dwelt on.</text:p>
      <text:p text:style-name="Text_20_body"><text:span text:style-name="Strong_20_Emphasis">The cardiovascular pathway</text:span></text:p>
      <text:p text:style-name="Text_20_body">Open with someone in their late thirties or early forties. The person is overweight but not dramatically so. Works a physically demanding job. Eats whatever is available and affordable. Sleeps poorly because of financial stress. Drinks most evenings to come down from the day. Father had a heart attack at 58.</text:p>
      <text:p text:style-name="Text_20_body">Blood pressure at this point is running 135/88. Not high enough for diagnosis under the old criteria. Borderline under current ones. Feels fine.</text:p>
      <text:p text:style-name="Text_20_body"><text:soft-page-break/>What's happening in the blood vessels. Chronic inflammation and elevated blood pressure are beginning to damage the endothelium — the single-cell-thick lining of the blood vessels. Damaged endothelium becomes sticky. LDL cholesterol particles that would normally pass through begin to lodge in the vessel wall. The immune system responds to them as a threat — macrophages engulf the LDL particles and become foam cells. The early atherosclerotic plaque is forming.</text:p>
      <text:p text:style-name="Text_20_body">The person doesn't know this is happening. There are no symptoms. The damage is silent.</text:p>
      <text:p text:style-name="Text_20_body">Fast forward ten years. Blood pressure now consistently 145/92. A routine clinic visit finally produces a diagnosis and a prescription for lisinopril. The person takes it for a while, feels no different, stops. Starts again. Stops.</text:p>
      <text:p text:style-name="Text_20_body">What's happening now. The plaques are larger. Some have calcified and are stable. Others are soft and vulnerable — the kind that can rupture. The blood vessels serving the heart are narrowed. Effort that once felt easy now produces shortness of breath. The person attributes this to getting older and being out of shape.</text:p>
      <text:p text:style-name="Text_20_body">The kidneys are beginning to show the effects of sustained elevated pressure. Protein is appearing in the urine — a sign the filtering apparatus is being damaged.</text:p>
      <text:p text:style-name="Text_20_body">Fast forward another ten years. A stressful morning. An argument. The sympathetic nervous system fires hard. Blood pressure spikes. A vulnerable plaque in a coronary artery ruptures. The clotting cascade activates. The artery closes. The heart muscle it supplies begins to die within minutes.</text:p>
      <text:p text:style-name="Text_20_body">This is the heart attack. Not a sudden random event. The endpoint of a process that has been running for twenty or thirty years with multiple visible warning signs and multiple intervention points along the way.</text:p>
      <text:p text:style-name="Text_20_body">The intervention points named explicitly. At the earliest stage — blood pressure monitoring, lifestyle changes, addressing the sleep and stress and alcohol. At the established hypertension stage — medication adherence, understanding why it matters, the CHW relationship that makes adherence real. At the complications stage — recognizing the shortness of breath, the fatigue, the decreased exercise tolerance as signals that warrant attention.</text:p>
      <text:p text:style-name="Text_20_body"><text:span text:style-name="Strong_20_Emphasis">The metabolic pathway</text:span></text:p>
      <text:p text:style-name="Text_20_body"><text:soft-page-break/>Open with a woman in her mid-forties. Slightly overweight, particularly around the abdomen. Family history of diabetes — mother and an aunt. Works a sedentary job, sits most of the day. Tired constantly. Craves sugar and carbohydrates. Blood sugar tested at a clinic a few years ago — borderline, told to watch her diet, no follow-up.</text:p>
      <text:p text:style-name="Text_20_body">What's happening. Insulin resistance is established. The pancreas is compensating with increased insulin production. Blood glucose is staying in the normal range at the cost of hyperinsulinemia — chronically elevated insulin. The elevated insulin is promoting fat storage, particularly visceral fat. The visceral fat is secreting inflammatory cytokines. The inflammation is worsening the insulin resistance. The cycle is self-reinforcing.</text:p>
      <text:p text:style-name="Text_20_body">The fatigue is real and has a mechanism. Cells that are insulin resistant can't efficiently take up glucose for energy even when blood glucose is elevated. The person is simultaneously hyperglycemic and energy-depleted at the cellular level.</text:p>
      <text:p text:style-name="Text_20_body">Fast forward five years. A fasting blood glucose test comes back at 128. Diabetes diagnosis. Metformin prescribed. The person is told to eat better and exercise more. This advice is accurate but unspecific and unsupported. Adherence is poor.</text:p>
      <text:p text:style-name="Text_20_body">What's happening now. Elevated blood glucose is glycating proteins throughout the body — glucose molecules attaching to proteins and damaging them. The proteins in the walls of small blood vessels are particularly vulnerable. The small vessels of the kidneys, the eyes, and the peripheral nerves are being damaged.</text:p>
      <text:p text:style-name="Text_20_body">The feet deserve specific attention here. The peripheral neuropathy developing in the feet — the tingling, the numbness, the loss of protective sensation — is one of the most consequential complications because it removes the warning system that protects against injury. The person who can't feel a blister or a cut on their foot doesn't protect it. Small injuries become infected. Infections in a person with impaired immune function and poor circulation don't heal normally. The pathway to amputation begins with a blister the person couldn't feel.</text:p>
      <text:p text:style-name="Text_20_body">The intervention points. Prediabetes is a real and actionable stage — the process is reversible at this point through lifestyle intervention. Early diabetes is manageable with dramatically better outcomes than late diabetes. The CHW <text:soft-page-break/>who is monitoring blood glucose trends and supporting medication adherence and noticing the feet at every visit is doing genuinely high-value work.</text:p>
      <text:p text:style-name="Text_20_body"><text:span text:style-name="Strong_20_Emphasis">The respiratory pathway</text:span></text:p>
      <text:p text:style-name="Text_20_body">Open with a man in his fifties. Smoked for thirty years, quit five years ago. Coughs every morning — has for years, considers it normal. Gets winded going up stairs in a way that has slowly gotten worse. Works outside, physically active life until recently.</text:p>
      <text:p text:style-name="Text_20_body">What's happening in the lungs. Thirty years of cigarette smoke has done several things. The cilia that sweep debris out of the airways have been damaged and partially destroyed — the smoker's cough is the body trying to do mechanically what the cilia can no longer do. The alveolar walls have been damaged by inflammation — some have ruptured and merged, creating larger air spaces with less total surface area. This is emphysema. The airways themselves are inflamed and produce excess mucus — this is chronic bronchitis. Together they're COPD.</text:p>
      <text:p text:style-name="Text_20_body">The key concept for understanding COPD is that the damage is largely irreversible but the progression is not inevitable. Stopping smoking stops the accelerated damage. The lungs don't recover what's been lost but they stop losing more at the smoking-accelerated rate.</text:p>
      <text:p text:style-name="Text_20_body">What the person is experiencing as breathlessness is the consequence of reduced surface area for gas exchange and airways that are narrowed by inflammation and mucus. The body is getting enough oxygen at rest but the reserve capacity — the ability to increase oxygen delivery during exertion — is severely reduced.</text:p>
      <text:p text:style-name="Text_20_body">The progression. As COPD advances the body makes adaptations that have their own consequences. The right side of the heart, which pumps blood to the lungs, has to work harder against increasingly resistant pulmonary vasculature. Over years this produces right heart failure — cor pulmonale. The barrel chest of advanced COPD — the hyperinflation — is the ribcage adapting to lungs that can no longer fully deflate.</text:p>
      <text:p text:style-name="Text_20_body">Acute exacerbations — infections, air quality events, cold air — can precipitate rapid deterioration that requires hospitalization. Recognizing the signs of an exacerbation early is a high-value CHW skill.</text:p>
      <text:p text:style-name="Text_20_body">The intervention points. Smoking cessation at any stage stops the accelerated progression. Pulmonary rehabilitation — structured exercise and breathing <text:soft-page-break/>techniques — measurably improves function even in advanced disease. Avoiding respiratory infections through vaccination and infection control. Medication adherence for bronchodilators and inhaled steroids. Air quality awareness — wood smoke, agricultural burning, cold air — and practical mitigation.</text:p>
      <text:p text:style-name="Text_20_body"><text:span text:style-name="Strong_20_Emphasis">The renal pathway</text:span></text:p>
      <text:p text:style-name="Text_20_body">Open with the same woman from the metabolic pathway, now ten years further along. Diabetes for fifteen years, control inconsistent. Blood pressure also elevated, treated inconsistently.</text:p>
      <text:p text:style-name="Text_20_body">What's happening in the kidneys. Both hypertension and elevated blood glucose damage the kidney's filtering apparatus through related mechanisms. The glomeruli — the tiny filtering units — are being damaged by the mechanical stress of elevated pressure and the glycation damage of chronic hyperglycemia. The kidney is losing filtering capacity gradually.</text:p>
      <text:p text:style-name="Text_20_body">The insidious quality of chronic kidney disease is that the kidneys have enormous reserve capacity. You can lose more than half your kidney function before symptoms appear. The damage accumulates silently for years. By the time the person feels unwell the disease is already advanced.</text:p>
      <text:p text:style-name="Text_20_body">The early warning signs that laboratory testing reveals — protein in the urine, slightly elevated creatinine — are the CHW's alert system. Not because the CHW is ordering labs but because the CHW who understands what these values mean when the person shows them a lab result can recognize their significance and ensure appropriate follow-up.</text:p>
      <text:p text:style-name="Text_20_body">Late-stage chronic kidney disease affects every system. Waste products that the healthy kidney removes accumulate. Fluid balance is disrupted. Anemia develops because the kidney produces erythropoietin, the hormone that stimulates red blood cell production. The cardiovascular risk accelerates dramatically.</text:p>
      <text:p text:style-name="Text_20_body">The intervention points. Blood pressure control is the most important intervention — it slows the progression of kidney disease more than almost anything else. Blood glucose control second. Avoiding nephrotoxic medications — NSAIDs particularly, which are widely used for chronic pain in this population and genuinely damaging to compromised kidneys. The CHW who knows that the person with chronic kidney disease is taking ibuprofen daily for back pain is identifying a real and actionable problem.</text:p>
      <text:p text:style-name="Text_20_body"><text:span text:style-name="Strong_20_Emphasis">The depression pathway</text:span></text:p>
      <text:p text:style-name="Text_20_body"><text:soft-page-break/>This one requires the most careful framing because it cuts against so much of what the reader may have absorbed about mental illness.</text:p>
      <text:p text:style-name="Text_20_body">Open with a man in his late forties. Lost his manufacturing job three years ago when the plant closed. The work had been physical and demanding but it was his — something he was good at, something that structured his days and connected him to other men. The new job, when he found one, is less skilled, less paid, less meaningful. He drinks more than he used to. Sleeps poorly. Stopped doing the things he used to enjoy. His wife says he's not himself. He would not describe himself as depressed. He would say he's tired and things are hard.</text:p>
      <text:p text:style-name="Text_20_body">What's happening physiologically. The chronic stress of job loss, economic precarity, and loss of identity and purpose has sustained HPA axis activation. Chronically elevated cortisol is doing several things to the brain. It's impairing hippocampal neurogenesis — the hippocampus, critical for memory and emotional regulation, normally generates new neurons throughout life and this process is impaired by chronic cortisol. It's dysregulating the serotonin and dopamine systems — the neurotransmitters most associated with mood, motivation, and reward. It's promoting neuroinflammation — the same inflammatory process happening in the blood vessels and kidneys is happening in the brain.</text:p>
      <text:p text:style-name="Text_20_body">The depression that emerges from this process is not a character failing or a choice or an attitude problem. It's the predictable physiological consequence of sustained stress and loss acting on a brain that has specific vulnerabilities to those inputs.</text:p>
      <text:p text:style-name="Text_20_body">The presentation in this population deserves specific attention. Depression in rural working class men often doesn't present as sadness. It presents as irritability, withdrawal, increased alcohol use, decreased engagement with activities and relationships, physical complaints — fatigue, chronic pain, sleep disruption. The person would reject the label of depression but would recognize every item on that list in their own experience.</text:p>
      <text:p text:style-name="Text_20_body">The connection to other chronic diseases. Depression and cardiovascular disease have bidirectional relationships — each worsens the other. Depression impairs immune function. Depression is associated with faster progression of almost every chronic disease, largely through the mechanisms of poor self-care and medication nonadherence. The person who is depressed doesn't take their blood pressure medication consistently, doesn't manage their diet, doesn't <text:soft-page-break/>exercise, doesn't follow up with the doctor. The depression is doing as much damage as the hypertension.</text:p>
      <text:p text:style-name="Text_20_body">The intervention points. This is where the honest resource picture has to be stated plainly. Antidepressants help some people and are largely inaccessible to this population for cost and access reasons. Psychotherapy helps and is almost entirely inaccessible. The interventions that are accessible — sleep improvement, physical activity, social connection, purposeful work, reduction of alcohol use, addressing the underlying stressors where possible — have real evidence behind them and are exactly what the Working Society's structures support.</text:p>
      <text:p text:style-name="Text_20_body">The CHW role here is not referral to nonexistent resources. It's presence, accurate naming, practical support, connection to the community, and monitoring. Watching for the trajectory that ends in the worst outcomes. Knowing when someone has crossed from manageable depression into genuine crisis.</text:p>
      <text:p text:style-name="Horizontal_20_Line"/>
      <text:p text:style-name="Text_20_body"><text:span text:style-name="Strong_20_Emphasis">The integration section</text:span></text:p>
      <text:p text:style-name="Text_20_body">Module 3 ends the same way module 2 did — by pulling the threads together.</text:p>
      <text:p text:style-name="Text_20_body">The person with the cluster. The 58 year old man who has hypertension, Type 2 diabetes, early chronic kidney disease, chronic pain, depression, and a drinking problem. These are not five separate diseases. They are one process — chronic inflammation, insulin resistance, sustained stress activation, cellular aging — expressing simultaneously across multiple systems.</text:p>
      <text:p text:style-name="Text_20_body">Understanding this changes how you see him and what you can do. You're not managing five problems. You're supporting one person whose body is expressing a unified condition in multiple ways. Every intervention that addresses the underlying mechanisms — sleep, movement, nutrition, stress reduction, connection, purpose — affects all five expressions simultaneously. The blood pressure medication addresses one branch. The lifestyle and social interventions address the trunk.</text:p>
      <text:p text:style-name="Text_20_body">The honest emotional note. Some of what the reader has just read they will recognize. In themselves, in their family, in their community. The pathways described are not abstract — they're the actual trajectories of actual people in actual places like Franklin County Georgia.</text:p>
      <text:p text:style-name="Text_20_body"><text:soft-page-break/>The module ends not with despair about how far these processes have progressed but with the genuine observation that understanding the mechanism is the beginning of being able to interrupt it. The intervention points are real. The CHW relationship is one of the most powerful intervention tools available precisely because it operates at the level of daily life where most of the relevant decisions are actually made.</text:p>
      <text:p text:style-name="Text_20_body">You now understand what you're looking at. That's the most important thing this module can give you. Everything that follows is built on it.</text:p>
      <text:p text:style-name="P11"><text:span text:style-name="Strong_20_Emphasis"><text:span text:style-name="T7"/></text:span></text:p>
      <text:p text:style-name="P9"/>
      <text:p text:style-name="P9">4. Seeing What’s There</text:p>
      <text:p text:style-name="P9"/>
      <text:p text:style-name="P19"><text:span text:style-name="Strong_20_Emphasis">Part one: Vital signs</text:span></text:p>
      <text:p text:style-name="Text_20_body"><text:span text:style-name="Strong_20_Emphasis">Blood pressure — manual</text:span></text:p>
      <text:p text:style-name="Text_20_body">The most important skill in this curriculum. Deserves the most thorough treatment.</text:p>
      <text:p text:style-name="Text_20_body">The equipment. The aneroid sphygmomanometer — the dial gauge cuff. How to check that it's functioning correctly. The importance of cuff size — a cuff that's too small gives falsely elevated readings, a cuff that's too large gives falsely low readings. How to determine correct cuff size for the person in front of you. The importance of having multiple sizes available.</text:p>
      <text:p text:style-name="Text_20_body">The stethoscope. How to hold it. Where to place it. Why the bell side versus the diaphragm side matters for different sounds.</text:p>
      <text:p text:style-name="Text_20_body">Patient preparation. Why it matters and what it changes. The person should be seated quietly for five minutes before measurement. No caffeine, no exercise, no smoking in the preceding thirty minutes. Feet flat on the floor, back supported, arm at heart level. These aren't arbitrary — each one has a specific effect on the reading if violated. Explain the mechanism for each.</text:p>
      <text:p text:style-name="Text_20_body">The procedure step by step. Locate the brachial artery by palpation — inside of the elbow crease. Place the cuff correctly — lower edge about an inch above the crease, the artery marker aligned over the brachial artery. Palpate the radial pulse at the wrist. Inflate while palpating until the pulse disappears — this gives you an estimate of systolic pressure and prevents you from under-inflating. Inflate 20-30 mmHg above that point. Place the stethoscope over the brachial artery. Release the valve slowly — about 2 mmHg per second. Listen.</text:p>
      <text:p text:style-name="Text_20_body"><text:soft-page-break/>The Korotkoff sounds. What they are — sounds produced by turbulent blood flow as the cuff pressure drops through the systolic and diastolic thresholds. What they sound like — the first tap is systolic, the disappearance of sound is diastolic. The five phases briefly but the clinically important ones in detail.</text:p>
      <text:p text:style-name="Text_20_body">Common errors and what they produce. Releasing too fast — falsely low systolic, falsely high diastolic. Cuff too loose — falsely high reading. Ambient noise — missing the sounds. Deflating and re-inflating without full deflation first — venous congestion produces falsely high reading. Auscultatory gap — a silence that can occur between phases in some people that can be mistaken for diastolic if the cuff wasn't inflated high enough. This is worth explaining because missing it produces dangerously false low systolic readings.</text:p>
      <text:p text:style-name="Text_20_body">Interpreting the reading. The blood pressure categories in plain language — normal, elevated, Stage 1 hypertension, Stage 2 hypertension, hypertensive crisis. What each means in terms of cardiovascular risk. But more important than any single reading — the trend. How to record and track readings over time. What a trend of gradually increasing blood pressure means. What blood pressure that was previously controlled becoming elevated means. What a sudden dramatic elevation means.</text:p>
      <text:p text:style-name="Text_20_body">The white coat effect and its opposite — masked hypertension. Why clinic readings and home readings sometimes differ significantly and why that matters.</text:p>
      <text:p text:style-name="Text_20_body">When to act immediately. A reading above 180/120 with symptoms — headache, vision changes, chest pain, shortness of breath — is a hypertensive crisis requiring immediate emergency response. Above 180/120 without symptoms requires urgent medical attention within hours. These thresholds should be memorized.</text:p>
      <text:p text:style-name="Text_20_body"><text:span text:style-name="Strong_20_Emphasis">Pulse</text:span></text:p>
      <text:p text:style-name="Text_20_body">Rate, rhythm, and quality. All three matter.</text:p>
      <text:p text:style-name="Text_20_body">Rate — how many beats per minute. The normal range and what outside the normal range means in different contexts. The difference between tachycardia that's expected — exertion, fever, anxiety, pain — and tachycardia that's concerning — unexplained at rest, new onset, accompanied by other symptoms.</text:p>
      <text:p text:style-name="Text_20_body">Rhythm — regular or irregular. What a regular rhythm feels like. What an irregular rhythm feels like. Why atrial fibrillation matters and what it feels like on palpation. The importance of noting irregularity even if you can't characterize it further.</text:p>
      <text:p text:style-name="Text_20_body"><text:soft-page-break/>Quality — strong or weak, bounding or thready. What a weak thready pulse tells you about perfusion. The specific pulse quality of shock — rapid and weak. The bounding pulse of fever or hyperthyroidism.</text:p>
      <text:p text:style-name="Text_20_body">Where to palpate. Radial at the wrist — the standard. Carotid at the neck — stronger signal, useful when radial is hard to find. Femoral at the groin. Dorsalis pedis and posterior tibial at the foot — specifically important for diabetic assessment of peripheral circulation. How to find each one.</text:p>
      <text:p text:style-name="Text_20_body">Capillary refill as a perfusion assessment. Press the fingernail bed until it blanches, release, count the seconds until color returns. Normal is under two seconds. Prolonged refill suggests poor peripheral perfusion. Why this matters and what it connects to.</text:p>
      <text:p text:style-name="Text_20_body"><text:span text:style-name="Strong_20_Emphasis">Respiratory rate</text:span></text:p>
      <text:p text:style-name="Text_20_body">The most neglected vital sign and in many ways the most sensitive early indicator of deterioration.</text:p>
      <text:p text:style-name="Text_20_body">Why it's neglected — partly because it's the only vital sign that changes when the person knows they're being assessed. Count respirations without telling the person what you're doing. The standard method — keep your fingers on the wrist as if still counting pulse, observe the chest rise and fall, count for a full minute or at least thirty seconds and multiply.</text:p>
      <text:p text:style-name="Text_20_body">Normal rate and what outside normal means. Tachypnea — elevated rate — as an early sign of respiratory compromise, sepsis, metabolic acidosis, pain, anxiety. The specific pattern of Kussmaul breathing in diabetic ketoacidosis — deep, labored, rapid breathing that looks like the person is working hard. Bradypnea — abnormally slow rate — and what it suggests.</text:p>
      <text:p text:style-name="Text_20_body">Quality as important as rate. Labored versus effortless. Use of accessory muscles — the neck muscles, the muscles between the ribs — indicates the person is working to breathe. Nasal flaring. Pursed-lip breathing in COPD — a self-taught technique that maintains positive airway pressure and keeps airways open longer during exhalation. What it tells you about the severity of their disease.</text:p>
      <text:p text:style-name="Text_20_body">The sounds audible without a stethoscope. Wheezing — the high-pitched musical sound of narrowed airways. Stridor — the harsh sound of upper airway obstruction. Gurgling — fluid in the upper airway. What each means and what each requires.</text:p>
      <text:p text:style-name="Text_20_body"><text:soft-page-break/><text:span text:style-name="Strong_20_Emphasis">Temperature</text:span></text:p>
      <text:p text:style-name="Text_20_body">The thermometer and how to use it correctly. Oral, axillary, temporal — the differences in normal values and reliability.</text:p>
      <text:p text:style-name="Text_20_body">Fever as information rather than simply as symptom to suppress. What fever is doing — the elevated temperature that inhibits bacterial and viral replication, activates immune function. When suppressing it is appropriate and when monitoring it serves better.</text:p>
      <text:p text:style-name="Text_20_body">The fever thresholds that matter. The specific concern about fever in infants under three months — low threshold for emergency response. The concern about fever in elderly people — often blunted or absent even in serious infection, making its presence more significant when it occurs. The concern about fever with specific symptoms — stiff neck and fever, rash and fever, altered mental status and fever.</text:p>
      <text:p text:style-name="Text_20_body">Hypothermia as the underrecognized opposite. What it looks like in the field. Why rural elderly people in inadequately heated homes are genuinely at risk. The specific concern about hypothermia and cardiac arrhythmia.</text:p>
      <text:p text:style-name="Text_20_body"><text:span text:style-name="Strong_20_Emphasis">Pulse oximetry</text:span></text:p>
      <text:p text:style-name="Text_20_body">The finger clip device and how to use it correctly. Why nail polish, poor perfusion, and cold fingers affect the reading and what to do about each.</text:p>
      <text:p text:style-name="Text_20_body">What SpO2 actually measures — the percentage of hemoglobin molecules carrying oxygen. What it doesn't measure — how hard the person is working to maintain that saturation, carbon dioxide levels, the adequacy of tissue perfusion.</text:p>
      <text:p text:style-name="Text_20_body">The normal range and what below normal means. The specific thresholds — below 95% warrants attention, below 90% is an emergency. The person with chronic lung disease whose baseline may be lower and why knowing their baseline matters.</text:p>
      <text:p text:style-name="Text_20_body">The difference between SpO2 and respiratory rate as assessment tools. SpO2 can be maintained at normal levels until the person is working extremely hard to compensate — it's a late indicator of respiratory compromise in some presentations. Respiratory rate rises earlier. Both together give a more complete picture than either alone.</text:p>
      <text:p text:style-name="Horizontal_20_Line"/>
      <text:p text:style-name="Text_20_body"><text:span text:style-name="Strong_20_Emphasis">Part two: The systematic observation</text:span></text:p>
      <text:p text:style-name="Text_20_body"><text:soft-page-break/>Beyond the vital signs — the broader observational assessment that the CHW performs with eyes and ears and attention.</text:p>
      <text:p text:style-name="Text_20_body"><text:span text:style-name="Strong_20_Emphasis">General appearance</text:span></text:p>
      <text:p text:style-name="Text_20_body">What does this person look like.</text:p>
      <text:p text:style-name="Text_20_body">Not in the judgmental sense. In the clinical sense. Are they well or unwell. Does their appearance match their stated condition. Are they in distress — and if so what kind of distress. Acute pain looks different from chronic pain looks different from respiratory distress looks different from anxiety.</text:p>
      <text:p text:style-name="Text_20_body">The specific things to notice. Level of consciousness and alertness — are they fully awake and oriented, or is there something blunted or confused about their responses. The AVPU scale — Alert, responds to Voice, responds to Pain, Unresponsive — as a rapid rough assessment of consciousness level that anyone can apply.</text:p>
      <text:p text:style-name="Text_20_body">Skin color. Pallor — the loss of normal color that suggests anemia or poor perfusion. Cyanosis — the blue-gray discoloration of lips and fingernails that indicates low oxygen saturation, visible before the pulse oximeter alarms. Jaundice — the yellow tinge of elevated bilirubin, visible first in the whites of the eyes. Flushing — the red face of fever, hypertensive urgency, or alcohol intoxication. Mottling — the blotchy purple-gray pattern of seriously impaired circulation.</text:p>
      <text:p text:style-name="Text_20_body">Skin turgor as a hydration assessment. Pinch the skin on the back of the hand or forearm, release, observe how quickly it returns to normal. Tenting — delayed return — suggests dehydration. Why this test is less reliable in elderly people whose skin has lost elasticity regardless of hydration.</text:p>
      <text:p text:style-name="Text_20_body">Edema. Where it is — peripheral edema in the ankles and lower legs suggests heart failure or venous insufficiency. Pitting versus non-pitting. How to assess pitting — press firmly for five seconds, release, observe whether an indentation remains. Bilateral versus unilateral — bilateral suggests systemic cause, unilateral suggests local cause.</text:p>
      <text:p text:style-name="Text_20_body">Breathing quality as already discussed. But in the general appearance context — the person who is breathing hard at rest, who can't finish a sentence without pausing for breath, who is using accessory muscles — this is visible before you ever measure a respiratory rate.</text:p>
      <text:p text:style-name="Text_20_body"><text:soft-page-break/>Gait and movement. How they moved when you arrived. Whether they're guarding a part of their body. Whether their movement has changed since your last visit.</text:p>
      <text:p text:style-name="Text_20_body">Affect and engagement. Are they making eye contact. Are they responding normally to conversation. Is there something flat or withdrawn about their engagement. Is there agitation or restlessness.</text:p>
      <text:p text:style-name="Text_20_body"><text:span text:style-name="Strong_20_Emphasis">The hands</text:span></text:p>
      <text:p text:style-name="Text_20_body">The hands tell you more than most people realize.</text:p>
      <text:p text:style-name="Text_20_body">Nail beds — color, capillary refill as discussed, clubbing. Clubbing — the enlargement of the fingertip and curving of the nail — is associated with chronic respiratory and cardiac disease. Splinter hemorrhages under the nails — tiny red-brown streaks — can indicate endocarditis.</text:p>
      <text:p text:style-name="Text_20_body">Tremor — visible shaking of the hands. The different types and what they suggest. Resting tremor of Parkinson's disease. Intention tremor of cerebellar disease. The tremor of alcohol withdrawal — medically significant and potentially dangerous.</text:p>
      <text:p text:style-name="Text_20_body">Grip strength as a rough functional assessment and a marker of sarcopenia — age-related muscle loss — in older members.</text:p>
      <text:p text:style-name="Text_20_body">Skin changes on the hands specific to work and lifestyle. The calluses that tell you what someone does with their hands. The wounds and how they're healing. The diabetic hand — skin changes, reduced sensation, healing problems.</text:p>
      <text:p text:style-name="Text_20_body"><text:span text:style-name="Strong_20_Emphasis">The face</text:span></text:p>
      <text:p text:style-name="Text_20_body">Eyes — the whites for jaundice and for conjunctival pallor suggesting anemia. Pupil size and symmetry — unequal pupils are a neurological emergency finding. The drooping eyelid or facial asymmetry of stroke.</text:p>
      <text:p text:style-name="Text_20_body">Mouth and throat — for the CHW who has a penlight and knows how to use it. Mucous membrane color and moisture as hydration indicator. Obvious oral pathology — dental infection, thrush, lesions. The throat for obvious redness, swelling, exudate.</text:p>
      <text:p text:style-name="Text_20_body">Facial symmetry — the subtle asymmetry of early facial nerve involvement. The full facial droop of established stroke.</text:p>
      <text:p text:style-name="Text_20_body"><text:span text:style-name="Strong_20_Emphasis">The abdomen</text:span></text:p>
      <text:p text:style-name="Text_20_body"><text:soft-page-break/>Visual inspection before palpation. Distension — is the abdomen protuberant in a way that might indicate ascites, bowel obstruction, or organomegaly. The shape of the distension — central versus diffuse.</text:p>
      <text:p text:style-name="Text_20_body">The CHW is not doing a clinical abdominal examination. But they can observe and they can ask about symptoms that connect to what they observe. Nausea, vomiting, diarrhea, constipation, pain — and the characteristics of the pain. Location, quality, onset, what makes it better or worse.</text:p>
      <text:p text:style-name="Text_20_body">The liver — the CHW who knows that the liver sits under the right lower ribs can notice when a person winces at pressure in that area and ask a question. Not diagnose hepatomegaly. Notice a finding and follow up on it.</text:p>
      <text:p text:style-name="Text_20_body"><text:span text:style-name="Strong_20_Emphasis">The feet</text:span></text:p>
      <text:p text:style-name="Text_20_body">For diabetic members this deserves its own section within the module.</text:p>
      <text:p text:style-name="Text_20_body">The diabetic foot exam as a CHW skill. Remove the shoes and socks every visit. Look at the entire foot — soles, between the toes, around the nails. Look for blisters, calluses, wounds, color changes, swelling. Feel for temperature differences between feet. Ask about sensation — do you feel this, is this the same on both feet.</text:p>
      <text:p text:style-name="Text_20_body">The monofilament test — the nylon fiber device used to assess protective sensation. The CHW version without a monofilament — touching the foot in multiple locations with a light touch and asking whether it's felt. Not equivalent to the clinical monofilament test but better than not assessing at all.</text:p>
      <text:p text:style-name="Text_20_body">The nails — thickened, discolored nails suggest fungal infection. Ingrown nails in a person with neuropathy who can't feel them is a wound risk. The skin between the toes — interdigital moisture, early maceration, fungal infection.</text:p>
      <text:p text:style-name="Text_20_body">Why this matters stated plainly. Diabetic foot ulcers are the leading cause of non-traumatic lower extremity amputation. Most of them start with something small that the person didn't notice because they couldn't feel it. The CHW who looks at the feet every visit is doing something no clinic does reliably.</text:p>
      <text:p text:style-name="Horizontal_20_Line"/>
      <text:p text:style-name="Text_20_body"><text:span text:style-name="Strong_20_Emphasis">Part three: The home visit as assessment tool</text:span></text:p>
      <text:p text:style-name="Text_20_body">The home environment is an extension of the physical assessment. What you see in the home tells you things the person may not tell you directly.</text:p>
      <text:p text:style-name="Text_20_body"><text:span text:style-name="Strong_20_Emphasis">The medication assessment</text:span></text:p>
      <text:p text:style-name="Text_20_body"><text:soft-page-break/>Ask to see all the medications. Not as surveillance but as care. Look at what's there. Are the medications actually being taken — check the fill dates and the number of pills remaining against the prescription schedule. Are there medications from multiple prescribers that may interact. Are there medications that shouldn't be combined with the person's diagnoses — the NSAID and the kidney disease, the beta-blocker and the asthma, the sedative and the COPD.</text:p>
      <text:p text:style-name="Text_20_body">Are there medications that have run out and not been refilled. This is a high-value finding. Why haven't they been refilled — cost, transportation, side effect the person doesn't want to tell the doctor, feeling fine so why bother. Each of these is actionable.</text:p>
      <text:p text:style-name="Text_20_body">Over the counter medications as part of the picture. NSAIDs as the most important one — ubiquitous, genuinely harmful in kidney disease and in combination with certain blood pressure medications, and taken without any clinical oversight.</text:p>
      <text:p text:style-name="Text_20_body"><text:span text:style-name="Strong_20_Emphasis">The food environment</text:span></text:p>
      <text:p text:style-name="Text_20_body">What's in the kitchen. Not as judgment but as information. What is this person actually eating. Is there food in the house. What kind. The presence of highly processed food versus fresh or minimally processed food. The presence of diabetic-appropriate food versus the foods that most directly drive glucose excursion.</text:p>
      <text:p text:style-name="Text_20_body">For the diabetic member — are there concentrated sweets. Is there fruit juice being consumed as if it were water. Are there high-glycemic staples as the primary carbohydrate.</text:p>
      <text:p text:style-name="Text_20_body">The absence of food is the most important finding. Food insecurity has specific health consequences — erratic eating patterns disrupt glucose control in diabetics, promote cortisol elevation, impair medication adherence when medications should be taken with food.</text:p>
      <text:p text:style-name="Text_20_body"><text:span text:style-name="Strong_20_Emphasis">The physical environment</text:span></text:p>
      <text:p text:style-name="Text_20_body">Temperature. Is the home adequately heated in winter, cooled in summer. The elderly member without air conditioning in a Georgia summer is at genuine heat risk.</text:p>
      <text:p text:style-name="Text_20_body">Fall hazards for elderly or mobility-impaired members. Rugs that slide, cords across walkways, poor lighting, bathroom without grab bars. A CHW who <text:soft-page-break/>identifies and helps address fall hazards is doing injury prevention that no clinical encounter performs.</text:p>
      <text:p text:style-name="Text_20_body">Mold — visible or suspected. Musty smell, discoloration on walls or ceiling, chronic respiratory symptoms in the household that might connect to indoor air quality.</text:p>
      <text:p text:style-name="Text_20_body">Smoking in the home. For a COPD member particularly — secondhand smoke exposure in their own home is a direct disease driver and a conversation that needs to happen carefully and without judgment.</text:p>
      <text:p text:style-name="Text_20_body">The general organization and function of the home as an indicator of functional status. A home that was previously maintained and has become disorganized, dirty, with stacked dishes and unopened mail — this is a visible indicator of functional decline that should prompt closer attention.</text:p>
      <text:p text:style-name="Text_20_body"><text:span text:style-name="Strong_20_Emphasis">Functional status assessment</text:span></text:p>
      <text:p text:style-name="Text_20_body">The Activities of Daily Living — the basic self-care tasks that mark the boundary between independent function and need for support. Bathing, dressing, eating, toileting, transferring (getting in and out of bed and chair), continence. The Instrumental Activities of Daily Living — the more complex functions of independent living. Managing medications, managing finances, using transportation, managing household tasks, shopping, cooking, using the phone.</text:p>
      <text:p text:style-name="Text_20_body">The CHW doesn't administer a formal ADL assessment. But they observe and they ask. Can you tell me about your day yesterday. What did you have for breakfast. How did you get to your last appointment. Have you been able to keep up with your bills. These questions reveal functional status without requiring the person to submit to a formal assessment.</text:p>
      <text:p text:style-name="Text_20_body">Changes in functional status over time are among the most important things the CHW tracks. The person who used to cook their own meals and now isn't. The person whose home used to be clean and now isn't. The person who used to walk to the mailbox and now doesn't. These changes have specific causes that warrant investigation.</text:p>
      <text:p text:style-name="Horizontal_20_Line"/>
      <text:p text:style-name="Text_20_body"><text:span text:style-name="Strong_20_Emphasis">Part four: Documentation</text:span></text:p>
      <text:p text:style-name="Text_20_body">Covered more fully in module 10 but the basics belong here because they're inseparable from the assessment skills.</text:p>
      <text:p text:style-name="Text_20_body"><text:soft-page-break/>The SOAP note simplified. Subjective — what the person tells you. Objective — what you observe and measure. Assessment — what you think is going on based on S and O. Plan — what you're going to do about it.</text:p>
      <text:p text:style-name="Text_20_body">The CHW version doesn't require clinical assessment in the A section. It might be — blood pressure trending up over three visits, person reports increasing headaches, medication hasn't been refilled in six weeks. That's a coherent and actionable SOAP note that doesn't require a diagnosis.</text:p>
      <text:p text:style-name="Text_20_body">What to always document. Date and time. Vital signs with method. Medications reviewed — changes noted. Any new symptoms or concerns. Functional status compared to last visit. Plan for follow-up.</text:p>
      <text:p text:style-name="Text_20_body">The longitudinal value of documentation. A single visit note is modestly useful. Twelve months of visit notes showing a gradually deteriorating trend is genuinely powerful clinical information that no clinic encounter produces. The value of the CHW's documentation is its continuity. That has to be built into the practice from the beginning.</text:p>
      <text:p text:style-name="Horizontal_20_Line"/>
      <text:p text:style-name="Text_20_body"><text:span text:style-name="Strong_20_Emphasis">The cohort component</text:span></text:p>
      <text:p text:style-name="Text_20_body">Module 4 has the clearest mandatory cohort requirement of any module because the skills cannot be learned from text alone.</text:p>
      <text:p text:style-name="Text_20_body">Taking blood pressure correctly requires practice on real people with feedback from someone who can hear what you're hearing and correct your technique. The Korotkoff sounds are unmistakable once you've heard them and almost impossible to describe adequately in text.</text:p>
      <text:p text:style-name="Text_20_body">The systematic observation skills require practice scenarios — role plays and case presentations where the learner practices running through the assessment framework on someone presenting with a specific scenario.</text:p>
      <text:p text:style-name="Text_20_body">The home visit requires practice visits — ideally supervised visits where the learner conducts the visit and then debriefs with an experienced CHW about what they noticed, what they missed, and what they would do differently.</text:p>
      <text:p text:style-name="Text_20_body">The specific structure of the cohort sessions for module 4. Session one — vital signs workshop. Everyone practices on everyone. Blood pressure, pulse, respiratory rate, temperature, pulse oximetry. Feedback on technique. Common errors identified and corrected. Session two — systematic observation practice. Case scenarios presented. Learners run through the observation framework and <text:soft-page-break/>document findings. Session three — simulated home visit. A scenario is set up — a specific member household with specific findings planted — and learners conduct the visit, document, and debrief.</text:p>
      <text:p text:style-name="Horizontal_20_Line"/>
      <text:p text:style-name="Text_20_body"><text:span text:style-name="Strong_20_Emphasis">The closing section</text:span></text:p>
      <text:p text:style-name="Text_20_body">Module 4 ends with the integration of everything in this module with what came before.</text:p>
      <text:p text:style-name="Text_20_body">You now have a framework for seeing what's there. The knowledge from modules 2 and 3 tells you what the findings mean. The vital signs tell you where the person is physiologically right now. The systematic observation tells you what their body and their environment are showing you. The documentation creates the longitudinal record that turns individual snapshots into a movie.</text:p>
      <text:p text:style-name="Text_20_body">The honest statement of what this does and doesn't give you. It gives you a powerful set of observational tools grounded in a genuine understanding of the mechanisms producing what you observe. It doesn't give you the ability to diagnose. It gives you the ability to notice, to document, to support, and to recognize when something requires more than you can provide.</text:p>
      <text:p text:style-name="Text_20_body">That's a genuinely powerful set of capabilities. Most people who love someone with a chronic disease wish they had them. You now do.</text:p>
      <text:p text:style-name="P9"/>
      <text:p text:style-name="P9"/>
      <text:p text:style-name="P9">5. Talking To People</text:p>
      <text:p text:style-name="P9"/>
      <text:p text:style-name="P19"><text:span text:style-name="Strong_20_Emphasis">The framing section</text:span></text:p>
      <text:p text:style-name="Text_20_body">Before any technique the module needs to establish what you're actually doing when you talk to someone as a CHW.</text:p>
      <text:p text:style-name="Text_20_body">You are not delivering information to a passive recipient. You are not persuading someone to do what you know is right for them. You are not fixing anyone.</text:p>
      <text:p text:style-name="Text_20_body">You are creating the conditions under which a person can hear something true about their own situation, connect it to something they actually care about, and find their own motivation to move toward something better.</text:p>
      <text:p text:style-name="Text_20_body">That distinction matters enormously. The information delivery model — I know what you should do and my job is to get you to do it — fails consistently <text:soft-page-break/>and for understandable reasons. People don't change because someone told them to. People change when they find their own reasons to change and feel capable of changing. The CHW's job is to support that process, not to drive it.</text:p>
      <text:p text:style-name="Text_20_body">This is the foundational principle of motivational interviewing and it's worth stating plainly before introducing the technique. The technique makes sense once the principle is clear.</text:p>
      <text:p text:style-name="Horizontal_20_Line"/>
      <text:p text:style-name="Text_20_body"><text:span text:style-name="Strong_20_Emphasis">Part one: The foundations of effective communication</text:span></text:p>
      <text:p text:style-name="Text_20_body"><text:span text:style-name="Strong_20_Emphasis">Listening as an active skill</text:span></text:p>
      <text:p text:style-name="Text_20_body">Most people listen to respond. They're formulating their reply while the other person is still talking. They're waiting for the part that confirms what they already think. They're listening for the facts and missing the feeling underneath the facts.</text:p>
      <text:p text:style-name="Text_20_body">The CHW needs to listen to understand. That's a different cognitive activity and it requires deliberate practice.</text:p>
      <text:p text:style-name="Text_20_body">What listening to understand looks like. You are fully present. You are not formulating your response. You are tracking not just what the person is saying but how they're saying it — the hesitations, the changes in volume, the things they circle around without landing on, the things they say with more intensity than the content seems to warrant.</text:p>
      <text:p text:style-name="Text_20_body">You are tracking the gap between what the person is saying and what they seem to be feeling. The person who says I'm fine while their body says something else. The person who describes their medication regimen confidently but whose hesitation when you ask about the last few weeks tells you the regimen isn't being followed. The person who says they're not worried but talks about it for fifteen minutes.</text:p>
      <text:p text:style-name="Text_20_body">Eye contact and what it communicates. In this cultural context — rural working class, Southern — the conventions around eye contact are specific. Direct sustained eye contact in an authority figure communicates assessment and judgment. The same eye contact in a peer communicates genuine attention and respect. The difference is in everything surrounding the eye contact — posture, tone, the absence of a clipboard or a hurry.</text:p>
      <text:p text:style-name="Text_20_body"><text:soft-page-break/>Physical positioning. Sitting rather than standing when possible. Same level as the person. Not across a desk or a table when you can help it. The body language of a visitor rather than an inspector.</text:p>
      <text:p text:style-name="Text_20_body">Silence. This is the hardest skill for most people. The instinct when there's silence is to fill it. Questions, reassurances, information. The person who has just said something difficult needs space to continue if they're going to. The CHW who fills the silence stops that process. Practice sitting with silence for longer than feels comfortable. The person will often say the most important thing into the silence.</text:p>
      <text:p text:style-name="Text_20_body"><text:span text:style-name="Strong_20_Emphasis">Reflective listening</text:span></text:p>
      <text:p text:style-name="Text_20_body">The core technique of motivational interviewing and the most powerful single communication skill in this module.</text:p>
      <text:p text:style-name="Text_20_body">Reflective listening is not paraphrasing. It's not summarizing. It's making a guess about the meaning underneath what the person said and offering it back to them as a statement rather than a question.</text:p>
      <text:p text:style-name="Text_20_body">The difference matters. A question — so you're worried about the cost of your medication? — puts the person in the position of confirming or denying. A reflection — it sounds like the cost has been making it hard to keep up with the medication — offers an interpretation that the person can correct, deepen, or confirm. It advances the conversation rather than interrogating it.</text:p>
      <text:p text:style-name="Text_20_body">The types of reflections. Simple reflection — restating the content at a similar level. You've been having more headaches lately. Amplified reflection — restating with slightly more intensity to allow the person to correct down. It sounds like the headaches have been really debilitating. Double-sided reflection — reflecting both sides of an ambivalence. On one hand you know the medication is important, on the other hand the cost makes it really hard to keep up with. The double-sided reflection is particularly powerful for ambivalence because it makes the person feel heard rather than pushed.</text:p>
      <text:p text:style-name="Text_20_body">What not to do. The righting reflex — the instinct to correct, advise, warn, disagree — is the enemy of reflective listening. The moment you shift into telling someone what they should do you lose the collaboration. They become the passive recipient of your expertise rather than the agent of their own change. This instinct is hard to suppress especially when you know something important that the person is ignoring. Practice suppressing it.</text:p>
      <text:p text:style-name="Text_20_body"><text:span text:style-name="Strong_20_Emphasis">Open questions</text:span></text:p>
      <text:p text:style-name="Text_20_body"><text:soft-page-break/>The difference between open and closed questions is well-known but worth stating precisely.</text:p>
      <text:p text:style-name="Text_20_body">Closed questions have a limited answer set. Do you take your medication every day. Have you been checking your blood pressure. These produce yes/no answers that may or may not be honest and don't advance your understanding.</text:p>
      <text:p text:style-name="Text_20_body">Open questions invite the person to tell you something. How have you been managing your medications lately. Tell me what a typical day looks like for you. What's been going on since I was here last. These questions produce real information and they communicate that you're interested in the actual answer rather than checking a box.</text:p>
      <text:p text:style-name="Text_20_body">The best open questions in this context are the ones that invite narrative. Tell me about your morning routine. What was last week like for you. What worries you most about your health right now. Narrative questions give the person space to tell you what's actually important to them rather than what they think you want to hear.</text:p>
      <text:p text:style-name="Text_20_body"><text:span text:style-name="Strong_20_Emphasis">Affirmations</text:span></text:p>
      <text:p text:style-name="Text_20_body">Not praise. Not cheerleading. Genuine recognition of specific strengths and efforts.</text:p>
      <text:p text:style-name="Text_20_body">The distinction matters because this population has usually had enough of being patronized by people who mean well. You're doing great is hollow and they know it. You've been checking your blood pressure every morning even when things have been really stressful — I want you to know that takes real commitment is specific and honest and lands differently.</text:p>
      <text:p text:style-name="Text_20_body">Affirmations serve a clinical purpose beyond making the person feel good. They reinforce the person's sense of their own agency and competence. They build the self-efficacy that research consistently shows predicts behavior change better than knowledge or intention alone. The person who is told specifically and credibly that they are capable of doing hard things has more of the internal resource they need to actually do them.</text:p>
      <text:p text:style-name="Text_20_body"><text:span text:style-name="Strong_20_Emphasis">Summaries</text:span></text:p>
      <text:p text:style-name="Text_20_body">The skill of periodically pulling together what you've heard and offering it back to the person. Not a lecture. A brief synthesis that demonstrates you've been listening and gives the person the chance to correct or add.</text:p>
      <text:p text:style-name="Text_20_body"><text:soft-page-break/>Summaries serve several functions. They demonstrate listening. They create checkpoints where the person can redirect if they feel misheard. They help both parties track what's been covered. And they create natural transition points — after a summary you can ask what feels most important to address today, which returns agency to the person about where the conversation goes.</text:p>
      <text:p text:style-name="Horizontal_20_Line"/>
      <text:p text:style-name="Text_20_body"><text:span text:style-name="Strong_20_Emphasis">Part two: Motivational interviewing in practice</text:span></text:p>
      <text:p text:style-name="Text_20_body">The four processes of MI — engaging, focusing, evoking, planning — as a framework rather than a rigid sequence. Real conversations don't follow a clean sequence and trying to impose one produces stilted interactions. The framework is a map, not a script.</text:p>
      <text:p text:style-name="Text_20_body"><text:span text:style-name="Strong_20_Emphasis">Engaging</text:span></text:p>
      <text:p text:style-name="Text_20_body">The foundation everything else rests on. You cannot do any useful motivational work until the person trusts that you're genuinely there for them rather than for an institutional agenda.</text:p>
      <text:p text:style-name="Text_20_body">Engaging takes as long as it takes. In some relationships it's established quickly because prior trust exists — the advantage of the Working Society CHW serving members they already know. In others it takes months of visits that look like little more than checking in before the person is ready for anything deeper.</text:p>
      <text:p text:style-name="Text_20_body">What engaging looks like. Showing up consistently when you say you will. Doing what you said you would do. Not having a hidden agenda — not pretending to visit when you're actually checking up. Being interested in the person's whole life, not just their medical status. Asking about the garden, the grandkids, the project they mentioned last time.</text:p>
      <text:p text:style-name="Text_20_body">The specific engaging challenge in this population. Self-reliance as a deeply held value means that accepting help, even casual help, requires some surrender of that value. The CHW who manages that carefully — who frames the relationship as collaborative rather than helping, who asks for the person's knowledge and experience rather than always offering their own — preserves the person's sense of self-reliance while building a real relationship.</text:p>
      <text:p text:style-name="Text_20_body"><text:span text:style-name="Strong_20_Emphasis">Focusing</text:span></text:p>
      <text:p text:style-name="Text_20_body">Once the relationship is established — finding the direction. What does this person actually want to work on. Not what you think they should work on based on their diagnosis. What they care about.</text:p>
      <text:p text:style-name="Text_20_body"><text:soft-page-break/>The agenda-setting conversation. Being transparent about what you're there to offer — support for their health — while genuinely leaving the person's priorities at the center. What matters most to you right now. What's been on your mind. If things could be different in six months, what would you most want to be different.</text:p>
      <text:p text:style-name="Text_20_body">The clinical and the personal interweaving. The person whose priority is being able to play with their grandchildren is telling you something about their motivation that's more useful than any diagnosis. The person who says they just want to feel less tired is identifying a symptom that connects to multiple possible causes. The person who says they don't want to end up like their father is giving you the most powerful motivational anchor in the conversation.</text:p>
      <text:p text:style-name="Text_20_body"><text:span text:style-name="Strong_20_Emphasis">Evoking</text:span></text:p>
      <text:p text:style-name="Text_20_body">The part of MI that's most counterintuitive. The goal is not to provide the reasons for change. It's to elicit them from the person.</text:p>
      <text:p text:style-name="Text_20_body">Change talk — the language of motivation for change — is more powerful when it comes from the person than when it comes from you. The reasons you give them are your reasons. The reasons they articulate themselves become theirs.</text:p>
      <text:p text:style-name="Text_20_body">Recognizing change talk. Desire — I want to feel better, I wish I could do more. Ability — I think I could probably do that, I've done harder things before. Reason — it would really help my grandkids if I was healthier. Need — I know I have to do something about this. Commitment — I'm going to try this week. These are the threads to follow when you hear them.</text:p>
      <text:p text:style-name="Text_20_body">Evoking change talk. The importance ruler — on a scale of one to ten how important is it to you to address this. The confidence ruler — on a scale of one to ten how confident are you that you could make this change if you decided to. Why not lower — this is the key question. The person who says importance is a six and you ask why not a three forces them to articulate their own reasons for caring. Those articulated reasons become the motivational material for the conversation.</text:p>
      <text:p text:style-name="Text_20_body">Sustain talk — the language of the other side of ambivalence — is normal and expected. Not to be argued with. Not to be ignored. Reflected with empathy and then gently redirected. The double-sided reflection is the tool here.</text:p>
      <text:p text:style-name="Text_20_body"><text:span text:style-name="Strong_20_Emphasis">Planning</text:span></text:p>
      <text:p text:style-name="Text_20_body"><text:soft-page-break/>When the person has found their motivation and is ready to move — helping them develop a specific, realistic plan.</text:p>
      <text:p text:style-name="Text_20_body">The key word is specific. I'm going to eat better is not a plan. I'm going to stop buying soda when I go to Dollar General and drink water instead is a plan. The difference between intention and behavior change is almost entirely in the specificity of the implementation intention.</text:p>
      <text:p text:style-name="Text_20_body">The small steps principle. The plan has to be something the person genuinely believes they can do. Not what would be optimal. What is actually achievable given their real circumstances right now. A small step that succeeds builds self-efficacy for the next step. An ambitious plan that fails confirms the person's worst fears about their own capability.</text:p>
      <text:p text:style-name="Text_20_body">Anticipating obstacles. What might get in the way of this plan. Not as pessimism but as practical preparation. The person who has thought through the obstacle in advance is more likely to navigate it when it appears.</text:p>
      <text:p text:style-name="Text_20_body">Follow-through and accountability. The CHW will be back. Knowing that someone they trust will ask how it went is a genuine accountability mechanism. Not punitive — the person who didn't follow through needs curiosity not judgment. What got in the way. What did you learn about what's hard about this. What would you do differently. The failure is information, not verdict.</text:p>
      <text:p text:style-name="Horizontal_20_Line"/>
      <text:p text:style-name="Text_20_body"><text:span text:style-name="Strong_20_Emphasis">Part three: The specific textures of rural working class Georgia</text:span></text:p>
      <text:p text:style-name="Text_20_body">This is the section that no generic MI training includes and that this curriculum cannot omit.</text:p>
      <text:p text:style-name="Text_20_body"><text:span text:style-name="Strong_20_Emphasis">Self-reliance and the asking-for-help problem</text:span></text:p>
      <text:p text:style-name="Text_20_body">Self-reliance in this culture is not simply a personality trait. It's a value with deep historical roots — in the specific experience of people who have survived on their own ingenuity and labor when institutions failed them, in a masculinity that equates needing help with weakness, in a reasonable distrust of systems that have repeatedly offered help with strings attached.</text:p>
      <text:p text:style-name="Text_20_body">The CHW who treats self-reliance as an obstacle to overcome will fail. The CHW who treats it as a genuine value to be respected and worked with will succeed.</text:p>
      <text:p text:style-name="Text_20_body"><text:soft-page-break/>What this looks like in practice. Framing the CHW relationship as one neighbor helping another rather than a service being provided. Asking for the person's knowledge and expertise rather than positioning yourself as the expert. Finding ways for the person to contribute — their knowledge, their help with something the community needs — rather than only receiving. Naming self-reliance explicitly as a value you respect while opening the door to the particular kind of mutual aid that doesn't threaten it.</text:p>
      <text:p text:style-name="Text_20_body"><text:span text:style-name="Strong_20_Emphasis">Privacy and the unwillingness to disclose</text:span></text:p>
      <text:p text:style-name="Text_20_body">This population does not readily disclose medical or personal information to people outside the immediate family. Not because they're hiding something but because privacy is how you maintain dignity and control in a world where you have limited power. The clinic that asked about your drinking, the social worker who showed up after someone talked, the neighbor who knew your business — these experiences shape how much people are willing to say.</text:p>
      <text:p text:style-name="Text_20_body">The CHW earns disclosure gradually and never demands it. You don't ask about everything on the first visit or the fifth. You ask about what the person is willing to talk about and you receive whatever they offer with complete discretion. You don't share what you've been told. You don't bring up last visit's disclosure in front of family members without permission. You treat their privacy as a serious obligation rather than a barrier to information gathering.</text:p>
      <text:p text:style-name="Text_20_body"><text:span text:style-name="Strong_20_Emphasis">The masculine identity problem</text:span></text:p>
      <text:p text:style-name="Text_20_body">Men in this population — particularly older men, men who defined themselves through physical capability and productive work — often have the hardest time with the CHW relationship because accepting health support feels like admitting weakness.</text:p>
      <text:p text:style-name="Text_20_body">Several specific strategies. Coming with a concrete task rather than a wellness check. Measuring the blood pressure rather than asking how they're feeling — the instrumental framing is more comfortable than the emotional one. Engaging with what they know and are proud of before addressing health concerns. Finding the connection between their health and the things they care about — being able to work, being there for their family, not ending up like their father — rather than leading with the health concern itself.</text:p>
      <text:p text:style-name="Text_20_body">The man who would never say he's depressed will often talk about how he hasn't been sleeping, how he's been short with everyone, how he doesn't enjoy things he used to. The CHW who can enter that conversation from the side — <text:soft-page-break/>from the sleep, from the not enjoying things — without ever using the word depression is more likely to help than the one who delivers the diagnosis.</text:p>
      <text:p text:style-name="Text_20_body"><text:span text:style-name="Strong_20_Emphasis">Distrust of expertise and institutions</text:span></text:p>
      <text:p text:style-name="Text_20_body">This is rational and should be treated as such. The institutions that were supposed to serve this population have repeatedly failed it. The medical system has often been dismissive, inaccessible, or actively harmful. The CHW who shows up representing something that sounds like an institution triggers that history.</text:p>
      <text:p text:style-name="Text_20_body">The antidote is not defensiveness about the Working Society's legitimacy. It's consistency over time. Showing up when you said you would. Doing what you said you would do. Not having an agenda beyond what you've stated. Being willing to say I don't know rather than covering uncertainty with false confidence. Being willing to say the system failed you on this and I'm sorry rather than defending it.</text:p>
      <text:p text:style-name="Text_20_body">Trust in this population is built slowly and lost quickly. The timeline for a genuine relationship with a person who has been repeatedly let down by institutions is longer than most programs expect. The Working Society's design — the sustained membership relationship, the community integration, the shared participation — creates the conditions for that timeline.</text:p>
      <text:p text:style-name="Text_20_body"><text:span text:style-name="Strong_20_Emphasis">Religion and folk health beliefs</text:span></text:p>
      <text:p text:style-name="Text_20_body">This deserves honest treatment rather than being glossed over.</text:p>
      <text:p text:style-name="Text_20_body">Religious faith is central to many people's understanding of illness, healing, and appropriate response to both. The CHW who dismisses or works around this loses the person. The CHW who engages with it respectfully — who can talk about taking care of the body as consistent with the values the person already holds, who can acknowledge the role of faith and prayer without either endorsing or undermining it — maintains the relationship.</text:p>
      <text:p text:style-name="Text_20_body">Folk health beliefs — specific ideas about illness cause and treatment that circulate in the community and may or may not align with biomedical understanding — require the same approach. The goal is not to correct the wrong belief. It's to understand what the person believes, find the genuine overlap with what you know, and work from that overlap rather than the disagreement.</text:p>
      <text:p text:style-name="Horizontal_20_Line"/>
      <text:p text:style-name="Text_20_body"><text:soft-page-break/><text:span text:style-name="Strong_20_Emphasis">Part four: Difficult conversations</text:span></text:p>
      <text:p text:style-name="Text_20_body">The specific conversations that CHWs find hardest and that require the most preparation.</text:p>
      <text:p text:style-name="Text_20_body"><text:span text:style-name="Strong_20_Emphasis">The person who isn't following their treatment plan</text:span></text:p>
      <text:p text:style-name="Text_20_body">The instinct is to explain why they should. The technique is to get curious about why they aren't. What has been making it hard to keep up with the medication. Not are you taking your medication — that question produces a yes even when the answer is no.</text:p>
      <text:p text:style-name="Text_20_body">Nonadherence has almost always a specific cause. Cost. Side effects that weren't explained. Transportation to the pharmacy. Not understanding why the medication matters when they feel fine. Feeling like the medication isn't working. A belief that the medication is harmful. Fear of what the condition means if they acknowledge needing medication.</text:p>
      <text:p text:style-name="Text_20_body">Each of these has a specific response. Cost — the Working Society's resources, patient assistance programs, generic alternatives. Side effects — acknowledge them as real, explain which ones require the doctor's attention, help them have that conversation. Not understanding why — this is where the module 3 pathophysiology pays off. Explain the mechanism. The person who understands what uncontrolled blood pressure is doing to their kidneys over decades is different from the person who knows their blood pressure is high and doesn't feel anything.</text:p>
      <text:p text:style-name="Text_20_body"><text:span text:style-name="Strong_20_Emphasis">The person in mental health crisis</text:span></text:p>
      <text:p text:style-name="Text_20_body">Covered more fully in module 8 but the communication principles belong here.</text:p>
      <text:p text:style-name="Text_20_body">The person in crisis needs presence more than solutions. The instinct to fix, to reassure, to refer — all of these interrupt the thing they actually need which is to feel genuinely heard by someone who isn't frightened by what they're saying.</text:p>
      <text:p text:style-name="Text_20_body">Asking directly about suicidal ideation. This is the conversation most people avoid because they're afraid that asking will plant the idea. The research is consistent — asking does not increase risk and often reduces it by breaking the isolation around the thought. The question has to be asked directly. Are you thinking about suicide. Are you thinking about hurting yourself. Not — you're not thinking about anything bad, are you.</text:p>
      <text:p text:style-name="Text_20_body"><text:soft-page-break/>What to do with the answer. If yes — stay present, don't leave the person alone, get support. The specific escalation pathway for the Working Society context which is thin on formal resources but has the community structure.</text:p>
      <text:p text:style-name="Text_20_body"><text:span text:style-name="Strong_20_Emphasis">The person who doesn't want your help</text:span></text:p>
      <text:p text:style-name="Text_20_body">The hardest conversation to have gracefully. The person who closes the door, who says they're fine, who makes it clear they don't want what you're offering.</text:p>
      <text:p text:style-name="Text_20_body">The right response is not to push. It's to leave the door open without wedging your foot in it. I understand. I'm not going anywhere and if anything changes or if there's ever something I can help with I'm here. Then follow through on that — keep showing up, keep being a presence in the community, let the relationship exist at whatever level the person is comfortable with.</text:p>
      <text:p text:style-name="Text_20_body">The person who rejected help today may accept it in a year when something changes. The CHW who respected their refusal and maintained the relationship is the person they'll call when that happens.</text:p>
      <text:p text:style-name="Text_20_body"><text:span text:style-name="Strong_20_Emphasis">Delivering hard information</text:span></text:p>
      <text:p text:style-name="Text_20_body">The CHW is not delivering diagnoses. But they will sometimes observe things that need to be said. The blood pressure that's been climbing. The feet that have a wound the person hasn't noticed. The functional decline that the family hasn't acknowledged.</text:p>
      <text:p text:style-name="Text_20_body">The framework for these conversations. Ask permission — can I share something I've been noticing. State the observation specifically and without catastrophizing. Give the person time to respond before continuing. Connect it to something they care about. Identify the next step together.</text:p>
      <text:p text:style-name="Text_20_body">What not to do. Don't soften the observation to the point where it doesn't land. Don't overwhelm with everything you've observed at once. Don't present the information and then move on without space for the person to process it.</text:p>
      <text:p text:style-name="Horizontal_20_Line"/>
      <text:p text:style-name="Text_20_body"><text:span text:style-name="Strong_20_Emphasis">The cohort component</text:span></text:p>
      <text:p text:style-name="Text_20_body">Module 5 has the most extensive mandatory cohort requirement in the curriculum. The skills cannot be learned from text. They have to be practiced with real human beings who respond unpredictably.</text:p>
      <text:p text:style-name="Text_20_body">The role play scenarios have to be realistic enough to be genuinely challenging. Not a cooperative patient who takes every intervention well. A <text:soft-page-break/>person who is defensive about their nonadherence. A man who deflects every health question with a joke. A woman who starts crying unexpectedly. A person who says something that triggers the righting reflex hard — who is doing something the CHW knows is harmful and is not interested in changing.</text:p>
      <text:p text:style-name="Text_20_body">The debrief after each role play is as important as the role play itself. Not just what did you do well and what could be better. What did it feel like when they pushed back. When did you feel the righting reflex. When did you feel the urge to fill the silence. What happened when you let the silence sit.</text:p>
      <text:p text:style-name="Text_20_body">Self-awareness as a clinical skill. The CHW who knows their own triggers, their own areas of discomfort, their own tendencies under pressure is a safer and more effective practitioner than one who doesn't. The cohort sessions create the low-stakes conditions for that self-knowledge to develop.</text:p>
      <text:p text:style-name="Text_20_body">Pairs practice outside the sessions. Take each other's blood pressure and practice the conversation around what you find. Visit each other's homes and practice the home visit observation. Build the skills into the fabric of community life rather than confining them to formal training sessions.</text:p>
      <text:p text:style-name="Horizontal_20_Line"/>
      <text:p text:style-name="Text_20_body"><text:span text:style-name="Strong_20_Emphasis">The closing section</text:span></text:p>
      <text:p text:style-name="Text_20_body">Module 5 ends with the honest statement of what you're being asked to develop.</text:p>
      <text:p text:style-name="Text_20_body">This is not a set of techniques to be deployed on people. It's a quality of presence and attention that you bring to every interaction with a person you're responsible for. The techniques are the scaffolding. What they're building toward is the capacity to be genuinely useful to another human being in the moments when it matters most.</text:p>
      <text:p text:style-name="Text_20_body">That capacity is developed slowly. The CHW who has been doing this work for five years brings something to a difficult conversation that the one who finished training last month doesn't yet have. Not because the techniques are different but because the self-knowledge, the comfort with difficulty, the ability to stay present without being overwhelmed — these accumulate through experience in a way that can't be shortcut.</text:p>
      <text:p text:style-name="Text_20_body">Be patient with yourself. Be patient with the people you're working with. The timeline of real change is longer than anyone wants it to be and shorter than despair says it is.</text:p>
      <text:p text:style-name="P9"><text:soft-page-break/></text:p>
      <text:p text:style-name="P9"/>
      <text:p text:style-name="P9">6. Social Determinants</text:p>
      <text:p text:style-name="P9"/>
      <text:p text:style-name="P19"><text:span text:style-name="Strong_20_Emphasis">The framing section</text:span></text:p>
      <text:p text:style-name="Text_20_body">Open with a direct statement of the central finding of social epidemiology.</text:p>
      <text:p text:style-name="Text_20_body">Where you are born, how much money your family has, what work you do, how much education you received, whether you feel safe in your neighborhood, whether you have people around you who care about you — these factors predict your health outcomes more reliably than your access to medical care, your genetics, or almost anything else we can measure.</text:p>
      <text:p text:style-name="Text_20_body">This is not a political argument. It's one of the most replicated findings in public health research. The gradient between socioeconomic position and health outcomes is consistent across countries, across time periods, and across almost every disease category. It holds even after controlling for health behaviors. It holds even among people with good access to medical care.</text:p>
      <text:p text:style-name="Text_20_body">The implication for the CHW is not that clinical knowledge is useless. It's that clinical knowledge without understanding of the context in which health and illness are produced is systematically incomplete. The CHW who treats the hypertension without understanding the chronic economic stress driving it is addressing the downstream effect while the upstream cause continues operating.</text:p>
      <text:p text:style-name="Horizontal_20_Line"/>
      <text:p text:style-name="Text_20_body"><text:span text:style-name="Strong_20_Emphasis">Part one: The mechanisms</text:span></text:p>
      <text:p text:style-name="Text_20_body"><text:span text:style-name="Strong_20_Emphasis">Economic precarity as physiological condition</text:span></text:p>
      <text:p text:style-name="Text_20_body">Build directly on the cortisol pathway from module 3.</text:p>
      <text:p text:style-name="Text_20_body">Chronic economic insecurity — not acute financial crisis but the sustained background condition of not having enough, of precarious employment, of bills that can't all be paid, of one car breakdown away from losing the job — activates the HPA axis in exactly the way that produces the chronic disease picture.</text:p>
      <text:p text:style-name="Text_20_body">The research on this is precise. Studies measuring cortisol in saliva throughout the day find elevated baseline cortisol in people experiencing economic precarity compared to economically secure controls. The elevation is not dramatic — it's not the acute cortisol spike of a physical threat. It's a persistent modest elevation that runs continuously.</text:p>
      <text:p text:style-name="Text_20_body"><text:soft-page-break/>Over years and decades that persistent modest elevation produces the full picture from module 3. Insulin resistance. Visceral fat accumulation. Blood pressure elevation. Immune dysregulation. Sleep disruption. Impaired prefrontal cortex function. Accelerated telomere shortening.</text:p>
      <text:p text:style-name="Text_20_body">The Whitehall studies in Britain — the most important longitudinal research on this question — followed British civil servants for decades and found a gradient of health outcomes that tracked precisely with employment grade. Not just poor versus not-poor. A gradient all the way up the hierarchy. Every step down in the hierarchy produced worse health outcomes even among people who were not poor by any conventional measure. The mechanism was chronic stress activation associated with lower control, lower status, and higher demand — not poverty per se but the physiological experience of subordination and precarity.</text:p>
      <text:p text:style-name="Text_20_body">In Franklin County the population the Working Society serves isn't on the middle rungs of the civil service hierarchy. They're at the bottom of an economy that has systematically divested from rural communities over fifty years. The chronic stress load is not abstract.</text:p>
      <text:p text:style-name="Text_20_body"><text:span text:style-name="Strong_20_Emphasis">The cognitive bandwidth tax</text:span></text:p>
      <text:p text:style-name="Text_20_body">The Mullainathan and Shafir scarcity research in plain language.</text:p>
      <text:p text:style-name="Text_20_body">When you're managing ongoing financial precarity your mind is never fully free. Some portion of your cognitive capacity is continuously occupied with the calculations of not enough. Can I make it to payday. Which bill is most urgent. What happens if the car breaks down. What if I get sick and can't work.</text:p>
      <text:p text:style-name="Text_20_body">This background processing is not voluntary. It's not worrying in the colloquial sense. It's the mind doing what minds are supposed to do — attending to urgent threats. The problem is that when the threat is chronic and unresolvable the attending never stops.</text:p>
      <text:p text:style-name="Text_20_body">The cognitive tax this produces is measurable. Studies find roughly 13 IQ points of reduction in cognitive performance in people who were primed to think about financial stress. Studies of sugar cane farmers in India find significantly worse cognitive performance during the pre-harvest period of greatest economic stress compared to post-harvest when money is available. The same people. Dramatically different cognitive performance based on financial stress alone.</text:p>
      <text:p text:style-name="Text_20_body"><text:soft-page-break/>For the CHW this means several things. The member who seems to make poor decisions, who doesn't follow through, who can't seem to plan ahead — this is often the cognitive tax of chronic scarcity rather than character or intelligence. The member who agrees to something in the visit and then doesn't do it — the plan may have been entirely sincere but the cognitive bandwidth to execute it may genuinely not have been available.</text:p>
      <text:p text:style-name="Text_20_body">It also means that interventions which reduce the economic stress — even partially — are health interventions. The Working Society's kin economy addresses this directly. So does practical help with specific financial problems. Connecting someone to a patient assistance program that eliminates a $200 monthly medication cost is not just an economic intervention. It's a cognitive and physiological intervention.</text:p>
      <text:p text:style-name="Text_20_body"><text:span text:style-name="Strong_20_Emphasis">Social isolation as biological threat</text:span></text:p>
      <text:p text:style-name="Text_20_body">The mortality statistics on loneliness need to be stated plainly because they're genuinely remarkable and almost unknown.</text:p>
      <text:p text:style-name="Text_20_body">Social isolation and loneliness are associated with a 26-29% increased risk of mortality. The effect size is comparable to smoking 15 cigarettes per day. It's larger than the effect of obesity. This is not a soft finding from a handful of studies. It's a meta-analysis of 148 studies covering more than 300,000 participants.</text:p>
      <text:p text:style-name="Text_20_body">The mechanism runs through multiple pathways simultaneously. Chronic activation of the threat response — social isolation is registered as a threat by a brain that evolved in social groups where isolation meant vulnerability. Dysregulation of the immune system — studies find that isolated people show elevated inflammatory markers and impaired immune responses to infection. Disruption of health behaviors — isolated people are less likely to maintain health behaviors, less likely to seek care, less likely to adhere to treatment.</text:p>
      <text:p text:style-name="Text_20_body">The gene expression research is particularly striking. Studies using genome-wide expression analysis find that chronic loneliness produces a characteristic pattern of gene expression — upregulation of genes involved in inflammation and threat response, downregulation of genes involved in antiviral defense and antibody production. Social isolation is getting under the skin at the genetic expression level.</text:p>
      <text:p text:style-name="Text_20_body">In Franklin County social isolation is not a marginal condition. It's widespread and worsening. The institutional structures that used to provide <text:soft-page-break/>connection — churches at full strength, active civic organizations, local employers where people spent decades alongside the same people — have weakened over the same period that the chronic disease burden has risen. This is not coincidence.</text:p>
      <text:p text:style-name="Text_20_body"><text:span text:style-name="Strong_20_Emphasis">The food environment</text:span></text:p>
      <text:p text:style-name="Text_20_body">Specific to Franklin County and rural Georgia rather than generic.</text:p>
      <text:p text:style-name="Text_20_body">The dollar store phenomenon deserves specific treatment. Dollar stores — Dollar General, Dollar Tree, Family Dollar — have expanded aggressively into rural communities over the past two decades, often becoming the primary grocery option in communities that have lost their supermarkets. The product mix at dollar stores is predominantly ultra-processed food — shelf-stable, calorie-dense, nutritionally poor. Fresh produce is absent or minimal.</text:p>
      <text:p text:style-name="Text_20_body">This is a documented public health problem. Studies of rural food environments find that communities with high dollar store density and low supermarket access have measurably worse dietary patterns and worse metabolic health outcomes. The people living in these communities are not making poor food choices. They are making the best choices available to them in a food environment that has been systematically impoverished.</text:p>
      <text:p text:style-name="Text_20_body">The distance to fresh food matters physiologically. Not as metaphor. As a real barrier that produces real dietary patterns that produce real metabolic outcomes. The person in rural Franklin County who doesn't have reliable transportation and whose nearest supermarket is 30 minutes away eats differently than someone with a grocery store within walking distance. That difference accumulates over years into measurable differences in health.</text:p>
      <text:p text:style-name="Text_20_body">For the CHW this means that dietary counseling which doesn't account for the actual food environment is worse than useless — it's victim-blaming dressed as health education. What can you actually access. What can you actually afford. What's available at the dollar store that's less harmful than the other options. How can the community garden and communal kitchen change what's actually available. These are the real questions.</text:p>
      <text:p text:style-name="Text_20_body"><text:span text:style-name="Strong_20_Emphasis">Transportation as the hidden determinant</text:span></text:p>
      <text:p text:style-name="Text_20_body">In urban public health discussions transportation rarely appears because it's assumed. In rural Georgia it's one of the most important health determinants and it's almost never named.</text:p>
      <text:p text:style-name="Text_20_body"><text:soft-page-break/>No reliable transportation means medications not picked up when the copay is due and there's no ride to the pharmacy. It means follow-up appointments not kept because there's no way to get there and no one to ask. It means the specialist referral that sits on the refrigerator for three months before expiring. It means the emergency that got managed at home because calling an ambulance felt impossible. It means the diet determined by what's within walking distance or what whoever gives you rides happens to pass.</text:p>
      <text:p text:style-name="Text_20_body">In Franklin County the public transportation infrastructure is minimal. Dependence on personal vehicles in a population where vehicle reliability is variable and driving capacity may be limited by age or health is a specific and serious access barrier.</text:p>
      <text:p text:style-name="Text_20_body">For the CHW transportation is both an assessment item — do you have reliable transportation, how did you get to your last appointment, is there anything you've been unable to do because of transportation — and an intervention target. The Working Society's transit service addresses this directly. Knowing what's available and connecting people to it is a genuine health intervention.</text:p>
      <text:p text:style-name="Text_20_body"><text:span text:style-name="Strong_20_Emphasis">Housing quality</text:span></text:p>
      <text:p text:style-name="Text_20_body">The specific housing stock of rural Franklin County. Older manufactured housing. Older frame construction. Deferred maintenance that accumulates when income is insufficient and the skills or time to maintain the property are absent.</text:p>
      <text:p text:style-name="Text_20_body">The specific health hazards of this housing stock. Lead paint in pre-1978 construction — still present in enormous quantities in rural housing. Mold from roof leaks, foundation moisture, inadequate ventilation. Inadequate insulation producing temperature extremes — cold in winter, heat in summer. Combustion appliances without adequate ventilation. Pest infestation. Well water at elevated risk when septic systems fail or are undersized.</text:p>
      <text:p text:style-name="Text_20_body">The health outcomes associated with poor housing quality are well-documented. Lead exposure and neurodevelopmental effects in children. Mold and respiratory disease. Temperature extremes and cardiovascular stress in elderly people. The general relationship between housing instability and chronic stress and all of its downstream effects.</text:p>
      <text:p text:style-name="Text_20_body">For the CHW the home visit is simultaneously a housing assessment. What are you seeing. What does the temperature feel like. What does it smell like. <text:soft-page-break/>What's the condition of the walls and ceiling. What's the water look like when it runs. These observations connect to health outcomes in ways that are direct and mechanistic.</text:p>
      <text:p text:style-name="Text_20_body"><text:span text:style-name="Strong_20_Emphasis">Adverse childhood experiences</text:span></text:p>
      <text:p text:style-name="Text_20_body">The ACE framework established in module 3 in expanded applied form here.</text:p>
      <text:p text:style-name="Text_20_body">The ACE score — abuse, neglect, household dysfunction — predicts adult health outcomes with remarkable consistency and dose-response linearity. Each additional ACE type in childhood increases the probability of every major chronic disease category in adulthood. The mechanisms run through the same HPA axis pathways — early life adversity programs the stress response system in ways that persist across the lifespan.</text:p>
      <text:p text:style-name="Text_20_body">In the population the Working Society serves high ACE burden is not the exception. Economic precarity, substance use in the household, domestic violence, parental mental illness, incarceration — these are the conditions that produce ACEs and they've been heavily concentrated in rural working class communities over the same decades that economic disinvestment has proceeded.</text:p>
      <text:p text:style-name="Text_20_body">The practical implication for the CHW. The 55 year old man with hypertension, diabetes, depression, and chronic pain is carrying the accumulated physiological effects of his entire life history, not just the last decade. The childhood in a household with an alcoholic father, the adolescence marked by poverty and instability, the decades of economically precarious work that damaged his body — all of it is present in the body sitting across from you. The clinical picture is the biography made flesh.</text:p>
      <text:p text:style-name="Text_20_body">This doesn't change what you do in any simple sense. But it changes how you understand what you're seeing and how you hold the person in front of you. With the weight of their full history rather than just their current diagnosis.</text:p>
      <text:p text:style-name="Horizontal_20_Line"/>
      <text:p text:style-name="Text_20_body"><text:span text:style-name="Strong_20_Emphasis">Part two: Franklin County specifically</text:span></text:p>
      <text:p text:style-name="Text_20_body">This section is intentionally local. It will need updating as conditions change but the specificity is the point.</text:p>
      <text:p text:style-name="Text_20_body"><text:span text:style-name="Strong_20_Emphasis">The economic history</text:span></text:p>
      <text:p text:style-name="Text_20_body"><text:soft-page-break/>What happened to the economic base of Franklin County over the past fifty years. The manufacturing jobs that left. The agricultural consolidation that reduced the number of farm operations and the number of people employed in agriculture. The decline of the small business economy of the county seat as retail consolidated into distant big-box stores. The loss of the local hospital as a major employer.</text:p>
      <text:p text:style-name="Text_20_body">This isn't background color. It's the direct cause of the chronic economic precarity that's driving the health outcomes. The community didn't develop a culture of poor health behaviors. It experienced a systematic withdrawal of the economic conditions that supported health. Understanding this history is part of understanding the health picture.</text:p>
      <text:p text:style-name="Text_20_body"><text:span text:style-name="Strong_20_Emphasis">The current employment picture</text:span></text:p>
      <text:p text:style-name="Text_20_body">What work is available in Franklin County. What it pays. What it does to bodies. The physical demands of the available work — poultry processing, construction, agricultural labor, healthcare work — and the specific injury and health patterns associated with each. The instability of the available work. The absence of work that provides health insurance at meaningful levels.</text:p>
      <text:p text:style-name="Text_20_body"><text:span text:style-name="Strong_20_Emphasis">The healthcare landscape</text:span></text:p>
      <text:p text:style-name="Text_20_body">What actually exists and what's actually accessible. The distance to the nearest hospital. The nearest emergency department. The nearest psychiatric services. The reality of the primary care availability — appointment availability, cost, what insurance covers and what it doesn't.</text:p>
      <text:p text:style-name="Text_20_body">The specific inaccessibility of mental health services. The specific inaccessibility of specialty care. The cost of medications that this population is commonly prescribed. The pharmacy availability and hours.</text:p>
      <text:p text:style-name="Text_20_body">Named honestly and specifically so the CHW doesn't operate with illusions about what exists.</text:p>
      <text:p text:style-name="Text_20_body"><text:span text:style-name="Strong_20_Emphasis">The community assets</text:span></text:p>
      <text:p text:style-name="Text_20_body">The other side of the picture. What exists in Franklin County that supports health and wellbeing.</text:p>
      <text:p text:style-name="Text_20_body">UGA Extension and its programs. The agricultural knowledge and community infrastructure that still exists in a county with significant farming history. The churches as community infrastructure even as their health role has been underutilized. The informal mutual aid networks that already exist — the <text:soft-page-break/>neighbors who check on each other, the families who share food and labor, the community responses to individual crisis that happen without organizational structure.</text:p>
      <text:p text:style-name="Text_20_body">The Working Society is not building on empty ground. It's building on a community that has existing strengths and existing relationships and existing informal mutual aid practices. Understanding those assets is as important as understanding the deficits.</text:p>
      <text:p text:style-name="Horizontal_20_Line"/>
      <text:p text:style-name="Text_20_body"><text:span text:style-name="Strong_20_Emphasis">Part three: What the CHW does with this</text:span></text:p>
      <text:p text:style-name="Text_20_body">The module can't end with the social determinants as a picture of forces the CHW can't change. It has to close with what the CHW can actually do.</text:p>
      <text:p text:style-name="Text_20_body"><text:span text:style-name="Strong_20_Emphasis">Seeing the whole person in context</text:span></text:p>
      <text:p text:style-name="Text_20_body">The most immediate application. The CHW who has absorbed this module sees the person in front of them differently. Not just their diagnoses but their life conditions. The housing. The work. The food environment. The social connections. The economic stress. The history.</text:p>
      <text:p text:style-name="Text_20_body">This seeing changes the assessment. The blood pressure reading is interpreted differently when you know the person is currently facing eviction. The medication nonadherence is interpreted differently when you know the pharmacy is 35 minutes away and they don't have reliable transportation. The dietary pattern is interpreted differently when you know the nearest source of fresh produce is a 25-minute drive.</text:p>
      <text:p text:style-name="Text_20_body"><text:span text:style-name="Strong_20_Emphasis">Addressing what's addressable</text:span></text:p>
      <text:p text:style-name="Text_20_body">Some of the social determinants are not addressable by a CHW. The structural conditions that produced rural economic decline are decades in the making and won't be changed by any individual intervention. The CHW who tries to fix the unfixable will burn out and feel ineffective.</text:p>
      <text:p text:style-name="Text_20_body">But within the fixed structural conditions there are specific problems with specific solutions. The medication cost that can be addressed through a patient assistance program. The transportation barrier that can be addressed through the Working Society's transit network. The food access problem that can be partially addressed through the community garden and communal kitchen. The isolation that can be addressed through connection to the community.</text:p>
      <text:p text:style-name="Text_20_body"><text:soft-page-break/>These are not solutions to the structural problems. They're responses to the specific expressions of those problems in individual lives. That's what's available and it's genuinely valuable.</text:p>
      <text:p text:style-name="Text_20_body"><text:span text:style-name="Strong_20_Emphasis">Documenting social determinants</text:span></text:p>
      <text:p text:style-name="Text_20_body">The CHW's documentation should capture the social context alongside the clinical findings. Not as a social work assessment but as clinically relevant information.</text:p>
      <text:p text:style-name="Text_20_body">Transportation barriers noted. Food security questioned — member reports inconsistent food access. Housing concern — visible mold in bathroom, member reports roof has been leaking. Social isolation — member reports minimal contact outside household since spouse passed.</text:p>
      <text:p text:style-name="Text_20_body">This documentation serves two purposes. It creates a record of the contextual factors affecting this person's health that any subsequent CHW or clinical contact can use. And it contributes to the Working Society's aggregate understanding of the conditions affecting its membership — information that can shape organizational priorities and resource allocation.</text:p>
      <text:p text:style-name="Text_20_body"><text:span text:style-name="Strong_20_Emphasis">Advocacy within the organization</text:span></text:p>
      <text:p text:style-name="Text_20_body">The CHW who sees patterns across multiple member households is in a position to advocate for organizational responses. Multiple members without transportation to their pharmacy suggests a pharmacy run as a regular Working Society service. Multiple members with food insecurity suggests expansion of the communal kitchen or food pantry function. Multiple members in housing with mold problems suggests a housing assessment and remediation working group.</text:p>
      <text:p text:style-name="Text_20_body">The CHW is not just responding to individual circumstances. They're the organization's most direct source of information about what the membership actually needs. That information belongs in the organizational decision-making process.</text:p>
      <text:p text:style-name="Horizontal_20_Line"/>
      <text:p text:style-name="Text_20_body"><text:span text:style-name="Strong_20_Emphasis">The closing section</text:span></text:p>
      <text:p text:style-name="Text_20_body">Module 6 closes with the integration of everything it's covered into a single honest statement.</text:p>
      <text:p text:style-name="Text_20_body"><text:soft-page-break/>The person you're visiting is not a collection of diagnoses. They are the product of their entire history — their childhood, their work, their economic circumstances, their relationships, their losses, their community — acting on a body that has been responding to those conditions with everything it has for decades.</text:p>
      <text:p text:style-name="Text_20_body">The chronic disease you're helping them manage is in large part the biological record of that history. The hypertension is decades of economic stress made flesh. The diabetes is years of food environment and physical exhaustion and cortisol and impaired sleep made flesh. The depression is isolation and loss of purpose and the accumulated weight of a life made harder than it needed to be, made flesh.</text:p>
      <text:p text:style-name="Text_20_body">Understanding this doesn't excuse you from the clinical work. The blood pressure still needs monitoring. The medications still need to be taken. The feet still need examining. But it situates the clinical work inside a complete picture of what's actually going on.</text:p>
      <text:p text:style-name="Text_20_body">And it reminds you that the most powerful health intervention available to this population isn't better medication management or more accurate vital sign assessment. It's rebuilding the conditions for human flourishing. Belonging. Purpose. Economic sufficiency. Real food. Safe housing. Connection to people who know and care about you.</text:p>
      <text:p text:style-name="Text_20_body">That's what the Working Society is building. The CHW program is one part of it. The whole is the health intervention.</text:p>
      <text:p text:style-name="P9"/>
      <text:p text:style-name="P9"/>
      <text:p text:style-name="P9"><text:span text:style-name="T8">7</text:span>. Mental Health and Substance Abuse</text:p>
      <text:p text:style-name="P9"/>
      <text:p text:style-name="P19"><text:span text:style-name="Strong_20_Emphasis">The framing section</text:span></text:p>
      <text:p text:style-name="Text_20_body">Open with the reframe we arrived at in conversation.</text:p>
      <text:p text:style-name="Text_20_body">Mental health in this population is not primarily a matter of individual brain chemistry gone wrong. It is the predictable human response to conditions that would strain any person's capacity to cope — chronic economic precarity, social isolation, physical illness, loss of meaningful work and purpose, adverse childhood experiences, and the accumulated weight of a life made harder than it needed to be.</text:p>
      <text:p text:style-name="Text_20_body"><text:soft-page-break/>This doesn't mean psychiatric conditions aren't real. They are. The suffering is genuine. The physiological changes are measurable. But understanding the causes — which are largely social and structural — changes how you see the person in front of you and what you understand yourself to be doing when you try to help.</text:p>
      <text:p text:style-name="Text_20_body">The person isn't broken. Their circumstances have exceeded their resources. Those are different problems requiring different responses.</text:p>
      <text:p text:style-name="Horizontal_20_Line"/>
      <text:p text:style-name="Text_20_body"><text:span text:style-name="Strong_20_Emphasis">Part one: The neuroscience foundation</text:span></text:p>
      <text:p text:style-name="Text_20_body">Build directly on module 2's nervous system section and module 3's cortisol pathway and depression pathway.</text:p>
      <text:p text:style-name="Text_20_body"><text:span text:style-name="Strong_20_Emphasis">The stress response system revisited</text:span></text:p>
      <text:p text:style-name="Text_20_body">The HPA axis under chronic activation. The specific brain changes that chronic stress produces — hippocampal volume reduction, prefrontal cortex impairment, amygdala hyperreactivity. These aren't metaphors. They're structural changes visible on brain imaging in people with chronic stress and depression histories.</text:p>
      <text:p text:style-name="Text_20_body">What this means functionally. The hippocampus — critical for memory consolidation and contextualizing threat — shrinks under chronic cortisol exposure. The person with a long trauma and stress history has measurably impaired memory and a reduced capacity to put current threats in context. The amygdala — the threat detection center — becomes hyperreactive. Stimuli that wouldn't register as threatening to someone with a regulated nervous system trigger strong responses. The prefrontal cortex — executive function, planning, emotional regulation, the capacity to think before acting — is functionally impaired by chronic stress activation.</text:p>
      <text:p text:style-name="Text_20_body">This explains the behavioral picture that gets misread as character failing. The impulsivity. The difficulty planning ahead. The strong reactions to seemingly minor provocations. The difficulty maintaining commitments. These are the functional consequences of a nervous system that has been operating under chronic threat for years or decades.</text:p>
      <text:p text:style-name="Text_20_body"><text:span text:style-name="Strong_20_Emphasis">Neurotransmitters and mood</text:span></text:p>
      <text:p text:style-name="Text_20_body">The monoamine systems in plain language. Serotonin — involved in mood regulation, impulse control, sleep, appetite. Dopamine — involved in <text:soft-page-break/>motivation, reward, pleasure, the anticipation of good outcomes. Norepinephrine — involved in alertness, energy, the stress response.</text:p>
      <text:p text:style-name="Text_20_body">Chronic stress dysregulates all three systems. Depression is in part the consequence of sustained downregulation of these systems under chronic stress. Anxiety is in part the consequence of sustained upregulation of the threat-response components of these systems.</text:p>
      <text:p text:style-name="Text_20_body">Antidepressants work by modulating these systems. SSRIs increase serotonin availability. SNRIs increase both serotonin and norepinephrine. Bupropion affects dopamine and norepinephrine. The CHW doesn't prescribe these but understanding the mechanism helps them understand why someone might be on them and what they're supposed to do.</text:p>
      <text:p text:style-name="Text_20_body">The substance use connection. Every major substance of abuse acts on these same neurotransmitter systems. Alcohol enhances GABA — the inhibitory system — and reduces the stress response temporarily. Opioids activate the dopamine reward system powerfully. Stimulants flood dopamine and norepinephrine systems. The person who self-medicates with alcohol or opioids is doing something that makes complete pharmacological sense — they're using available substances to achieve what the dysregulated system can no longer achieve on its own. Understanding this removes the moral frame from substance use and replaces it with a mechanistic one.</text:p>
      <text:p text:style-name="Text_20_body"><text:span text:style-name="Strong_20_Emphasis">The window of tolerance</text:span></text:p>
      <text:p text:style-name="Text_20_body">This concept from trauma theory deserves plain language treatment because it's one of the most practically useful frameworks for understanding what you see in this population.</text:p>
      <text:p text:style-name="Text_20_body">The window of tolerance is the zone of arousal within which a person can function well — can think clearly, connect with others, regulate their emotions, respond flexibly to what's happening. Below it — hypoarousal — the person is shut down, disconnected, numb, dissociated. Above it — hyperarousal — the person is overwhelmed, reactive, flooded, unable to think clearly.</text:p>
      <text:p text:style-name="Text_20_body">Trauma narrows the window of tolerance. The person with a significant trauma history has a narrower range within which they can function well and gets pushed outside that range more easily by less provocation. Ordinary stress — an unexpected bill, a difficult conversation, a minor conflict — can push them outside their window in ways that look disproportionate to the situation.</text:p>
      <text:p text:style-name="Text_20_body"><text:soft-page-break/>The CHW's job in many interactions is to help the person stay within their window of tolerance. Not by avoiding difficult topics but by approaching them at the right pace, in the right conditions, with the right quality of presence. The regulated nervous system of the CHW — calm, present, not reactive — has a direct co-regulatory effect on the dysregulated nervous system of the person they're with. This is not a metaphor. Nervous systems regulate each other through the social engagement system. Your calm is genuinely contagious.</text:p>
      <text:p text:style-name="Horizontal_20_Line"/>
      <text:p text:style-name="Text_20_body"><text:span text:style-name="Strong_20_Emphasis">Part two: The conditions</text:span></text:p>
      <text:p text:style-name="Text_20_body">Not a diagnostic manual. A practical guide to what the CHW will actually encounter, what it looks like in this population, and what matters about each condition.</text:p>
      <text:p text:style-name="Text_20_body"><text:span text:style-name="Strong_20_Emphasis">Depression</text:span></text:p>
      <text:p text:style-name="Text_20_body">The clinical picture versus the real-world presentation. Clinical criteria — depressed mood, loss of interest or pleasure, changes in sleep and appetite, fatigue, difficulty concentrating, feelings of worthlessness, thoughts of death. These are real and present but they're rarely how a rural working class person presents.</text:p>
      <text:p text:style-name="Text_20_body">The real-world presentation. Irritability more than sadness — particularly in men. Withdrawal from previously enjoyed activities described as not feeling like it rather than anhedonia. Sleep changes described as just tired or can't sleep rather than insomnia or hypersomnia. Physical complaints — fatigue, chronic pain, headaches — that have been worked up medically without finding a cause. Increased alcohol use described as just having a few to take the edge off. Decreased engagement with work, family, community described in practical terms rather than emotional ones.</text:p>
      <text:p text:style-name="Text_20_body">The person who would never say they're depressed will often acknowledge every item on this list when you ask about it in concrete terms. How have you been sleeping. Do you still enjoy fishing — you mentioned you used to go every weekend. Have you been drinking more than usual. How's your energy been.</text:p>
      <text:p text:style-name="Text_20_body">The severity spectrum. Mild depression that responds to lifestyle changes and social connection. Moderate depression where medication may significantly help and where function is impaired. Severe depression where the person is significantly disabled and where the risk of self-harm is elevated. The CHW <text:soft-page-break/>needs to be able to roughly locate someone on this spectrum because it determines what the appropriate response is.</text:p>
      <text:p text:style-name="Text_20_body">The duration dimension. Situational depression in response to a specific loss or stressor — grief, job loss, health diagnosis — that resolves as the person adapts. Persistent depressive disorder — the low-grade chronic depression that has been present for so long the person considers it just how they are. Major depressive episodes — more severe, episodic, more clearly biological in character. These respond differently and the CHW's response needs to account for the difference.</text:p>
      <text:p text:style-name="Text_20_body"><text:span text:style-name="Strong_20_Emphasis">Anxiety</text:span></text:p>
      <text:p text:style-name="Text_20_body">Often co-occurs with depression and shares many of the same upstream causes. Worth treating separately because the presentation is distinct and because anxiety is often the dominant complaint while depression is the underlying condition.</text:p>
      <text:p text:style-name="Text_20_body">The spectrum from normal adaptive anxiety — the worry that prompts you to prepare for a real threat — to generalized anxiety disorder — pervasive, uncontrollable worry that the person experiences as not being able to turn off their brain — to panic disorder — episodic intense physical experiences of fear that often get misread as cardiac or respiratory emergencies.</text:p>
      <text:p text:style-name="Text_20_body">The panic attack deserves specific attention because the CHW may encounter it and because misidentification is common and consequential. Rapid heart rate, chest tightness, shortness of breath, dizziness, feeling of impending doom — the person is convinced they're having a heart attack. The physical symptoms are real and distressing. The challenge is distinguishing a panic attack from an actual cardiac event, particularly in someone with cardiac risk factors.</text:p>
      <text:p text:style-name="Text_20_body">The practical guidance. A first episode of these symptoms in someone with cardiac risk factors warrants emergency evaluation. A person with known panic disorder having a recognized episode benefits from calm presence, grounding techniques, reassurance. The CHW who knows this person's history is better positioned to make this judgment than an emergency responder seeing them for the first time.</text:p>
      <text:p text:style-name="Text_20_body">Anxiety in this population frequently presents as physical symptoms — headaches, GI distress, muscle tension, fatigue — that have been worked up repeatedly without medical explanation. The connection to anxiety is often not made because nobody asked about the anxiety. The CHW who asks how have <text:soft-page-break/>you been feeling about things, whether there are things you find yourself worrying about a lot opens a door that a physical exam doesn't.</text:p>
      <text:p text:style-name="Text_20_body"><text:span text:style-name="Strong_20_Emphasis">Post-traumatic stress</text:span></text:p>
      <text:p text:style-name="Text_20_body">Given the population baseline we established this deserves its own section rather than being subsumed under anxiety.</text:p>
      <text:p text:style-name="Text_20_body">PTSD in clinical terms requires a specific traumatic event — threat to life or physical integrity, direct experience or witness. But the broader category of trauma response includes the effects of chronic complex trauma — the kind produced by adverse childhood experiences, sustained economic precarity, chronic illness, and the accumulated losses of a difficult life — which doesn't require a single identifiable traumatic event.</text:p>
      <text:p text:style-name="Text_20_body">What trauma response looks like in this population. Hypervigilance — a persistent sense of threat, difficulty relaxing, always scanning for danger. Intrusive recollections — not necessarily dramatic flashbacks but intrusive thoughts and images that surface unexpectedly. Avoidance — steering away from situations, people, or places that trigger the trauma material. Emotional numbing — the disconnection from feeling that serves as a protective mechanism but impairs relationships and enjoyment of life. Sleep disturbance — difficulty falling asleep, waking at night, nightmares.</text:p>
      <text:p text:style-name="Text_20_body">The connection to physical health. Hypervigilance is a sustained sympathetic activation state. The person who is chronically hypervigilant is chronically in low-level fight-or-flight. All of the downstream physiological effects of chronic stress activation apply — the hypertension, the insulin resistance, the immune dysregulation, the sleep disruption.</text:p>
      <text:p text:style-name="Text_20_body">The CHW role with trauma. Not trauma processing — that requires specific training and the right therapeutic relationship. But trauma-informed presence. Understanding that what looks like resistance or hostility or noncompliance may be trauma response. Understanding that building trust is slower and requires more consistent demonstration of reliability with someone with a significant trauma history. Understanding that certain topics — certain questions, certain environments — may trigger trauma responses and learning to notice when that's happening.</text:p>
      <text:p text:style-name="Text_20_body"><text:span text:style-name="Strong_20_Emphasis">Substance use</text:span></text:p>
      <text:p text:style-name="Text_20_body">Restate the framing from module 3 and module 5 — self-medication of dysregulated systems, rational response to available tools.</text:p>
      <text:p text:style-name="Text_20_body"><text:soft-page-break/>The major categories in this population. Alcohol — by far the most common, highly normalized, the harm often invisible for years before it becomes dramatic. Opioids — both prescribed and illicit, the transition from legitimate prescription to dependence is common and the person often doesn't identify as having a substance use problem because it started medically. Methamphetamine — present in rural Georgia, underappreciated as a mental health driver in both directions — the stimulant use and the crash and the psychosis that can develop with heavy chronic use. Cannabis — widely used, the harm profile is lower than most other substances but heavy chronic use has real effects on motivation and cognitive function and can worsen psychotic disorders.</text:p>
      <text:p text:style-name="Text_20_body">Alcohol deserves specific depth because of its prevalence and because the progression is so often invisible.</text:p>
      <text:p text:style-name="Text_20_body">The stages of alcohol use disorder. Hazardous use — drinking in ways that put the person at risk but haven't produced clear consequences. Harmful use — drinking that has produced consequences — health, relationship, work — but where the person maintains control. Dependence — where stopping produces withdrawal symptoms and where the drinking has become compulsive rather than chosen. Severe dependence — where the alcohol is physiologically necessary and where withdrawal is a medical emergency.</text:p>
      <text:p text:style-name="Text_20_body">Alcohol withdrawal deserves specific treatment because the CHW may encounter it and because it can be life-threatening. Unlike opioid withdrawal which is deeply miserable but not typically dangerous, alcohol withdrawal can produce seizures and delirium tremens — a potentially fatal condition characterized by severe autonomic instability, hallucinations, and seizures. The person who is a heavy daily drinker and suddenly stops — whether voluntarily or due to hospitalization or illness — is at risk. This is one of the situations where the CHW needs to recognize the risk and escalate to emergency medical care.</text:p>
      <text:p text:style-name="Text_20_body">The harm reduction frame. The goal is not necessarily abstinence — for many people in this population abstinence is not a realistic near-term goal. The goal is reducing harm while maintaining the relationship that makes future change possible. Naloxone for opioid users regardless of their intention to stop. Not driving after drinking. Not mixing substances that interact dangerously. Reducing consumption in the direction of less harm even if not zero. These are real and valuable outcomes that don't require the person to achieve abstinence first.</text:p>
      <text:p text:style-name="Text_20_body"><text:soft-page-break/>The CAGE questions as a simple screening tool the CHW can use naturally in conversation. Have you ever felt you should Cut down on your drinking. Have people Annoyed you by criticizing your drinking. Have you ever felt Guilty about your drinking. Have you ever had a drink first thing in the morning as an Eye-opener. Two or more yes answers suggests harmful use warranting further conversation.</text:p>
      <text:p text:style-name="Text_20_body"><text:span text:style-name="Strong_20_Emphasis">Psychosis</text:span></text:p>
      <text:p text:style-name="Text_20_body">Less common than the above but important because misidentification can be dangerous and because psychosis in the context of stimulant use — particularly methamphetamine — is more common in this population than clinical presentations would suggest.</text:p>
      <text:p text:style-name="Text_20_body">What psychosis is and isn't. The positive symptoms — hallucinations, delusions, disorganized thinking — and the negative symptoms — flat affect, social withdrawal, reduced motivation, poverty of speech. The person with active psychosis is experiencing a reality that is not shared — hearing voices, seeing things, holding beliefs that are fixed and unresponsive to contradicting evidence.</text:p>
      <text:p text:style-name="Text_20_body">The CHW role. Not to challenge the psychotic content — arguing with delusions doesn't help and can escalate. Not to collude with it — pretending to agree with the delusion is also unhelpful. To stay calm, maintain safety, and facilitate access to psychiatric care — which is genuinely scarce but genuinely necessary for psychotic illness in a way it isn't for depression and anxiety.</text:p>
      <text:p text:style-name="Text_20_body">Distinguishing psychosis from other conditions. Delirium — the acute confusional state produced by medical illness, medication effects, substance intoxication or withdrawal — can look like psychosis and is a medical emergency. The person who was oriented yesterday and is confused and hallucinating today needs medical evaluation. The person with longstanding chronic psychotic illness presenting consistently is a different situation.</text:p>
      <text:p text:style-name="Text_20_body">Methamphetamine psychosis specifically. Heavy meth use can produce psychosis that is clinically indistinguishable from schizophrenia while the person is using and for a period after cessation. The CHW in a community with significant meth use needs to know this and factor substance use history into their assessment of any psychotic presentation.</text:p>
      <text:p text:style-name="Text_20_body"><text:span text:style-name="Strong_20_Emphasis">Grief and loss</text:span></text:p>
      <text:p text:style-name="Text_20_body"><text:soft-page-break/>Not a psychiatric diagnosis but a significant source of suffering in this population that the CHW will encounter constantly.</text:p>
      <text:p text:style-name="Text_20_body">Rural communities with aging populations experience loss frequently. The death of spouses, siblings, lifelong friends. The loss of physical capability through illness and injury. The loss of meaningful work and identity. The loss of the community that used to exist and doesn't anymore. These are real losses that produce real grief and that don't require a psychiatric frame to understand and respond to.</text:p>
      <text:p text:style-name="Text_20_body">Normal grief versus complicated grief. Normal grief — however painful — has a trajectory. It moves. The acute intensity gradually, irregularly decreases. The person maintains connections and function even while grieving. Complicated grief — also called prolonged grief disorder — is grief that has become stuck. The acute intensity doesn't decrease. The person's function and connections are severely impaired months or years after the loss. They may have intense longing, difficulty accepting the death, bitterness, feeling that life is meaningless without the person who died.</text:p>
      <text:p text:style-name="Text_20_body">The CHW role with grief is primarily presence and witness. Allowing the person to talk about who they've lost. Not rushing toward resolution or silver linings. Not filling the silences with reassurance. Being willing to hear about the person who died as a person — their life, their relationship, what's missing without them — rather than only about the survivor's adjustment.</text:p>
      <text:p text:style-name="Text_20_body">The practical support dimension. Grief is exhausting and often produces functional impairment — difficulty maintaining the house, preparing food, managing finances — that practical help addresses directly. The CHW who shows up and helps with something concrete during a period of acute grief is doing something real and valuable alongside the relational presence.</text:p>
      <text:p text:style-name="Horizontal_20_Line"/>
      <text:p text:style-name="Text_20_body"><text:span text:style-name="Strong_20_Emphasis">Part three: Recognition in context</text:span></text:p>
      <text:p text:style-name="Text_20_body">The bridge between understanding these conditions and actually identifying them in the households you're visiting.</text:p>
      <text:p text:style-name="Text_20_body"><text:span text:style-name="Strong_20_Emphasis">The household pattern</text:span></text:p>
      <text:p text:style-name="Text_20_body">Restate and expand the principle from the framing section. When everyone in a household is struggling — chronic fatigue, irritability, sleep problems, <text:soft-page-break/>declining function — look for the shared cause before attributing individual pathology.</text:p>
      <text:p text:style-name="Text_20_body">Shared environmental exposure we covered in the environmental health material. But shared emotional and relational environment is equally important. The household where the primary breadwinner is severely depressed produces secondary effects in every family member — the children's school performance, the partner's anxiety, the family's social isolation. The household organized around a family member's substance use has a specific relational pattern — the covering up, the walking on eggshells, the exhausting attempt to manage the unmanageable — that shows up in everyone's health.</text:p>
      <text:p text:style-name="Text_20_body">Seeing the household as a unit rather than a collection of individuals is one of the CHW's most distinctive capabilities. The home visit makes this possible in a way that no clinical encounter does.</text:p>
      <text:p text:style-name="Text_20_body"><text:span text:style-name="Strong_20_Emphasis">The somatic presentation</text:span></text:p>
      <text:p text:style-name="Text_20_body">Mental health conditions in this population present through the body more often than through the psyche. The connection between emotional state and physical symptom is real and direct — through the autonomic nervous system, through the HPA axis, through the immune system — but it's rarely named.</text:p>
      <text:p text:style-name="Text_20_body">The conditions most likely to present somatically. Depression presenting as chronic fatigue, unexplained pain, GI disturbance, frequent headaches. Anxiety presenting as chest tightness, palpitations, GI symptoms, dizziness. Trauma presenting as chronic pain, sleep disturbance, hyperreactivity to physical sensations. Grief presenting as fatigue, weight loss or gain, immune compromise — it's well-documented that bereavement produces measurable immune suppression.</text:p>
      <text:p text:style-name="Text_20_body">The CHW who has built a relationship has information no clinical encounter does. They know that the headaches started after the job loss. They know that the fatigue got worse after the spouse was diagnosed with cancer. They know that the GI symptoms appear during periods of family conflict. That temporal and contextual information is what connects the somatic symptom to its emotional cause.</text:p>
      <text:p text:style-name="Text_20_body"><text:span text:style-name="Strong_20_Emphasis">Functional change as the key indicator</text:span></text:p>
      <text:p text:style-name="Text_20_body">The most reliable indicator that something significant is happening — more reliable than any specific symptom — is change in function relative to baseline.</text:p>
      <text:p text:style-name="Text_20_body"><text:soft-page-break/>The person who used to maintain their garden and now doesn't. Who used to come to Working Society events and now doesn't. Who used to be engaged and interested and now seems flat. Who used to manage their household and medications and now isn't. Who used to drive and now relies on others without apparent physical reason.</text:p>
      <text:p text:style-name="Text_20_body">The CHW who knows the person's baseline — which the longitudinal relationship provides — can see these changes in ways a clinical encounter cannot. The question isn't whether the person seems depressed by clinical criteria. It's whether they seem like themselves. The departure from themselves is the clinical finding.</text:p>
      <text:p text:style-name="Horizontal_20_Line"/>
      <text:p text:style-name="Text_20_body"><text:span text:style-name="Strong_20_Emphasis">Part four: What the CHW actually does</text:span></text:p>
      <text:p text:style-name="Text_20_body"><text:span text:style-name="Strong_20_Emphasis">Presence as intervention</text:span></text:p>
      <text:p text:style-name="Text_20_body">Restate and deepen the principle from the framing conversations. For a population with thin formal mental health resources the CHW relationship is not a bridge to treatment. It often is the treatment. The consistent trusted presence that notices, stays, and maintains the relationship across time regardless of how the person is doing.</text:p>
      <text:p text:style-name="Text_20_body">This is both more and less than it sounds. More because the research on what actually helps in depression and anxiety and trauma recovery consistently points to the quality of human connection as the most powerful factor — more powerful than any specific technique. Less because it requires accepting that you are not fixing anyone and that the timeline of real change is measured in months and years.</text:p>
      <text:p text:style-name="Text_20_body">The specific qualities of therapeutic presence. Consistency — showing up when you said you would, maintaining the relationship through difficult periods. Non-judgment — receiving what the person shares without visible alarm, disgust, or correction. Genuine curiosity — being actually interested in who this person is and what their life is like. Tolerance for pain — being able to hear difficult things without needing to resolve them immediately. Appropriate boundaries — caring genuinely without becoming enmeshed.</text:p>
      <text:p text:style-name="Text_20_body"><text:span text:style-name="Strong_20_Emphasis">The naming conversation</text:span></text:p>
      <text:p text:style-name="Text_20_body">The specific skill of helping someone connect their experience to a framework that makes it comprehensible without stigmatizing it.</text:p>
      <text:p text:style-name="Text_20_body"><text:soft-page-break/>Not — you have depression, you need medication. But — what you're describing sounds like what happens to a lot of people who've been carrying what you've been carrying. The not sleeping, the not enjoying things, the feeling like everything takes more effort than it should. That's not weakness and it's not permanent. Here's what I think is going on.</text:p>
      <text:p text:style-name="Text_20_body">The accurate naming removes the shame layer without adding the pathology label. The person who understands that their experience is a comprehensible response to comprehensible conditions — rather than evidence of personal deficiency — has more agency to address it.</text:p>
      <text:p text:style-name="Text_20_body"><text:span text:style-name="Strong_20_Emphasis">Connecting to the community</text:span></text:p>
      <text:p text:style-name="Text_20_body">The most concrete intervention available. Getting the isolated person to the garden, to the communal kitchen, to the skills session, to anything that involves being around other people doing something purposeful together.</text:p>
      <text:p text:style-name="Text_20_body">This is harder than it sounds for a severely depressed or traumatized person. The very symptoms that indicate the need for connection — withdrawal, fatigue, avoidance, low motivation — are the symptoms that make taking the step toward connection feel impossible. The CHW who has the relationship is the bridge. Not by dragging anyone anywhere but by making the first step as small as possible. Come with me this once. You don't have to stay long. I'll be there.</text:p>
      <text:p text:style-name="Text_20_body">The follow-through matters enormously. The CHW who says come to the garden and then isn't there when the person shows up has done damage. The CHW who said come with me and was there has built something.</text:p>
      <text:p text:style-name="Text_20_body"><text:span text:style-name="Strong_20_Emphasis">Practical problem solving</text:span></text:p>
      <text:p text:style-name="Text_20_body">The underrated intervention. Often the most therapeutic thing is solving a concrete problem that has been overwhelming the person. The unpaid bill. The medication they can't afford. The appointment they need transportation to. The housing repair they don't know how to navigate.</text:p>
      <text:p text:style-name="Text_20_body">Not because solving the problem solves the depression. But because the experience of having a problem that felt overwhelming become manageable with help restores some sense of agency. And because the practical problem is often a genuine stressor that is contributing to the mental health picture — removing it reduces the load.</text:p>
      <text:p text:style-name="Text_20_body"><text:span text:style-name="Strong_20_Emphasis">Motivational interviewing for behavior change</text:span></text:p>
      <text:p text:style-name="Text_20_body"><text:soft-page-break/>The module 5 skills applied specifically to mental health behavior change. The person who is depressed and sedentary — movement is one of the most evidence-based interventions for depression and also one of the hardest things to initiate when depressed. The person who is using alcohol to manage anxiety — harm reduction conversations. The person who has stopped taking their psychiatric medication — understanding why and addressing the actual barrier.</text:p>
      <text:p text:style-name="Text_20_body">The righting reflex is particularly strong in mental health conversations because the stakes feel high and the person's choices seem clearly harmful. The discipline of the motivational interviewing approach — eliciting the person's own motivation rather than providing it — is most important precisely where it's hardest.</text:p>
      <text:p text:style-name="Text_20_body"><text:span text:style-name="Strong_20_Emphasis">Recognizing the ceiling</text:span></text:p>
      <text:p text:style-name="Text_20_body">The honest accounting of what the CHW can hold and what requires more.</text:p>
      <text:p text:style-name="Text_20_body">Active suicidal ideation with a plan and means is beyond what the CHW manages alone. Acute psychosis requiring medical stabilization is beyond the CHW. Severe alcohol withdrawal with seizure risk is a medical emergency. These require escalation even when the formal resources are thin and imperfect.</text:p>
      <text:p text:style-name="Text_20_body">The CHW's role in these situations is not to provide the care that's needed — it's to stay present, maintain safety as much as possible, and facilitate access to whatever care exists even when it's inadequate. Knowing the least-bad escalation pathway for each of these situations is part of the preparation.</text:p>
      <text:p text:style-name="Text_20_body">The specific escalation pathways for Franklin County. What exists. What it actually does. What to tell the person. What to do when the formal system fails — which it will sometimes.</text:p>
      <text:p text:style-name="Horizontal_20_Line"/>
      <text:p text:style-name="Text_20_body"><text:span text:style-name="Strong_20_Emphasis">Part five: Suicide and self-harm</text:span></text:p>
      <text:p text:style-name="Text_20_body">This deserves its own section rather than being embedded in the depression content because it requires specific preparation.</text:p>
      <text:p text:style-name="Text_20_body"><text:span text:style-name="Strong_20_Emphasis">The epidemiology</text:span></text:p>
      <text:p text:style-name="Text_20_body">Suicide rates in rural areas are significantly higher than in urban areas and have been rising. The reasons are multiple and interacting — higher rates of firearm access and therefore more lethal means, greater geographic isolation reducing access to care and crisis intervention, higher rates of the risk factors <text:soft-page-break/>we've covered throughout this module, cultural factors around help-seeking, and the specific despair that comes from economic and social disinvestment in rural communities.</text:p>
      <text:p text:style-name="Text_20_body">The demographic profile most at risk in this population. Middle-aged and older white men — the highest-risk demographic in the United States by a significant margin. The demographic that is least likely to seek help and most likely to use lethal means. The demographic that constitutes a significant portion of the Working Society's expected membership.</text:p>
      <text:p text:style-name="Text_20_body"><text:span text:style-name="Strong_20_Emphasis">Asking directly</text:span></text:p>
      <text:p text:style-name="Text_20_body">Repeat and reinforce the module 5 point because it's critical and counterintuitive.</text:p>
      <text:p text:style-name="Text_20_body">Asking about suicide does not increase risk. The research on this is consistent and strong. Asking often decreases risk by breaking the isolation around the thought and communicating that someone is paying attention and willing to hear the answer.</text:p>
      <text:p text:style-name="Text_20_body">The question has to be direct. Are you thinking about suicide. Are you thinking about ending your life. Not — you're not thinking about hurting yourself, are you. Not — I hope you're not having any dark thoughts. The indirect question allows the person to answer the question you asked rather than the question you meant.</text:p>
      <text:p text:style-name="Text_20_body">If the answer is yes or maybe or I've been having thoughts. Stay present. Listen. Ask about the specifics — do you have a plan, do you have a means. The specificity of the ideation predicts risk. Passive ideation — I wish I were dead, I'd be better off gone — is different from active ideation with a specific plan and means. Both warrant attention and follow-through. Active ideation with plan and means warrants immediate response.</text:p>
      <text:p text:style-name="Text_20_body"><text:span text:style-name="Strong_20_Emphasis">The means conversation</text:span></text:p>
      <text:p text:style-name="Text_20_body">Means restriction — reducing access to lethal means during periods of suicidal crisis — is one of the most evidence-based suicide prevention interventions. The primary means in rural communities is firearms.</text:p>
      <text:p text:style-name="Text_20_body">This is a difficult conversation in a population that has a strong cultural relationship with firearms. It cannot be approached as a political conversation about gun control. It has to be approached as a practical safety conversation — during this period when you're having these thoughts, is there someone who can <text:soft-page-break/>hold onto the firearms. Not permanently. Not as a political statement. As a practical safety measure while you're going through a hard time.</text:p>
      <text:p text:style-name="Text_20_body">The CHW who can have this conversation carefully and respectfully is providing a high-value intervention that professional mental health responders often can't have as effectively because they lack the relationship and the cultural familiarity.</text:p>
      <text:p text:style-name="Text_20_body"><text:span text:style-name="Strong_20_Emphasis">After a disclosure</text:span></text:p>
      <text:p text:style-name="Text_20_body">The CHW who has received a suicidal disclosure has a responsibility and a relationship that doesn't end when the visit ends. Follow-up. Checking in. Not in a surveillance way but in a I've been thinking about you and wanted to see how you're doing way. The disclosure was an act of trust that the CHW needs to honor through continued presence.</text:p>
      <text:p text:style-name="Text_20_body">Documentation of the disclosure — carefully, with attention to privacy — and communication with whoever is providing oversight for the CHW program.</text:p>
      <text:p text:style-name="Horizontal_20_Line"/>
      <text:p text:style-name="Text_20_body"><text:span text:style-name="Strong_20_Emphasis">Part six: Taking care of yourself</text:span></text:p>
      <text:p text:style-name="Text_20_body">Preview of module 11 but specific to mental health work because the cost of this module's content is specific and needs to be named here.</text:p>
      <text:p text:style-name="Text_20_body"><text:span text:style-name="Strong_20_Emphasis">Vicarious trauma</text:span></text:p>
      <text:p text:style-name="Text_20_body">The CHW who works consistently with people carrying significant trauma, grief, mental health burden, and suicidal ideation will absorb something of what they witness. This is not weakness. It's the predictable consequence of the kind of sustained empathic presence that makes this work effective. The same capacity to feel with another person that makes the CHW useful also makes them vulnerable to the weight of what they carry on another's behalf.</text:p>
      <text:p text:style-name="Text_20_body">The signs of vicarious trauma. Intrusive thoughts about people you're working with. Difficulty leaving the work behind at the end of the day. Hypervigilance — a general increase in threat sensitivity that spills over from the work context into personal life. Emotional numbing as the nervous system's attempt to self-protect. Changes in worldview — a shift toward seeing the world as predominantly dangerous and suffering. Disrupted sleep.</text:p>
      <text:p text:style-name="Text_20_body">The distinction between vicarious trauma and burnout. Burnout is depletion — the exhaustion of someone who has given more than they've been able to <text:soft-page-break/>replenish. Vicarious trauma is something more specific — a change in the nervous system and worldview produced by sustained exposure to others' trauma. Both are real and both require different responses.</text:p>
      <text:p text:style-name="Text_20_body"><text:span text:style-name="Strong_20_Emphasis">The peer supervision structure</text:span></text:p>
      <text:p text:style-name="Text_20_body">The most important protective factor for CHWs doing this work is regular peer supervision — structured time with other CHWs to process what they're carrying, share difficult cases, and maintain perspective. Not therapy. Not case management review. Space to say this one is hard and have someone who understands hear it.</text:p>
      <text:p text:style-name="Text_20_body">The Working Society's organizational structure supports this naturally. Regular CHW meetings that include a processing component. Pairing of newer CHWs with more experienced ones. A culture that treats self-disclosure about the difficulty of the work as professional rather than as weakness.</text:p>
      <text:p text:style-name="Text_20_body"><text:span text:style-name="Strong_20_Emphasis">The personal practices</text:span></text:p>
      <text:p text:style-name="Text_20_body">The same interventions that the CHW recommends for members apply to the CHW. Sleep. Movement. Social connection outside the CHW role. Meaningful activity that isn't about serving others. Deliberate attention to the boundary between the work and personal life.</text:p>
      <text:p text:style-name="Text_20_body">The specific practice of transition rituals. Something that marks the end of a visit or a day of CHW work and the return to personal life. Not suppression of what was experienced but a deliberate shift in mode. Some people use physical transition — a walk, a change of clothes. Some use reflection — five minutes of writing about what happened and then closing the notebook. What matters is that there is something, practiced consistently, that the nervous system learns as a cue for the shift.</text:p>
      <text:p text:style-name="Text_20_body"><text:span text:style-name="Strong_20_Emphasis">Knowing when you need more support</text:span></text:p>
      <text:p text:style-name="Text_20_body">The honest statement that there will be periods when the CHW needs more support than peer supervision provides. When a member's situation is particularly close to their own history. When multiple difficult situations occur simultaneously. When signs of vicarious trauma or burnout are present and not resolving.</text:p>
      <text:p text:style-name="Text_20_body">The Working Society's responsibility to its CHWs is to create the conditions where asking for that support is normal and available rather than stigmatized as inability to handle the work.</text:p>
      <text:p text:style-name="Horizontal_20_Line"><text:soft-page-break/></text:p>
      <text:p text:style-name="Text_20_body"><text:span text:style-name="Strong_20_Emphasis">The closing section</text:span></text:p>
      <text:p text:style-name="Text_20_body">Module 7 closes with the integration of everything it's covered into the honest picture of what mental health work in this context actually is.</text:p>
      <text:p text:style-name="Text_20_body">You are working with a population that is essentially all carrying significant psychological weight. The causes are mostly structural and mostly not of their own making. The formal resources are largely inaccessible. The most powerful intervention available is your sustained, consistent, non-judgmental presence inside a community that is actively rebuilding the conditions for human flourishing.</text:p>
      <text:p text:style-name="Text_20_body">That's not a consolation prize for the absence of clinical resources. The research on what actually helps in mental health recovery consistently points toward exactly these elements — trusted relationships, belonging, purpose, the experience of being genuinely known and cared about. You are not the second-best option. You are often the most useful option available.</text:p>
      <text:p text:style-name="Text_20_body">That's a significant responsibility. It's also a genuine privilege. The person who trusts you enough to say the thing they've never said to anyone — the darkness they've been carrying alone — is giving you something real. Honor it with the presence and consistency and discretion it deserves.</text:p>
      <text:p text:style-name="Text_20_body">And take care of yourself so you can keep doing it.</text:p>
      <text:p text:style-name="P9"/>
      <text:p text:style-name="P9"/>
      <text:p text:style-name="P9"><text:span text:style-name="T8">8</text:span>. Navigating What Actually Exists</text:p>
      <text:p text:style-name="P9"/>
      <text:p text:style-name="P19"><text:span text:style-name="Strong_20_Emphasis">The framing section</text:span></text:p>
      <text:p text:style-name="Text_20_body">Open with the honest statement.</text:p>
      <text:p text:style-name="Text_20_body">The formal healthcare and social service system in Franklin County is real. It exists on paper, in directories, in official guidance. For some people some of the time it provides genuine help. But for the population the Working Society serves — rural, working poor, uninsured or underinsured, without reliable transportation, with the distrust of institutions that comes from being repeatedly failed by them — the official resource map and the actual accessible resource map are two different things.</text:p>
      <text:p text:style-name="Text_20_body"><text:soft-page-break/>The CHW who operates from the official map will send people toward resources they can't actually reach, generate referrals that go nowhere, and gradually lose credibility with the members they're trying to help. The CHW who understands the real map — what's actually accessible, what the real barriers are, how to navigate around them — is genuinely useful.</text:p>
      <text:p text:style-name="Text_20_body">This module is the real map.</text:p>
      <text:p text:style-name="Horizontal_20_Line"/>
      <text:p text:style-name="Text_20_body"><text:span text:style-name="Strong_20_Emphasis">Part one: The formal system — what it is and what it actually delivers</text:span></text:p>
      <text:p text:style-name="Text_20_body"><text:span text:style-name="Strong_20_Emphasis">Primary care</text:span></text:p>
      <text:p text:style-name="Text_20_body">What exists in Franklin County and immediate surroundings. The specific providers, their locations, their hours, what insurance they accept, what their actual appointment availability looks like.</text:p>
      <text:p text:style-name="Text_20_body">The honest picture. Primary care capacity in rural Georgia is severely constrained. The physician pipeline into rural practice has essentially collapsed — medical school debt, lifestyle preferences, and payment structures that favor procedural over cognitive work all push physicians toward urban practice. What remains is a combination of mid-level providers — nurse practitioners and physician assistants doing primary care — and federally qualified health centers where they exist, which provide sliding-scale fees and accept Medicaid.</text:p>
      <text:p text:style-name="Text_20_body">The appointment reality. New patient appointments at available practices are often weeks to months out. The person with a new concern or a condition that needs management can't wait three months. Urgent care fills some of this gap for acute issues but doesn't provide the longitudinal relationship that chronic disease management requires.</text:p>
      <text:p text:style-name="Text_20_body">The cost reality. Even with insurance the cost of primary care visits, labs, and medications represents a real barrier for this population. The person who is choosing between a copay and groceries is making a rational choice that looks like noncompliance from the clinical side.</text:p>
      <text:p text:style-name="Text_20_body"><text:span text:style-name="Strong_20_Emphasis">The emergency department</text:span></text:p>
      <text:p text:style-name="Text_20_body">The de facto primary care for the uninsured and underserved. The worst possible setting for chronic disease management and mental health support. Expensive, episodic, disconnected from any longitudinal relationship, oriented toward acute stabilization rather than ongoing management.</text:p>
      <text:p text:style-name="Text_20_body"><text:soft-page-break/>The CHW needs to understand what the ED is actually good for — acute emergencies, diagnostic workups that require imaging or labs in urgent situations — and what it's not good for — ongoing management, mental health crisis, primary care substitution. And needs to be honest with members about when the ED is the right resource versus when it will produce a large bill and no ongoing care.</text:p>
      <text:p text:style-name="Text_20_body">The financial consequences of ED use for uninsured patients. The billing practices. The charity care programs that exist and how to access them. The medical debt that is one of the leading causes of personal bankruptcy in this population and that adds financial stress to whatever health crisis generated the visit.</text:p>
      <text:p text:style-name="Text_20_body"><text:span text:style-name="Strong_20_Emphasis">Medicaid and the coverage landscape</text:span></text:p>
      <text:p text:style-name="Text_20_body">Georgia's Medicaid expansion history — Georgia did not expand Medicaid under the ACA until a limited partial expansion, leaving a significant coverage gap. The working poor who earn too much for traditional Medicaid and too little to afford marketplace insurance fall into a gap that is specific to non-expansion states. Many of the people the Working Society serves fall exactly in this gap.</text:p>
      <text:p text:style-name="Text_20_body">What Medicaid actually covers in Georgia. The specific limitations. The prior authorization requirements that create barriers even for people who have coverage. The provider network limitations in rural areas where Medicaid-accepting providers are scarce.</text:p>
      <text:p text:style-name="Text_20_body">The marketplace plans for those who qualify. The subsidies available. The navigation support that exists through the navigator program — certified helpers who assist with enrollment. Where to find navigators in Northeast Georgia.</text:p>
      <text:p text:style-name="Text_20_body">The specific programs worth knowing. PeachState Health Management as the dominant Medicaid managed care organization in this region. What it covers and how to navigate it. Patient assistance programs from pharmaceutical manufacturers — the specific programs that cover the most commonly prescribed medications in this population. GoodRx and similar discount programs for medications — not insurance but genuinely useful cost reduction for uninsured patients paying cash.</text:p>
      <text:p text:style-name="Text_20_body"><text:span text:style-name="Strong_20_Emphasis">Mental health resources — the honest picture</text:span></text:p>
      <text:p text:style-name="Text_20_body">State this plainly.</text:p>
      <text:p text:style-name="Text_20_body"><text:soft-page-break/>Outpatient mental health services in Franklin County are extremely limited. The wait for a psychiatric appointment in most of Northeast Georgia is measured in months. The cost without insurance is prohibitive. With insurance the network is thin and the coverage often inadequate.</text:p>
      <text:p text:style-name="Text_20_body">The Community Service Board — the public mental health system — is the primary resource for people without insurance or with Medicaid. The specific CSB serving Franklin County, its location, its services, its actual accessibility. The honest assessment of capacity — the CSB is chronically underfunded and understaffed and wait times are significant.</text:p>
      <text:p text:style-name="Text_20_body">Crisis resources. The 988 Suicide and Crisis Lifeline — genuinely useful for some people in some situations, with real limitations including wait times and the possibility of welfare check responses that can escalate rather than de-escalate situations. The specific local crisis response capacity. The mobile crisis teams where they exist in this region and their actual availability.</text:p>
      <text:p text:style-name="Text_20_body">Inpatient psychiatric beds. The nearest inpatient psychiatric facility. The process for involuntary commitment in Georgia — the 1013 process, what it involves, when it's appropriate, what its limitations are. The honest reality that inpatient psychiatric beds in Georgia are scarce and that people in genuine psychiatric crisis may wait in emergency departments for days.</text:p>
      <text:p text:style-name="Text_20_body"><text:span text:style-name="Strong_20_Emphasis">Social services</text:span></text:p>
      <text:p text:style-name="Text_20_body">DFCS — the Department of Family and Children Services — and what it actually provides. SNAP benefits, TANF, Medicaid eligibility. The application process and its barriers. The specific DFCS office serving Franklin County.</text:p>
      <text:p text:style-name="Text_20_body">The honest picture of SNAP. Who qualifies, what the benefit level actually covers relative to food costs, what the application and recertification requirements look like for someone working irregular hours without reliable internet access.</text:p>
      <text:p text:style-name="Text_20_body">Housing assistance. The reality that affordable housing assistance in rural Georgia has years-long waiting lists. What the Housing Choice Voucher program is and what the actual accessibility looks like in Franklin County. Emergency rental assistance programs that exist and their specific eligibility and availability.</text:p>
      <text:p text:style-name="Text_20_body">Utility assistance. LIHEAP — the Low Income Home Energy Assistance Program — and its specific availability and timing in Georgia. The utility company programs that exist for low-income customers. The specific contacts for each.</text:p>
      <text:p text:style-name="Horizontal_20_Line"><text:soft-page-break/></text:p>
      <text:p text:style-name="Text_20_body"><text:span text:style-name="Strong_20_Emphasis">Part two: The real accessible resources</text:span></text:p>
      <text:p text:style-name="Text_20_body"><text:span text:style-name="Strong_20_Emphasis">UGA Cooperative Extension</text:span></text:p>
      <text:p text:style-name="Text_20_body">Probably the most useful formal resource for the Working Society's population and significantly underutilized.</text:p>
      <text:p text:style-name="Text_20_body">UGA Extension has a county office in Carnesville. It provides genuinely accessible services including Master Gardener support, water testing at low cost, food preservation education including canning safety, agricultural assistance, nutrition education through the SNAP-Ed program, and various community programs.</text:p>
      <text:p text:style-name="Text_20_body">The specific Extension contacts in Franklin County. What they actually do and how to connect people to it. The water testing process in specific terms — how to get the container, how to collect the sample, what the turnaround time is, how to read the results.</text:p>
      <text:p text:style-name="Text_20_body">The Extension relationship is worth cultivating organizationally rather than just using transactionally. The extension agent has knowledge, relationships, and access to resources that complement the Working Society's mission directly.</text:p>
      <text:p text:style-name="Text_20_body"><text:span text:style-name="Strong_20_Emphasis">Free clinics and charitable care</text:span></text:p>
      <text:p text:style-name="Text_20_body">The specific free clinics operating within reasonable distance of Franklin County. Their hours, eligibility requirements, and what they actually provide. The honest assessment of their capacity and wait times.</text:p>
      <text:p text:style-name="Text_20_body">The RAM — Remote Area Medical — clinics that operate periodically in rural Georgia. The specific schedule and locations when they occur in this region. What services they provide — typically dental, vision, and basic medical — and what they don't. How to find out when the next one is scheduled.</text:p>
      <text:p text:style-name="Text_20_body">Charitable pharmacy programs. The specific programs that provide free or deeply discounted medications — NeedyMeds, RxAssist, manufacturer patient assistance programs. How to apply, what documentation is required, turnaround times.</text:p>
      <text:p text:style-name="Text_20_body"><text:span text:style-name="Strong_20_Emphasis">Federally Qualified Health Centers</text:span></text:p>
      <text:p text:style-name="Text_20_body">The nearest FQHCs to Franklin County. What an FQHC is — a federally funded community health center that provides services on a sliding fee scale <text:soft-page-break/>regardless of ability to pay. What they provide. Their actual accessibility from Franklin County given transportation realities.</text:p>
      <text:p text:style-name="Text_20_body"><text:span text:style-name="Strong_20_Emphasis">Faith communities</text:span></text:p>
      <text:p text:style-name="Text_20_body">The churches in Franklin County as informal resource networks. Many maintain food pantries, emergency assistance funds, and networks of practical mutual aid that aren't in any official directory. The CHW who knows the specific resources at specific congregations — who to call, what they can provide, what the eligibility expectations are — is more useful than one who knows only the official landscape.</text:p>
      <text:p text:style-name="Text_20_body">The relationship with faith communities is worth approaching thoughtfully. Some will be natural allies to Working Society CHWs. Others may have their own views about how people should be helped that create friction. The CHW needs to be able to work with the practical resources without the organizational relationship requiring ideological alignment.</text:p>
      <text:p text:style-name="Text_20_body"><text:span text:style-name="Strong_20_Emphasis">Informal networks</text:span></text:p>
      <text:p text:style-name="Text_20_body">The mutual aid that already exists in Franklin County outside of any organization. The neighbors who check on each other. The families who share food and labor. The community responses to specific crises that self-organize without institutional structure.</text:p>
      <text:p text:style-name="Text_20_body">Part of the CHW's knowledge base is knowing who in the community can be called on for what. Who has a truck for hauling. Who can help with a specific repair. Who checks on elderly people on their road. Who to call when a family needs meals for a week.</text:p>
      <text:p text:style-name="Text_20_body">This knowledge is hyperlocal and doesn't exist in any directory. It accumulates through relationship and presence in the community over time. The CHW who has been a member for three years knows things about what's available that no newcomer can know.</text:p>
      <text:p text:style-name="Horizontal_20_Line"/>
      <text:p text:style-name="Text_20_body"><text:span text:style-name="Strong_20_Emphasis">Part three: The Working Society as primary resource</text:span></text:p>
      <text:p text:style-name="Text_20_body">This section names explicitly what has been implicit throughout the curriculum.</text:p>
      <text:p text:style-name="Text_20_body"><text:soft-page-break/>For many members the Working Society is not a supplement to the formal resource landscape. It is the primary resource landscape. The CHW needs to know exactly what the organization provides and how to connect members to it.</text:p>
      <text:p text:style-name="Text_20_body"><text:span text:style-name="Strong_20_Emphasis">Health resources</text:span></text:p>
      <text:p text:style-name="Text_20_body">The CHW program itself. How members access CHW support. How CHWs coordinate with each other. How the program interfaces with whatever physician oversight exists.</text:p>
      <text:p text:style-name="Text_20_body">The community health worker corps as a distributed monitoring and support network. What it means for a member to have a CHW relationship. How to initiate one for a member who needs it.</text:p>
      <text:p text:style-name="Text_20_body">The medical equipment library if it exists — shared blood pressure cuffs, glucometers, pulse oximeters available for member use.</text:p>
      <text:p text:style-name="Text_20_body">The health knowledge commons — the disease pages, the quick reference materials, the resource guides developed through this curriculum and subsequent documentation.</text:p>
      <text:p text:style-name="Text_20_body"><text:span text:style-name="Strong_20_Emphasis">Food resources</text:span></text:p>
      <text:p text:style-name="Text_20_body">The community garden — what it produces, when, how members access it.</text:p>
      <text:p text:style-name="Text_20_body">The communal kitchen — what it provides, when it operates, how members participate.</text:p>
      <text:p text:style-name="Text_20_body">The bulk purchasing program — what's available, how to order, how payment through kin currency works.</text:p>
      <text:p text:style-name="Text_20_body">The food preservation resources — the canning equipment, the knowledge holders, the workshops.</text:p>
      <text:p text:style-name="Text_20_body"><text:span text:style-name="Strong_20_Emphasis">Economic resources</text:span></text:p>
      <text:p text:style-name="Text_20_body">The kin currency system — how it works, what it can be used for, how to earn and spend it.</text:p>
      <text:p text:style-name="Text_20_body">The commons fund — what it covers, how to access it in genuine need, the process for requesting support.</text:p>
      <text:p text:style-name="Text_20_body">Specific practical assistance that the organization provides — help with applications, accompaniment to appointments, transportation coordination.</text:p>
      <text:p text:style-name="Text_20_body"><text:span text:style-name="Strong_20_Emphasis">Social resources</text:span></text:p>
      <text:p text:style-name="Text_20_body"><text:soft-page-break/>The events, the working groups, the skills sessions, the garden gatherings — the structures through which connection happens. The CHW who can connect an isolated member to a specific activity with a specific person who will be welcoming is doing more than referring to a program. They're making a human introduction.</text:p>
      <text:p text:style-name="Horizontal_20_Line"/>
      <text:p text:style-name="Text_20_body"><text:span text:style-name="Strong_20_Emphasis">Part four: Navigation as a skill</text:span></text:p>
      <text:p text:style-name="Text_20_body">The durable skill that outlasts any specific resource list.</text:p>
      <text:p text:style-name="Text_20_body"><text:span text:style-name="Strong_20_Emphasis">The barrier assessment</text:span></text:p>
      <text:p text:style-name="Text_20_body">Before making any referral the CHW should assess the specific barriers that might prevent the person from accessing it. Transportation — do they have reliable transportation and is the resource within reasonable distance. Cost — what does it cost and is that a real barrier. Time — when is it available and does that conflict with work or caregiving. Documentation — what does it require and does the person have it. Trust — is this the kind of institution this person will actually engage with.</text:p>
      <text:p text:style-name="Text_20_body">A referral that doesn't account for these barriers isn't navigation. It's passing the problem to someone else.</text:p>
      <text:p text:style-name="Text_20_body"><text:span text:style-name="Strong_20_Emphasis">The warm handoff</text:span></text:p>
      <text:p text:style-name="Text_20_body">The difference between giving someone a phone number and actually connecting them to a resource. The warm handoff — introducing the person directly to the resource, making the call with them, accompanying them to the appointment — dramatically increases the likelihood that the referral actually results in care.</text:p>
      <text:p text:style-name="Text_20_body">The CHW's time is a resource. Using it to make referrals actually happen rather than just technically occur is a legitimate and valuable use of that time.</text:p>
      <text:p text:style-name="Text_20_body"><text:span text:style-name="Strong_20_Emphasis">Following up</text:span></text:p>
      <text:p text:style-name="Text_20_body">The referral isn't complete when it's made. It's complete when the person has actually received the service — or when it's clear the service isn't going to be accessible and an alternative needs to be found.</text:p>
      <text:p text:style-name="Text_20_body">Following up is what converts a referral list into actual navigation. It's also what maintains the CHW's credibility — the member who was given a referral <text:soft-page-break/>that went nowhere and never heard back from the CHW has learned something about what the CHW's recommendations are worth.</text:p>
      <text:p text:style-name="Text_20_body"><text:span text:style-name="Strong_20_Emphasis">Maintaining the resource knowledge</text:span></text:p>
      <text:p text:style-name="Text_20_body">Resources change. Programs end, funding lapses, eligibility changes, contact information becomes outdated. The CHW who last updated their resource knowledge two years ago is working from a map that no longer reflects the terrain.</text:p>
      <text:p text:style-name="Text_20_body">The Working Society should maintain a living resource directory that CHWs update collectively as they learn things — this program ended, this new one started, this contact is now the right person to call. That collective maintenance is more reliable than any individual CHW's memory.</text:p>
      <text:p text:style-name="Text_20_body"><text:span text:style-name="Strong_20_Emphasis">When nothing exists</text:span></text:p>
      <text:p text:style-name="Text_20_body">The honest framework for when the assessment concludes that nothing adequate exists for what this person needs.</text:p>
      <text:p text:style-name="Text_20_body">Document the gap. The aggregate picture of what members need and what doesn't exist is information the organization should act on — advocating for resources, building internal capacity, connecting with other organizations that might partner on filling the gap.</text:p>
      <text:p text:style-name="Text_20_body">Be honest with the member. I wish I could point you somewhere that would help with this. The honest truth is that what you need doesn't really exist in a form that's accessible to you right now. Here's what I can do. Here's what the community can do. Here's what I'll keep looking for.</text:p>
      <text:p text:style-name="Text_20_body">That honesty — difficult as it is — maintains trust in a way that false referrals don't. The member who was told to call a number that doesn't answer, to apply for a program with a three-year wait, to see a provider who doesn't accept their insurance — that member has been failed twice. Once by the system and once by the person who sent them toward something that wasn't actually there.</text:p>
      <text:p text:style-name="Horizontal_20_Line"/>
      <text:p text:style-name="Text_20_body"><text:span text:style-name="Strong_20_Emphasis">Part five: Advocacy</text:span></text:p>
      <text:p text:style-name="Text_20_body">The CHW's role beyond individual navigation.</text:p>
      <text:p text:style-name="Text_20_body"><text:span text:style-name="Strong_20_Emphasis">Identifying patterns</text:span></text:p>
      <text:p text:style-name="Text_20_body"><text:soft-page-break/>The CHW who sees the same gap repeatedly — the same resource that doesn't exist, the same barrier that prevents access — is holding information that should inform organizational response.</text:p>
      <text:p text:style-name="Text_20_body">Transportation to medical appointments as a recurring barrier — that's a case for the Working Society's transit service prioritizing medical appointments. Medication cost as a recurring barrier — that's a case for the organization developing a medication assistance program or negotiating a relationship with a pharmacy. Mental health access as a recurring and essentially total gap — that's a case for developing internal mental health support capacity rather than continuing to refer to resources that aren't accessible.</text:p>
      <text:p text:style-name="Text_20_body"><text:span text:style-name="Strong_20_Emphasis">The organizational advocacy role</text:span></text:p>
      <text:p text:style-name="Text_20_body">The Working Society's CHW program is a source of ground-level intelligence about what the membership actually needs. That intelligence belongs in the organizational decision-making process. The CHW who documents patterns and brings them to the governance structure is doing something beyond individual service — they're informing the organization's development of its own resource capacity.</text:p>
      <text:p text:style-name="Text_20_body"><text:span text:style-name="Strong_20_Emphasis">The external advocacy role</text:span></text:p>
      <text:p text:style-name="Text_20_body">More carefully considered because the Working Society's political positioning is deliberately non-partisan and because advocacy can create enemies as well as allies. But some advocacy is simply naming the truth — the rural hospital that closed, the mental health services that don't exist, the medication costs that are driving people to ration their prescriptions. These are facts about the landscape that the organization can name without taking a partisan position.</text:p>
      <text:p text:style-name="Horizontal_20_Line"/>
      <text:p text:style-name="Text_20_body"><text:span text:style-name="Strong_20_Emphasis">The closing section</text:span></text:p>
      <text:p text:style-name="Text_20_body">Module 8 closes with the honest integration of everything it's covered.</text:p>
      <text:p text:style-name="Text_20_body">You are navigating a landscape that is genuinely inadequate for the population you're serving. The formal system exists but is largely inaccessible. The community has real assets but they're informal and you have to know where to look. The Working Society is building internal capacity but it's not complete and it never will be.</text:p>
      <text:p text:style-name="Text_20_body">In that landscape the most valuable thing you can do is be honest, be knowledgeable, follow through, and keep looking. The member who trusts you <text:soft-page-break/>enough to let you help them navigate this landscape deserves your best effort to find what actually exists and your honest acknowledgment when it doesn't.</text:p>
      <text:p text:style-name="Text_20_body">And when it doesn't exist — document it, name it, bring it back to the community. The gaps you find are not just individual problems. They're the organization's roadmap for what to build next.</text:p>
      <text:p text:style-name="Text_20_body">The Working Society is not just navigating an inadequate landscape. It's building a better one. The CHW is both the navigator and one of the builders.</text:p>
      <text:p text:style-name="P9"/>
      <text:p text:style-name="P9"/>
      <text:p text:style-name="P10">9. Death and Palliative Care</text:p>
      <text:p text:style-name="P10"/>
      <text:p text:style-name="P20"><text:span text:style-name="Strong_20_Emphasis">What module 9 has to accomplish</text:span></text:p>
      <text:p text:style-name="Text_20_body">It has to normalize death as a topic. Not morbidly. Not in the disaster-preparedness prepper sense. In the way that every culture before modern medicine normalized it — as a part of life that people understood, prepared for, and participated in rather than outsourced entirely to institutions.</text:p>
      <text:p text:style-name="Text_20_body">It has to give the CHW a genuine framework for the situations where the medical system is unavailable, unreachable, or unable to change the outcome. Not a protocol for replacing emergency medicine. A framework for being present, reducing suffering, supporting the family, and honoring the person dying with as much dignity as the circumstances allow.</text:p>
      <text:p text:style-name="Text_20_body">It has to address palliative care — the management of serious illness with comfort and quality of life as the primary goals — because this is one of the most underserved areas in rural medicine and one where a knowledgeable CHW can make an enormous difference.</text:p>
      <text:p text:style-name="Text_20_body">It has to address the specific legal and practical realities of death at home in Georgia. What happens, what needs to happen, what the family needs to know.</text:p>
      <text:p text:style-name="Text_20_body">And it has to address grief — not as a pathology to be managed but as the appropriate human response to loss, and as something the CHW will encounter constantly and needs to be able to sit with well.</text:p>
      <text:p text:style-name="Horizontal_20_Line"/>
      <text:p text:style-name="Text_20_body"><text:span text:style-name="Strong_20_Emphasis">The framing section</text:span></text:p>
      <text:p text:style-name="Text_20_body">Open with the honest statement that most health education doesn't make.</text:p>
      <text:p text:style-name="Text_20_body"><text:soft-page-break/>Death is not a medical failure. It is the end of every life. The medical system has done extraordinary things to push it further away and to make some deaths that were previously inevitable avoidable. That's real and valuable. But it has also created a cultural situation where death has been so thoroughly medicalized that people no longer know how to be present with it, how to participate in it, or how to find meaning in it.</text:p>
      <text:p text:style-name="Text_20_body">For most of human history people died at home, surrounded by family and community, tended by people who knew them. The knowledge of how to do that — how to be with someone dying, how to manage their comfort, how to recognize what was happening and what was coming, how to be present at the moment of death and after it — was common knowledge carried in families and communities.</text:p>
      <text:p text:style-name="Text_20_body">That knowledge has largely been lost. Not because death became less common but because it moved into institutions. And now when the institution isn't available — when the ambulance is forty minutes away and the person is dying now — the family is left without any framework for what's happening or what to do.</text:p>
      <text:p text:style-name="Text_20_body">This module is a partial restoration of that knowledge. Not a replacement for medical care when medical care is available and can help. But an honest accounting of what's possible when it isn't, and of what good dying looks like when the goal shifts from extending life to honoring it.</text:p>
      <text:p text:style-name="Horizontal_20_Line"/>
      <text:p text:style-name="Text_20_body"><text:span text:style-name="Strong_20_Emphasis">Part one: Understanding the dying process</text:span></text:p>
      <text:p text:style-name="Text_20_body"><text:span text:style-name="Strong_20_Emphasis">The physiology of dying</text:span></text:p>
      <text:p text:style-name="Text_20_body">What actually happens in the body as it shuts down. Not as horror but as biology — a comprehensible process that has a recognizable trajectory when you know what to look for.</text:p>
      <text:p text:style-name="Text_20_body">The common pathways. Cardiovascular failure — the heart loses its ability to maintain adequate output. Respiratory failure — the lungs can no longer maintain adequate gas exchange. Neurological failure — the brain loses its ability to coordinate the body's functions. Organ failure following catastrophic illness or injury. These different pathways share a common final territory even when they approach it differently.</text:p>
      <text:p text:style-name="Text_20_body"><text:soft-page-break/>The signs of dying in the final days and hours. These matter because the family who recognizes them is less frightened by them and better able to be present.</text:p>
      <text:p text:style-name="Text_20_body">Decreased oral intake. The dying person stops eating and then stops drinking. This is the body's natural process — not a sign that they need to be forced to eat, not a medical failure, not something that needs to be corrected. The body is redirecting its limited resources away from digestion. Forcing food or fluids at this stage increases discomfort rather than supporting life.</text:p>
      <text:p text:style-name="Text_20_body">Increased sleep and decreased responsiveness. The person sleeps more and more, becomes harder to rouse, eventually unresponsive. The family often experiences this as the person leaving them gradually rather than all at once. Understanding that the person can often still hear even when unresponsive — hearing is one of the last senses to go — changes how family members relate to the person during this period.</text:p>
      <text:p text:style-name="Text_20_body">Changes in breathing. Cheyne-Stokes respiration — the irregular breathing pattern with periods of faster breathing followed by slower breathing followed by pauses — is one of the most distressing things for families to witness because it looks like the person is struggling. Understanding that this pattern is a neurological phenomenon rather than a sign of suffering changes the experience of witnessing it.</text:p>
      <text:p text:style-name="Text_20_body">The death rattle — the gurgling sound produced by secretions in the throat that the person can no longer clear. Another sound that is deeply distressing to witnesses and that is not, in most cases, a sign of the person's distress. The person is typically not conscious enough to be distressed by it. Repositioning and mouth care can reduce it somewhat.</text:p>
      <text:p text:style-name="Text_20_body">Circulation withdrawing from the extremities. The mottling — the blotchy purple pattern — that appears on the legs and feet as circulation centralizes. The hands and feet becoming cool and then cold while the torso remains warm. This typically precedes death by hours to a day or two.</text:p>
      <text:p text:style-name="Text_20_body">The moment of death. What it looks like. The cessation of breathing. The cessation of heartbeat. The specific observation — listening, watching, waiting — that confirms death has occurred. Families often don't know what to do in this moment. Having a framework helps.</text:p>
      <text:p text:style-name="Text_20_body"><text:span text:style-name="Strong_20_Emphasis">The AMI scenario — the specific question you raised</text:span></text:p>
      <text:p text:style-name="Text_20_body"><text:soft-page-break/>This deserves direct and honest treatment because it's exactly the scenario that health education leaves people without guidance for.</text:p>
      <text:p text:style-name="Text_20_body">Someone is having a heart attack. You know or strongly suspect it — the chest pain, the radiation to the arm or jaw, the diaphoresis, the nausea, the sense of doom that people describe. In a normal scenario you call 911 and within minutes emergency services are en route. In rural Franklin County the ambulance may be forty minutes away and the nearest cardiac catheterization lab may be an hour beyond that. For a major myocardial infarction the damage that determines outcome occurs in the first ninety minutes. The math sometimes doesn't work.</text:p>
      <text:p text:style-name="Text_20_body">What the CHW can actually do in this scenario.</text:p>
      <text:p text:style-name="Text_20_body">Call 911 immediately regardless. The calculation might be wrong — the ambulance might be closer, the person might be more stable than they appear, early arrival of any level of care is better than no care. Make the call. Don't let the arithmetic of distance and time paralyze the first step.</text:p>
      <text:p text:style-name="Text_20_body">Aspirin immediately. The one intervention that has clear evidence and is available without any equipment. 325mg chewed — not swallowed whole — immediately if the person is not allergic to aspirin and there's no obvious reason not to. This is in the household kit for exactly this reason. Explain to the family where it is and what to do.</text:p>
      <text:p text:style-name="Text_20_body">Position of comfort. Semi-reclined if the person is conscious and can tolerate it. Not flat. Not standing. Whatever reduces the work of the heart and the person's distress.</text:p>
      <text:p text:style-name="Text_20_body">Oxygen if available. Supplemental oxygen in the setting of suspected cardiac event is beneficial if the person's saturation is below 94%. If a pulse oximeter is available and saturation is above 94% supplemental oxygen is not necessary and may not be helpful. Most households won't have oxygen available.</text:p>
      <text:p text:style-name="Text_20_body">Calm presence. The person who is having a heart attack and is frightened is experiencing sympathetic activation that increases myocardial oxygen demand and worsens the situation. The CHW who can maintain genuine calm — not performed calm but real regulated nervous system calm — communicates safety through the co-regulatory mechanism we discussed in module 7. This is not nothing. It is a real physiological intervention.</text:p>
      <text:p text:style-name="Text_20_body">Hold the hand. Talk to the person. If they're losing consciousness tell them they're not alone, that the people who love them are there, that they don't need <text:soft-page-break/>to be afraid. Whether this reaches them in any meaningful way is unknown. It costs nothing and it is the right thing to do.</text:p>
      <text:p text:style-name="Text_20_body">And then the honest part that nobody says.</text:p>
      <text:p text:style-name="Text_20_body">There are situations where the person is going to die before help arrives. The CHW needs to be able to recognize this and make the transition from trying to support survival to supporting a good death. Not giving up. Not failing. Recognizing when the goal has shifted and responding to the actual situation rather than the situation you wish you were in.</text:p>
      <text:p text:style-name="Text_20_body">When that transition happens the family needs to be supported too. They are going to watch someone they love die. The CHW who can stay present with that — who can tell the family it's okay to stay close, it's okay to talk to them, it's okay to hold their hand — is providing something that matters enormously. The alternative is a terrified family paralyzed at a distance from the person they love because nobody told them what to do.</text:p>
      <text:p text:style-name="Text_20_body"><text:span text:style-name="Strong_20_Emphasis">Stroke — the same honest treatment</text:span></text:p>
      <text:p text:style-name="Text_20_body">The recognition skills from module 4 — FAST plus the additional signs. The same call 911 immediately. The same honest assessment of the access reality.</text:p>
      <text:p text:style-name="Text_20_body">The specific complexity with stroke is the tissue plasminogen activator window — the clot-busting medication that can dramatically improve outcomes in ischemic stroke has to be given within four and a half hours of symptom onset. The calculation of whether that window is achievable given distance and transport time is something the CHW should be able to think through. Calling 911 and describing the situation clearly — suspected stroke, symptom onset time, distance to hospital — allows dispatch to mobilize the most appropriate response.</text:p>
      <text:p text:style-name="Text_20_body">For hemorrhagic stroke the situation is different — tPA is contraindicated and the intervention is surgical. The time window for meaningful intervention is shorter and the access requirements are more specialized.</text:p>
      <text:p text:style-name="Text_20_body">The position for someone with suspected stroke. Recovery position if unconscious — on the side, airway clear. Nothing by mouth — the stroke may have impaired swallowing and aspiration is a real risk. Monitoring of breathing and consciousness level until help arrives or the situation resolves one way or another.</text:p>
      <text:p text:style-name="Horizontal_20_Line"/>
      <text:p text:style-name="Text_20_body"><text:soft-page-break/><text:span text:style-name="Strong_20_Emphasis">Part two: Palliative care</text:span></text:p>
      <text:p text:style-name="Text_20_body"><text:span text:style-name="Strong_20_Emphasis">What palliative care actually is</text:span></text:p>
      <text:p text:style-name="Text_20_body">The name is unfamiliar to most people and the concept is often conflated with hospice — end of life care specifically. Palliative care is broader than that.</text:p>
      <text:p text:style-name="Text_20_body">Palliative care is the approach to serious illness that prioritizes comfort, quality of life, and alignment with the person's own values and goals. It can and should coexist with curative treatment. It's not giving up. It's adding a layer of attention to what the person experiences and what matters to them alongside whatever medical treatment is being pursued.</text:p>
      <text:p text:style-name="Text_20_body">In the rural context without adequate formal palliative care services — which are almost entirely absent outside of hospice programs — the CHW can provide something that functions as community palliative care. Not the specialized pain management and medical aspects of formal palliative care. But the human dimensions — the regular presence, the attention to comfort, the conversations about what matters, the support for family caregivers.</text:p>
      <text:p text:style-name="Text_20_body"><text:span text:style-name="Strong_20_Emphasis">Symptom management</text:span></text:p>
      <text:p text:style-name="Text_20_body">The symptoms that most commonly cause suffering in serious illness and what the CHW can do about them without clinical resources.</text:p>
      <text:p text:style-name="Text_20_body">Pain. The most important symptom to address and the one most often undertreated in this population. The WHO analgesic ladder as a framework — starting with non-opioid medications and escalating based on pain severity. What's available without prescription. How to use what's available effectively. When to advocate urgently for better pain management because what's available isn't adequate.</text:p>
      <text:p text:style-name="Text_20_body">The positioning and non-pharmacological approaches to pain that matter when medications are insufficient or unavailable. Heat, cold, positioning, gentle massage, distraction, relaxation — these are not substitutes for adequate analgesia in severe pain but they are real contributions in moderate pain and as complements to medication.</text:p>
      <text:p text:style-name="Text_20_body">Dyspnea — shortness of breath. One of the most distressing symptoms in serious illness. The interventions that help even without oxygen. Positioning — sitting upright reduces the work of breathing. A fan directed at the face — the sensation of moving air on the face reduces the subjective experience of breathlessness through a mechanism that isn't fully understood but is consistent <text:soft-page-break/>and real. Calm presence — dyspnea triggers panic which worsens dyspnea. The co-regulatory calm of the CHW is again a real intervention.</text:p>
      <text:p text:style-name="Text_20_body">Nausea. Common in serious illness, in dying, in medication side effects. The practical measures — small amounts of food or fluid if tolerated, cool cloths, positioning, avoidance of strong smells. What's available over the counter. When nausea is severe enough to warrant advocacy for prescription antiemetics.</text:p>
      <text:p text:style-name="Text_20_body">Constipation. Underestimated as a source of suffering. Almost universal in people taking opioid medications. The dietary measures. The over-the-counter options and which ones are appropriate for which situations — stimulant laxatives for opioid-induced constipation rather than bulk-forming agents.</text:p>
      <text:p text:style-name="Text_20_body">Mouth care. Becomes critical in the final stages when the person can no longer manage their own oral hygiene and when dehydration dries the mucous membranes. The specific techniques — mouth swabs, lip moisturizer, the positioning that prevents pooling of secretions. This is direct physical care that family members can provide and that CHWs can teach.</text:p>
      <text:p text:style-name="Text_20_body">Skin care and pressure injury prevention. The person who is bedbound and can't reposition themselves will develop pressure injuries — painful and potentially serious wounds at bony prominences. Regular repositioning — every two hours if possible. Protective padding. Skin assessment at each turn. This is something family caregivers can do with guidance.</text:p>
      <text:p text:style-name="Text_20_body"><text:span text:style-name="Strong_20_Emphasis">The goals of care conversation</text:span></text:p>
      <text:p text:style-name="Text_20_body">One of the most important conversations in palliative care and one that almost never happens adequately in the formal system.</text:p>
      <text:p text:style-name="Text_20_body">What does this person actually want. Not what does the family want, not what does the medical system default to, not what do you do when you're not sure — what does this person want for their own life and death.</text:p>
      <text:p text:style-name="Text_20_body">The CHW who has a longitudinal relationship with a seriously ill member is often the person best positioned to facilitate this conversation — better positioned than a clinician who sees the person episodically, better positioned than family members who have their own needs and fears mixed into the conversation.</text:p>
      <text:p text:style-name="Text_20_body">The questions that open this conversation. What matters most to you right now. What are you most afraid of. What does a good day look like for you at this <text:soft-page-break/>point. If things get worse — if you couldn't speak for yourself — what would you want the people around you to know about what you'd want.</text:p>
      <text:p text:style-name="Text_20_body">These aren't easy questions. They require the relational foundation from module 5 and the capacity to sit with difficulty from module 7. But they're the questions that prevent the chaotic undignified death that happens when nobody has named what the person actually wanted.</text:p>
      <text:p text:style-name="Text_20_body"><text:span text:style-name="Strong_20_Emphasis">Advance directives in Georgia</text:span></text:p>
      <text:p text:style-name="Text_20_body">The legal documents that allow people to express their wishes for medical care when they can't speak for themselves.</text:p>
      <text:p text:style-name="Text_20_body">The Georgia Advance Directive for Health Care — the combined document that includes both the living will (treatment preferences) and the healthcare agent designation (who speaks for you). Available as a free form from the State Bar of Georgia. Requires two witnesses but does not require a notary. The CHW should know where to find this form, how to help someone complete it, and where the completed form should be kept.</text:p>
      <text:p text:style-name="Text_20_body">The POLST — Physician Orders for Life-Sustaining Treatment — in Georgia called the Medical Orders for Life-Sustaining Treatment or MOLST. A medical order rather than a legal document, signed by a physician or advance practice provider, that translates the person's wishes into specific medical orders that emergency responders and hospital staff are required to follow. The distinction between an advance directive and a POLST matters — an advance directive guides decisions but a POLST is an order. For someone with serious illness who has clear preferences about resuscitation and life-sustaining treatment the POLST is the more operationally powerful document.</text:p>
      <text:p text:style-name="Text_20_body">The DNR — do not resuscitate — as the specific component of these documents that people most often need to understand. What CPR actually is and what outcomes it actually produces — particularly in the context of serious illness where survival rates from CPR are far lower than television portrays. The honest information about what someone is choosing when they choose DNR versus full resuscitation. This conversation can only happen if the person has accurate information and the CHW who has this information can facilitate it in a way a rushed clinical encounter often can't.</text:p>
      <text:p text:style-name="Text_20_body"><text:span text:style-name="Strong_20_Emphasis">Hospice</text:span></text:p>
      <text:p text:style-name="Text_20_body">What hospice actually is versus the misconception that it means giving up.</text:p>
      <text:p text:style-name="Text_20_body"><text:soft-page-break/>Hospice is a specific Medicare and Medicaid benefit that provides comprehensive comfort-focused care for people with a terminal diagnosis and a prognosis of six months or less if the disease follows its expected course. It provides nursing visits, aide visits, social work, chaplaincy, medications related to the terminal diagnosis, and medical equipment — all at no cost to the patient. It is one of the most comprehensively covered benefits in Medicare.</text:p>
      <text:p text:style-name="Text_20_body">The access barriers in rural Georgia. Hospice agencies operate in Franklin County but the rural geography means that visit frequency may be lower than in urban areas. The CHW who understands what hospice provides and can connect eligible members to it — and help them understand that choosing hospice doesn't mean giving up, doesn't mean stopping all treatment, doesn't mean dying immediately — is removing a significant barrier to a genuinely useful resource.</text:p>
      <text:p text:style-name="Text_20_body">The six-month prognosis requirement and its practical reality. Physicians often refer to hospice very late — in the final days or weeks of life — because of discomfort with the prognosis conversation and the cultural association of hospice with death. People who enroll in hospice earlier — months before death rather than days — have better symptom management, better family support, less chaotic dying, and in some studies actually live slightly longer than similar patients who don't enroll. Earlier is better. The CHW who recognizes hospice eligibility and facilitates the conversation is doing something valuable.</text:p>
      <text:p text:style-name="Text_20_body"><text:span text:style-name="Strong_20_Emphasis">Supporting family caregivers</text:span></text:p>
      <text:p text:style-name="Text_20_body">The person who is seriously ill is the primary focus but the family caregiver is a patient too.</text:p>
      <text:p text:style-name="Text_20_body">Caregiver burden is one of the most significant and least addressed health problems in this population. The spouse, the adult child, the family member who has rearranged their life to provide care — they are experiencing a specific kind of chronic stress with specific health consequences. Their own health maintenance often collapses around the demands of caregiving. Their social connections narrow. Their sleep is disrupted. Their sense of self outside the caregiver role erodes.</text:p>
      <text:p text:style-name="Text_20_body">The CHW's attention to the caregiver. Every visit includes some attention to how the caregiver is doing — not just how they're managing the caregiving tasks but how they themselves are. The caregiver who is depressed, physically depleted, and isolated needs support that is real and specific. Respite — even brief periods of relief from caregiving — is one of the most important <text:soft-page-break/>interventions for caregiver health. The Working Society's capacity to provide respite through member participation is genuinely valuable.</text:p>
      <text:p text:style-name="Text_20_body">Anticipatory grief in caregivers. The grief that begins before the death — the grief of watching someone you love diminish, of losing them incrementally before they're gone. This is a real phenomenon that the caregiver often can't name or doesn't feel entitled to because the person hasn't died yet. The CHW who can name it and make space for it is reducing the caregiver's isolation around their experience.</text:p>
      <text:p text:style-name="Horizontal_20_Line"/>
      <text:p text:style-name="Text_20_body"><text:span text:style-name="Strong_20_Emphasis">Part three: After death</text:span></text:p>
      <text:p text:style-name="Text_20_body"><text:span text:style-name="Strong_20_Emphasis">The immediate practical reality</text:span></text:p>
      <text:p text:style-name="Text_20_body">What actually needs to happen when someone dies at home. Most people have no idea because it's so thoroughly outside common experience.</text:p>
      <text:p text:style-name="Text_20_body">If the death was expected — hospice patient, person with known terminal illness who has a POLST or DNR — the process is relatively straightforward. Call the hospice nurse if hospice is involved. Call the physician or the medical examiner depending on circumstances. The body does not need to be moved immediately. There is time.</text:p>
      <text:p text:style-name="Text_20_body">If the death was unexpected — even if it occurred in the context of serious illness — the coroner or medical examiner may need to be involved. In Georgia unexpected deaths at home require notification of the county coroner. The CHW should know the local coroner contact and understand when notification is required.</text:p>
      <text:p text:style-name="Text_20_body">The death certificate process in Georgia. Who can sign it — the attending physician, the coroner, the medical examiner depending on circumstances. What information is required. The timeframes involved. Why this matters for practical reasons — financial accounts, estate matters, benefits — and how to help families navigate it.</text:p>
      <text:p text:style-name="Text_20_body">Funeral homes and their role. What happens when the funeral home is called. What choices exist and at what cost. The specific reality that funeral costs are a genuine financial burden for this population and that simple options — direct cremation, simple graveside services — are available and legitimate. Green burial as an increasingly available option in Georgia. The Working Society's potential role in supporting death rituals that are meaningful and affordable.</text:p>
      <text:p text:style-name="Text_20_body"><text:soft-page-break/><text:span text:style-name="Strong_20_Emphasis">Being present at death</text:span></text:p>
      <text:p text:style-name="Text_20_body">What it means to be with someone at the moment of their death and in the hours following.</text:p>
      <text:p text:style-name="Text_20_body">This is knowledge that used to be common and isn't. People were present at deaths throughout human history — they knew what to do, what to say, how to be. The medicalization of death moved it into institutions and removed most people from the experience entirely. Now when death happens at home many families are frightened and paralyzed by something their great-grandparents would have navigated as a matter of course.</text:p>
      <text:p text:style-name="Text_20_body">The CHW who has prepared for this — who has thought about it, read about it, been willing to consider it — is more able to be genuinely present when it happens.</text:p>
      <text:p text:style-name="Text_20_body">What that presence looks like. Quiet. Calm. Permission given to family members to be close, to touch, to speak. No urgency to call anyone or do anything in the immediate moments. Time to be with the person who has died before the practical processes begin. This time — an hour, two hours — belongs to the family and to the person who died. It doesn't need to be rushed.</text:p>
      <text:p text:style-name="Text_20_body">The specific things that help family members in this moment. Telling them it's okay to stay close. Telling them the person can hear right up until the end. Helping them find words if they have them. Being present without directing or managing. The CHW as witness rather than coordinator in this moment.</text:p>
      <text:p text:style-name="Horizontal_20_Line"/>
      <text:p text:style-name="Text_20_body"><text:span text:style-name="Strong_20_Emphasis">Part four: Grief</text:span></text:p>
      <text:p text:style-name="Text_20_body">Module 7 covered grief as a mental health topic. Here it gets its full treatment as a human experience the CHW will encounter constantly and needs to understand deeply.</text:p>
      <text:p text:style-name="Text_20_body"><text:span text:style-name="Strong_20_Emphasis">The reality of grief</text:span></text:p>
      <text:p text:style-name="Text_20_body">Not the stages — Kübler-Ross's five stages were never intended as a universal linear sequence and their reduction to a checklist has done as much harm as good by creating the expectation that grief should proceed in an orderly way and that people who don't follow the sequence are doing it wrong.</text:p>
      <text:p text:style-name="Text_20_body">What grief actually is. The disordered, non-linear, profoundly physical experience of adapting to a world in which someone essential is missing. It <text:soft-page-break/>affects sleep, appetite, concentration, immune function, cardiovascular health. It is not primarily a psychological phenomenon — it is a whole-body reorganization around an absence.</text:p>
      <text:p text:style-name="Text_20_body">The timelines are longer than the culture acknowledges. The expectation that grief resolves in months is not supported by evidence or by the experience of anyone who has grieved deeply. The first year is the acute phase. The second year is often harder in some ways because the acute support has withdrawn and the reality has become more permanent. Years three through five involve the integration of loss into a life that is genuinely changed rather than restored to what it was.</text:p>
      <text:p text:style-name="Text_20_body">The specific losses this population carries. Multiple and compounding losses are common — the spouse died, and before that the job, and before that the community that used to exist, and woven through all of it the slow loss of physical capacity and independence. The cumulative grief that has never been adequately processed because there was never space or support for it.</text:p>
      <text:p text:style-name="Text_20_body"><text:span text:style-name="Strong_20_Emphasis">What grief needs</text:span></text:p>
      <text:p text:style-name="Text_20_body">Not intervention. Witness.</text:p>
      <text:p text:style-name="Text_20_body">The most important thing a grieving person needs is someone who can hear about their loss, about who they lost, about what is missing — without becoming uncomfortable, without rushing toward resolution, without offering the silver linings that are an attempt to manage the witness's own discomfort rather than to help the grieving person.</text:p>
      <text:p text:style-name="Text_20_body">The specific skill of asking about the person who died as a person. Tell me about her. What was he like. What do you miss most. These questions honor the loss by honoring the person who was lost. They give the grieving person something they often don't get — space to talk about who they loved rather than only about how they're coping.</text:p>
      <text:p text:style-name="Text_20_body">Being willing to return to the subject across multiple visits. Grief doesn't resolve between visits. The CHW who asks about the person who died six months later, a year later — not as a check-in on how the grieving is progressing but as genuine ongoing interest in the person who is missing — is providing something valuable and rare.</text:p>
      <text:p text:style-name="Text_20_body"><text:span text:style-name="Strong_20_Emphasis">Complicated grief</text:span></text:p>
      <text:p text:style-name="Text_20_body"><text:soft-page-break/>When to be concerned that grief has moved beyond the normal into something that requires more support.</text:p>
      <text:p text:style-name="Text_20_body">The markers of complicated grief — intense longing that doesn't diminish over time, difficulty accepting the reality of the death, bitterness and anger that doesn't soften, a sense that life is meaningless or that the future is empty, withdrawal from all relationships and activities, inability to function in basic ways many months or years after the loss.</text:p>
      <text:p text:style-name="Text_20_body">The honest resource picture for complicated grief in Franklin County is thin. Grief support groups exist in some communities — specific contacts where they exist in this region. Hospice bereavement services are available to the families of hospice patients for up to a year after death. Beyond that the formal options are the same thin mental health landscape from module 8.</text:p>
      <text:p text:style-name="Text_20_body">Which returns again to the Working Society as the primary resource. The community that knows this person, that includes them in its life, that gives them reasons to be present — this is the most powerful anti-grief intervention available.</text:p>
      <text:p text:style-name="Horizontal_20_Line"/>
      <text:p text:style-name="Text_20_body"><text:span text:style-name="Strong_20_Emphasis">The closing section</text:span></text:p>
      <text:p text:style-name="Text_20_body">Module 9 closes differently from all the other modules.</text:p>
      <text:p text:style-name="Text_20_body">The other modules close with competence — here is what you now know, here is what you can do. Module 9 closes with something else.</text:p>
      <text:p text:style-name="Text_20_body">Death is the thing that every health system and every health education curriculum approaches as a problem to be solved, a failure to be prevented, an outcome to be avoided for as long as possible. That orientation has produced extraordinary things — diseases cured, lives extended, suffering prevented. It has also produced a culture that cannot look at death, cannot be present with it, cannot find meaning in it.</text:p>
      <text:p text:style-name="Text_20_body">The CHW who has completed this module is not prepared to prevent death. They are prepared to be present with it. To bring the knowledge, the calm, the genuine human presence that transforms the worst moments of a person's life from something terrifying and solitary into something witnessed and accompanied.</text:p>
      <text:p text:style-name="Text_20_body">That is not a small thing.</text:p>
      <text:p text:style-name="Text_20_body"><text:soft-page-break/>The families who are accompanied through a death by someone who knows what is happening, who can name it, who can tell them what to do and what not to do, who can stay present without flinching — those families carry the experience differently than the families who were left alone with something they didn't understand and didn't know how to be with.</text:p>
      <text:p text:style-name="Text_20_body">The person who dies surrounded by people who can be genuinely present — who aren't paralyzed by fear or frantically trying to do something that can't be done — dies better than the person who dies in chaos or in an institution far from the people they love.</text:p>
      <text:p text:style-name="Text_20_body">Being able to provide that is one of the most profoundly human things the Working Society's CHWs will do. It is worth preparing for honestly rather than leaving it to improvisation in the worst moments.</text:p>
      <text:p text:style-name="P10"/>
      <text:p text:style-name="P9"/>
      <text:p text:style-name="P9">1<text:span text:style-name="T8">0</text:span>. Documentation and Continuity</text:p>
      <text:p text:style-name="P9"/>
      <text:p text:style-name="P9">1<text:span text:style-name="T9">1</text:span>. Taking Care of Yoursel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indent="0.2in" style:auto-text-indent="false"/>
      <style:text-properties style:font-name="Libre Baskerville" fo:font-family="'Libre Baskervill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IM FELL English SC1" fo:font-family="'IM FELL English SC'" style:font-style-name="Bold"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IM FELL English SC1" fo:font-family="'IM FELL English SC'" style:font-style-name="Bold" style:font-pitch="variable" fo:font-size="11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1799in" style:contextual-spacing="false" fo:text-align="center" style:justify-single-word="false"/>
      <style:text-properties style:font-name="IM FELL English SC2" fo:font-family="'IM FELL English SC'" style:font-style-name="Regular"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IM FELL English SC2" fo:font-family="'IM FELL English SC'" style:font-style-name="Regular" style:font-pitch="variable" fo:font-size="13pt" style:font-size-asian="18pt" style:font-size-complex="18pt"/>
    </style:style>
    <style:style style:name="First_20_Paragraph" style:display-name="First Paragraph" style:family="paragraph" style:parent-style-name="Standard" style:master-page-name="">
      <style:paragraph-properties fo:text-indent="0in" style:auto-text-indent="false" style:page-number="auto"/>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Resolute Societies of Americ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3:48:24.763225727</meta:creation-date>
    <dc:date>2026-06-09T17:56:50.763653477</dc:date>
    <meta:editing-duration>PT7H42M43S</meta:editing-duration>
    <meta:editing-cycles>25</meta:editing-cycles>
    <meta:generator>LibreOffice/24.2.7.2$Linux_X86_64 LibreOffice_project/420$Build-2</meta:generator>
    <meta:document-statistic meta:table-count="0" meta:image-count="0" meta:object-count="0" meta:page-count="88" meta:paragraph-count="815" meta:word-count="28847" meta:character-count="187888" meta:non-whitespace-character-count="159188"/>
  </office:meta>
</office:document-meta>
</file>