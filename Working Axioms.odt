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Axiom I</text:span></text:p>
      <text:p text:style-name="Text_20_body">Reality exists independently of our perceptions and preferences.</text:p>
      <text:p text:style-name="Text_20_body">The world is what it is regardless of what we wish it to be. It can be known — not perfectly, not finally, but genuinely. Our ability to perceive reality is itself limited — by the boundaries of human sense, by the tools available to us, and by the categories through which we interpret what we observe. The history of human knowledge is in part the history of building instruments that extend perception beyond those natural limits, and each extension has revealed how much the previous picture was missing. We are certainly still missing significant parts of the picture. We are nonetheless obligated to pursue reality honestly, to follow evidence wherever it leads, and to hold our conclusions provisionally — open to revision as perception improves and evidence accumulates. We do not mistake the current limit of our knowledge for the limit of what is real.</text:p>
      <text:p text:style-name="Horizontal_20_Line"/>
      <text:p text:style-name="Text_20_body"><text:span text:style-name="Strong_20_Emphasis">Axiom II</text:span></text:p>
      <text:p text:style-name="Text_20_body">Human beings are capable of sustaining profound moral blindness toward suffering and injustice they are causing or enabling.</text:p>
      <text:p text:style-name="Text_20_body">This is not a flaw unique to cruel or indifferent people — it is a predictable feature of ordinary human psychology operating under specific conditions. When economic incentives make blindness profitable, when cultural normalization makes it comfortable, and when physical or institutional distance separates the person from the consequences of their decisions, moral perception fails. Not because people stop caring. Because the system is designed to ensure they never have to.</text:p>
      <text:p text:style-name="Text_20_body">This mechanism has been exploited throughout human history. It is being exploited now at civilizational scale. The ecological crisis, the industrialization of suffering, the breaking of the covenant, the capture of democratic institutions — none of these are primarily produced by malice. They are produced by ordinary people making ordinary decisions within systems specifically engineered to prevent them from encountering what those decisions cost.</text:p>
      <text:p text:style-name="Text_20_body">We are not exempt from this tendency. The Society itself, its members, its institutions — all are capable of the same compartmentalization under the right conditions. We name this axiom not as a judgment on others but as a warning to ourselves.</text:p>
      <text:p text:style-name="Text_20_body">Therefore we state our foundational commitments explicitly rather than assuming them. We build structures that collapse the distance between decision and consequence rather than engineering it. We build a community in which the moral reality of what we do is visible rather than hidden. You cannot resist what you cannot see. We intend to see.</text:p>
      <text:p text:style-name="Horizontal_20_Line"/>
      <text:p text:style-name="Text_20_body"><text:span text:style-name="Strong_20_Emphasis">Axiom III</text:span></text:p>
      <text:p text:style-name="Text_20_body">Human dignity is equal, sacred, and inviolable.</text:p>
      <text:p text:style-name="Text_20_body">Every person possesses a worth not contingent on birth, behavior, or belief. What you were born into — your ancestry, your race, your sex, your place — tells us nothing about your worth. Dignity cannot <text:soft-page-break/>be earned or lost, granted or revoked. That it is violated does not make it less real — violation presupposes it. This is the ground on which everything else stands.</text:p>
      <text:p text:style-name="Horizontal_20_Line"/>
      <text:p text:style-name="Text_20_body"><text:span text:style-name="Strong_20_Emphasis">Axiom IV</text:span></text:p>
      <text:p text:style-name="Text_20_body">No generation creates what it receives.</text:p>
      <text:p text:style-name="Text_20_body">The inheritance of the earth — its land, its living systems, its atmosphere, its accumulated knowledge and institutions — arrives before any living person and persists beyond them. It was not made by those who hold it now. It was received from processes older than our species and from generations who themselves received it. What no one has earned, no one owns. We are inhabitants and recipients, not authors and proprietors.</text:p>
      <text:p text:style-name="Horizontal_20_Line"/>
      <text:p text:style-name="Text_20_body"><text:span text:style-name="Strong_20_Emphasis">Axiom V</text:span></text:p>
      <text:p text:style-name="Text_20_body">The living systems of the earth have integrity that exists independently of human valuation.</text:p>
      <text:p text:style-name="Text_20_body">They are not resources awaiting use. They are not assets to be managed. They are communities of extraordinary complexity, evolved over timescales that make human history invisible, whose logic and worth exist whether or not any human generation chooses to recognize them.</text:p>
      <text:p text:style-name="Text_20_body">We did not create these systems. We cannot recreate them once destroyed. We are not their managers — we are their inhabitants. We are biological creatures embedded in living processes we depend on absolutely and cannot exit. The pretense that we stand above nature, managing it for our purposes from outside, is not just philosophically wrong — it is the pretense that has made the current crisis possible.</text:p>
      <text:p text:style-name="Text_20_body">Our tenure here is brief. The earth is four and a half billion years old. What we call civilization is three hundred years old. The living systems we are degrading operated for timescales that dwarf our entire existence as a species. We are passing through something vastly older and larger than ourselves.</text:p>
      <text:p text:style-name="Text_20_body">This changes the burden of justification. The default is non-interference. The obligation falls on those who would extract, develop, or destroy — to demonstrate that what will be lost can be restored, that the use is worth the irreversible cost, and that those who come after have been considered. We do not ask why we should restrain ourselves. We ask why this use is worth what cannot be recovered.</text:p>
      <text:p text:style-name="Horizontal_20_Line"/>
      <text:p text:style-name="Text_20_body"><text:span text:style-name="Strong_20_Emphasis">Axiom VI</text:span></text:p>
      <text:p text:style-name="Text_20_body">Community is constitutive of the person.</text:p>
      <text:p text:style-name="Text_20_body">We do not arrive in the world as finished individuals who then choose association. We become who we are through relationship, language, place, and belonging. Community is not a tool persons use — it is the condition in which persons become possible. This is not a preference for togetherness. It is a claim about what persons are and what they require in order to remain fully themselves.</text:p>
      <text:p text:style-name="Text_20_body"><text:soft-page-break/>The deliberate destruction of community is therefore not merely a social problem. It is an attack on the conditions of personhood itself. And that destruction is underway — not as an accident, not as an unfortunate side effect, but as the predictable outcome of forces operating exactly as designed.</text:p>
      <text:p text:style-name="Text_20_body">Market logic converts every communal relationship into a transaction. What was once exchanged freely between neighbors — care, labor, knowledge, time — becomes a service to be purchased, removing the reciprocity that made it community rather than commerce. Third places — the spaces where people gathered without spending money, where relationships formed across difference, where belonging was not contingent on consumption — have been systematically eliminated or converted. Urban and suburban design has replaced proximity and walkability with isolation and automobile dependency, engineering the physical conditions of atomization into the landscape itself. The attention economy has substituted algorithmic engagement for genuine presence — manufacturing the feeling of connection while delivering its opposite. Work structures that once provided stable relationships around which community could form have been deliberately destabilized in the name of flexibility and efficiency.</text:p>
      <text:p text:style-name="Text_20_body">The result is an epidemic of loneliness operating at civilizational scale. Not the loneliness of particular unfortunate people but the structural loneliness of a society whose organizing systems have been redesigned — piece by piece, decision by decision, each one rational in isolation — to dissolve the bonds that make persons possible.</text:p>
      <text:p text:style-name="Text_20_body">We are not exempt from these forces. The Society exists within the same environment and is subject to the same pressures. Building genuine community requires active and ongoing resistance to mechanisms that will operate on the Society itself — converting its relationships into transactions, its belonging into consumption, its presence into engagement metrics. We build with this knowledge as a permanent condition of our work, not a problem we will eventually solve.</text:p>
      <text:p text:style-name="Horizontal_20_Line"/>
      <text:p text:style-name="Text_20_body"><text:span text:style-name="Strong_20_Emphasis">Axiom VII</text:span></text:p>
      <text:p text:style-name="Text_20_body">Beings capable of suffering have genuine moral standing.</text:p>
      <text:p text:style-name="Text_20_body">They are not objects. They are not resources. They are not instruments for human purposes. The capacity to suffer — to experience pain, fear, deprivation, and the frustration of basic needs — is sufficient to generate real moral obligations toward the being that experiences it, regardless of that being's species, intelligence, or utility to humans.</text:p>
      <text:p text:style-name="Text_20_body">This standing is distinct from human dignity. It does not admit of the same unconditional equality — the suffering of a chimpanzee and the suffering of an insect are not equivalent moral claims. But neither is it nothing. The spectrum of sentient experience generates a corresponding spectrum of obligation. Where suffering is deep, complex, and socially experienced — as it is in mammals and birds — the obligations are serious and cannot be dismissed without moral cost.</text:p>
      <text:p text:style-name="Text_20_body">We are in the midst of the sixth mass extinction in the history of life on earth. We are its cause. Entire species — entire evolutionary lineages representing millions of years of distinct biological history, entire ecological relationships that will never exist again — are being permanently eliminated because the systems that govern human activity have no framework for counting their loss as a wrong. This is not an unfortunate side effect of progress. It is a moral catastrophe made possible by a single <text:soft-page-break/>foundational decision: that non-human life does not have standing sufficient to constrain human activity.</text:p>
      <text:p text:style-name="Text_20_body">The same decision that makes mass extinction possible makes factory farming possible. Tens of billions of sentient beings processed annually through systems specifically engineered to make their suffering invisible — not because the suffering is not real but because acknowledging it would be economically inconvenient. The scale is intimate and daily. The logic is identical.</text:p>
      <text:p text:style-name="Text_20_body">We have known this and chosen not to act on it. A community that learns to ignore suffering it finds inconvenient to acknowledge does not confine that capacity for ignorance to animals. The habits of moral perception are not compartmentalized. We build a community that sees clearly — at every scale, in every context, regardless of the cost of seeing.</text:p>
      <text:p text:style-name="Horizontal_20_Line"/>
      <text:p text:style-name="Text_20_body"><text:span text:style-name="Strong_20_Emphasis">Axiom VIII</text:span></text:p>
      <text:p text:style-name="Text_20_body">Legitimacy is distinct from legality and cannot be reduced to it.</text:p>
      <text:p text:style-name="Text_20_body">Authority is legitimate when it flows from genuine consent, serves those subject to it, and remains accountable to them. Legal correctness guarantees none of this. Law derives its claim on conscience from legitimacy, not the reverse. When that claim is absent, compliance may be compelled but it cannot be owed. We build institutions that earn legitimacy rather than merely assume it.</text:p>
      <text:p text:style-name="Horizontal_20_Line"/>
      <text:p text:style-name="Text_20_body"><text:span text:style-name="Strong_20_Emphasis">Axiom IX</text:span></text:p>
      <text:p text:style-name="Text_20_body">Power tends to corrupt and always tends to concentrate.</text:p>
      <text:p text:style-name="Text_20_body">This is not cynicism — it is the most consistently documented pattern in human history. Those who hold power tend to use it in ways that serve themselves. Institutions left unchecked tend toward self-service. Concentrated power tends toward more concentrated power regardless of the intentions of those who hold it. The incentive structures that power creates are more powerful than individual virtue. No founding intention however pure protects an institution from these tendencies. Only structure does. We build our institutions with this knowledge at their foundation — not in despair but in clear-eyed determination to resist what power naturally does. Eternal vigilance is not a slogan. It is a structural requirement.</text:p>
      <text:p text:style-name="Horizontal_20_Line"/>
      <text:p text:style-name="Text_20_body"><text:span text:style-name="Strong_20_Emphasis">Axiom X</text:span></text:p>
      <text:p text:style-name="Text_20_body">Persons are not identical to their worst moments.</text:p>
      <text:p text:style-name="Text_20_body">Human beings are not fixed. This is not a moral preference — it is an observable feature of what persons are. The self is not a static thing that merely accumulates actions. It is a living process, shaped continuously by experience, relationship, reflection, and choice. People demonstrably change. Capacities dormant for decades emerge. Patterns that seemed permanent dissolve. The person who caused serious harm ten years ago is not, in any meaningful sense, identical to the person who caused it — if genuine work has been done.</text:p>
      <text:p text:style-name="Text_20_body"><text:soft-page-break/>That condition matters. Transformation is possible but it is not automatic. It must be earned — through honest acknowledgment of what was done, through repair where possible, through demonstrated change over time that others can witness and verify. The possibility of transformation is a feature of human nature. Whether any particular transformation has occurred is a question that requires evidence.</text:p>
      <text:p text:style-name="Text_20_body">Communities that treat persons as permanently defined by their worst moments are therefore making a factual error as much as a moral one. They are mistaking a moment for a person, a history for an identity, a capacity for a fixed thing. The consequences of that error compound — for the person denied renewal, for the community that loses what they might have become, and for the moral culture that calcifies around the pretense that people cannot change when the evidence consistently shows that they can.</text:p>
      <text:p text:style-name="Horizontal_20_Line"/>
      <text:p text:style-name="Text_20_body"><text:span text:style-name="Strong_20_Emphasis">Axiom XI</text:span></text:p>
      <text:p text:style-name="Text_20_body">Human capacities exist only in practice. What persons do not do, they lose the ability to do. Institutions that absorb human functions do not merely replace them — they destroy them.</text:p>
      <text:p text:style-name="Text_20_body">This is not a criticism of institutions as such. It is a claim about human nature. Capacities are not possessions that can be stored and retrieved. They are living achievements that exist only in their exercise. The person who has not grown food cannot grow food. The person who has never resolved a conflict without a lawyer cannot resolve a conflict without a lawyer. The person who has never governed themselves cannot govern themselves. The knowledge does not go dormant. It goes extinct — first in the individual, then in the community, then in the culture. Within two generations a capacity that took centuries to develop can vanish so completely that its absence feels like nature rather than loss.</text:p>
      <text:p text:style-name="Text_20_body">Institutions offering to do for people what people used to do for themselves and each other do not feel like a threat. They feel like progress. The offer is genuine — the institution is often more efficient, more reliable, more expert than the individual or community it replaces. People accept because acceptance is rational in the short term. The capacity atrophies from disuse. The dependency becomes total. And then the institution can extract whatever it wants because there is no alternative — not because anyone planned it that way, but because the logic of substitution, followed honestly to its conclusion, always arrives there.</text:p>
      <text:p text:style-name="Text_20_body">This has happened within living memory across every domain of human life simultaneously. Medicine, food, governance, education, conflict resolution, care of the dying, care of children, the building of shelter — in each case the pattern is identical. An institution offered to do something people did for themselves. People accepted. The capacity was lost. The dependency was established. The extraction began.</text:p>
      <text:p text:style-name="Text_20_body">We are not exempt from this tendency. The Society itself — its divisions, its colleges, its governance structures — can become the thing it was built to resist. Every time the Society does something for its members rather than through them and with them, it risks destroying the capacity it was built to restore. The measure of this Society's success is not what it provides but what its members can do — <text:soft-page-break/>individually and together — because they are part of it. We build institutions that restore capacity rather than replace it. We build with this knowledge as our constant check against our own best intentions.</text:p>
      <text:p text:style-name="Horizontal_20_Line"/>
      <text:p text:style-name="Text_20_body"><text:span text:style-name="Strong_20_Emphasis">Axiom XII</text:span></text:p>
      <text:p text:style-name="Text_20_body">The solutions of one generation become the costs of the next.</text:p>
      <text:p text:style-name="Text_20_body">Every layer of complexity added to solve a problem persists after the problem is solved. It does not dissolve when it is no longer needed. It becomes infrastructure — demanding maintenance, generating dependencies, producing new problems that require new complexity to address. This is not a failure of planning or foresight. It is the predictable result of rational people solving real problems with the best tools available to them. The complexity that saved a society in one generation burdens the next and breaks the one after.</text:p>
      <text:p text:style-name="Text_20_body">This pattern is documented across every complex society in human history without exception. The returns on complexity are real — new layers of organization genuinely solve problems and produce benefits. But returns diminish. Each additional layer of complexity produces less benefit than the last while adding costs that compound. The moment arrives — invisibly, without announcement — when the cost of maintaining existing complexity exceeds the benefit it produces. From that moment forward the society is not solving problems. It is servicing its own past solutions.</text:p>
      <text:p text:style-name="Text_20_body">The result is brittleness. A society that cannot simplify — because every layer of complexity has constituencies that defend it, dependencies that require it, and institutions whose survival depends on it — becomes progressively less able to absorb stress. Problems that an earlier, simpler version of the same society would have weathered become crises. Crises that would have been manageable become catastrophes. The sophistication that was the society's greatest achievement becomes the source of its greatest vulnerability.</text:p>
      <text:p text:style-name="Text_20_body">Collapse in this framework is not what happens to a society that fails. It is what happens to a society that succeeded — that accumulated complexity in response to every problem it faced, that could not stop succeeding even when success had stopped paying, and that finally encountered a stress it could no longer absorb. Collapse is the simplification the society could not achieve voluntarily. It is the bill arriving for complexity that was never paid down.</text:p>
      <text:p text:style-name="Text_20_body">We are not exempt from this. The Society will face pressure to add complexity in response to every problem it encounters. Each addition will be rational. Each will be justified. Each will make the next addition more likely and the cost of simplification higher. We build with this knowledge as a permanent check — not against solving problems but against mistaking the accumulation of solutions for the accumulation of strength. Strength, for a Resolute Society, is the capacity to function with less. We build accordingly.</text:p>
      <text:p text:style-name="Horizontal_20_Line"/>
      <text:p text:style-name="Text_20_body"><text:span text:style-name="Strong_20_Emphasis">Axiom XIII</text:span></text:p>
      <text:p text:style-name="Text_20_body">Markets are not natural. They are made.</text:p>
      <text:p text:style-name="Text_20_body"><text:soft-page-break/>The idea that economic arrangements are the neutral outcome of supply and demand — that wages, prices, and distributions reflect natural laws operating beyond human choice — is one of the most consequential fictions of the modern era. It is not a description of how markets work. It is a political claim dressed as a description, deployed to place economic arrangements beyond democratic accountability by making them appear as natural as weather. What presents itself as economics is always also politics. What presents itself as neutral is always serving someone's interests. The pretense of naturalness is itself a choice — made by someone, maintained by someone, and benefiting someone.</text:p>
      <text:p text:style-name="Text_20_body">Markets in their modern form were constructed through specific legal and political mechanisms — the enclosure of common land that forced people into wage labor by eliminating non-market survival options, the creation of currency systems and central banking, the legal definition of corporations and their rights, the deliberate dismantling of guild systems and mutual aid networks that provided alternatives to market participation. The self-regulating market required more state intervention to create and maintain than any previous economic arrangement in human history. Its appearance of naturalness was constructed simultaneously with the market itself, because the market's legitimacy depended on it appearing to exist outside human choice.</text:p>
      <text:p text:style-name="Text_20_body">This remains true today. The minimum wage is a political choice. The distinction between employee and contractor is a political choice. The tax treatment of capital gains versus labor income is a political choice. Intellectual property law is a political choice. The legal personhood of corporations is a political choice. None of these are natural. All of them were made by someone, serve someone's interests, and could be made differently. The economy is not a force of nature to be adapted to. It is a set of rules to be examined, contested, and where necessary replaced.</text:p>
      <text:p text:style-name="Text_20_body">This axiom is the foundation of the Society's internal economy. The kin currency, the commons, the mutual credit system — these are not utopian deviations from natural economic arrangements. They are a different set of construction choices, made deliberately, in the service of different values. Every economy is constructed. The only question is who constructs it, for whom, and toward what ends. We construct ours explicitly, accountably, and in the open.</text:p>
      <text:p text:style-name="Text_20_body"><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7T21:27:03.769280208</meta:creation-date>
    <dc:date>2026-06-18T12:48:07.856977601</dc:date>
    <meta:editing-duration>PT30M56S</meta:editing-duration>
    <meta:editing-cycles>4</meta:editing-cycles>
    <meta:generator>LibreOffice/24.2.7.2$Linux_X86_64 LibreOffice_project/420$Build-2</meta:generator>
    <meta:document-statistic meta:table-count="0" meta:image-count="0" meta:object-count="0" meta:page-count="7" meta:paragraph-count="65" meta:word-count="3160" meta:character-count="20203" meta:non-whitespace-character-count="17047"/>
  </office:meta>
</office:document-meta>
</file>